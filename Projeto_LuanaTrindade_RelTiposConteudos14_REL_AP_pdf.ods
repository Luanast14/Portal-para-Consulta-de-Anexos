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16cm"/>
    </style:style>
    <style:style style:name="co2" style:family="table-column">
      <style:table-column-properties fo:break-before="auto" style:column-width="1.707cm"/>
    </style:style>
    <style:style style:name="co3" style:family="table-column">
      <style:table-column-properties fo:break-before="auto" style:column-width="18.62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Ficheiros">
      <style:table-properties table:display="true" style:writing-mode="lr-tb"/>
    </style:style>
    <style:style style:name="ce1" style:family="table-cell" style:parent-style-name="Excel_20_Built-in_20_Normal">
      <style:table-cell-properties fo:background-color="#ffff99"/>
    </style:style>
    <style:style style:name="ce2" style:family="table-cell" style:parent-style-name="Excel_20_Built-in_20_Normal">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icheiros" table:style-name="ta1" table:print="false">
        <office:forms form:automatic-focus="false" form:apply-design-mode="false"/>
        <table:table-column table:style-name="co1" table:default-cell-style-name="Excel_20_Built-in_20_Normal"/>
        <table:table-column table:style-name="co2" table:visibility="collapse" table:number-columns-repeated="2" table:default-cell-style-name="Excel_20_Built-in_20_Normal"/>
        <table:table-column table:style-name="co3" table:default-cell-style-name="Excel_20_Built-in_20_Normal"/>
        <table:table-column table:style-name="co2" table:visibility="collapse" table:number-columns-repeated="13" table:default-cell-style-name="Excel_20_Built-in_20_Normal"/>
        <table:table-column table:style-name="co2" table:number-columns-repeated="1007" table:default-cell-style-name="Excel_20_Built-in_20_Normal"/>
        <table:table-row table:style-name="ro1">
          <table:table-cell table:style-name="ce1" office:value-type="string">
            <text:p>Nome do ficheiro</text:p>
          </table:table-cell>
          <table:table-cell table:style-name="ce1" office:value-type="string">
            <text:p>Extensão</text:p>
          </table:table-cell>
          <table:table-cell table:style-name="ce1" office:value-type="string">
            <text:p>Tipo identificado</text:p>
          </table:table-cell>
          <table:table-cell table:style-name="ce1" office:value-type="string">
            <text:p>Categoria provável do conteúdo</text:p>
          </table:table-cell>
          <table:table-cell office:value-type="string">
            <text:p>Confiança da classificação</text:p>
          </table:table-cell>
          <table:table-cell office:value-type="string">
            <text:p>Descrição breve do conteúdo</text:p>
          </table:table-cell>
          <table:table-cell office:value-type="string">
            <text:p>Evidências encontradas</text:p>
          </table:table-cell>
          <table:table-cell office:value-type="string">
            <text:p>Assinatura interna</text:p>
          </table:table-cell>
          <table:table-cell office:value-type="string">
            <text:p>Amostra de texto/metadados</text:p>
          </table:table-cell>
          <table:table-cell office:value-type="string">
            <text:p>Erro/limitação na análise interna</text:p>
          </table:table-cell>
          <table:table-cell office:value-type="string">
            <text:p>Pasta</text:p>
          </table:table-cell>
          <table:table-cell office:value-type="string">
            <text:p>Caminho completo</text:p>
          </table:table-cell>
          <table:table-cell office:value-type="string">
            <text:p>Tamanho</text:p>
          </table:table-cell>
          <table:table-cell office:value-type="string">
            <text:p>Tamanho em bytes</text:p>
          </table:table-cell>
          <table:table-cell office:value-type="string">
            <text:p>Data de criação</text:p>
          </table:table-cell>
          <table:table-cell office:value-type="string">
            <text:p>Data de modificação</text:p>
          </table:table-cell>
          <table:table-cell table:number-columns-repeated="1008"/>
        </table:table-row>
        <table:table-row table:style-name="ro1">
          <table:table-cell office:value-type="string">
            <text:p>002_BD_espolio.pdf</text:p>
          </table:table-cell>
          <table:table-cell office:value-type="string">
            <text:p>.pdf</text:p>
          </table:table-cell>
          <table:table-cell office:value-type="string">
            <text:p>Documento PDF</text:p>
          </table:table-cell>
          <table:table-cell office:value-type="string">
            <text:p>Base de Dados</text:p>
          </table:table-cell>
          <table:table-cell office:value-type="string">
            <text:p>Alta</text:p>
          </table:table-cell>
          <table:table-cell office:value-type="string">
            <text:p>Documento PDF; o conteúdo aparenta corresponder a lista / inventário de espólio. Foram analisadas as primeiras 4 página(s) de um total de 75. Pistas usadas: espólio, espolio, inventário, inventario, cerâmica, ceramica, fragmento, fragmentos.</text:p>
          </table:table-cell>
          <table:table-cell office:value-type="string">
            <text:p>espólio, espolio, inventário, inventario, cerâmica, ceramica, fragmento, fragmentos</text:p>
          </table:table-cell>
          <table:table-cell office:value-type="string">
            <text:p>Assinatura PDF</text:p>
          </table:table-cell>
          <table:table-cell office:value-type="string">
            <text:p>D:20040318190351Z00'00' D:20040318190351Z00'00' Acrobat Distiller 5.0.5 (Windows) RT&amp;VF - Director PScript5.dll Version 5.2 C.LAN BD ESPîLIO MUSEALIZADO INVENTÁRIO DE ESPÓLIO ARQUEOLÓGICO - EXPOSIÇÃO CASA DE LANHELAS Casa de Lanhelas: História e Arqueologia Teresa SilvaPreenchido por 12 de Março de 2004Data de Preenchimento Tigela (fragmento) Denominação 01Nº de Peça na Exposição Faiança - Louça "verde e branca"Sub - Categoria Cerâmica UtilitáriaCategoria CLASSIFICAÇÃO DepósitoModo de Incorporação 30 de Setembro de 2003Data de Incorporação CerâmicaMaterial Vidrado estaníferoTécnicas INFORMAÇÃO TÉCNICA EXPOSIÇÃO 1. FaiançaVitrine 1Acrílico IDENTIFICAÇÃO Séc. XVISéculos/Anos ModernaÉpoca DATAÇÃO Exposição Sara CostaAutor Teresa SilvaAutor DigitalTipo FOTOGRAFIA DESENHO VALIDAÇÃO Casa de Lanhelas / Casa dos Sá Souto MayorSítio Arqueológico Praça da Républica, nº 41-43Lugar Santa Maria MaiorFreguesia Viana do CasteloConcelho Viana do CasteloDistritoLatitude: 41º41'41''; Longitude: 8º 49' 3...</text:p>
          </table:table-cell>
          <table:table-cell table:number-columns-repeated="1015"/>
        </table:table-row>
        <table:table-row table:style-name="ro1">
          <table:table-cell office:value-type="string">
            <text:p>003_IA_MLB.pdf</text:p>
          </table:table-cell>
          <table:table-cell office:value-type="string">
            <text:p>.pdf</text:p>
          </table:table-cell>
          <table:table-cell office:value-type="string">
            <text:p>Documento PDF</text:p>
          </table:table-cell>
          <table:table-cell office:value-type="string">
            <text:p>Relatório de projeto / intervenção arqueológica / Tabela / base de dados</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111. Pistas usadas: projecto, acompanhamento arqueológico, acompanhamento arqueologico, trabalhos arqueológicos, trabalhos arqueologicos, registo, registos, observações, observacoes.</text:p>
          </table:table-cell>
          <table:table-cell office:value-type="string">
            <text:p>projecto, acompanhamento arqueológico, acompanhamento arqueologico, trabalhos arqueológicos, trabalhos arqueologicos, registo, registos, observações, observacoes</text:p>
          </table:table-cell>
          <table:table-cell office:value-type="string">
            <text:p>Assinatura PDF</text:p>
          </table:table-cell>
          <table:table-cell office:value-type="string">
            <text:p>D:20040819100232Z D:20040819184539+01'00' Acrobat Distiller 5.0.5 (Windows) RT&amp;VF - Utilizador PScript5.dll Version 5.2 UNTITLED-1 /MT82/MT69/MT76/MT65/MT84/MT211/MT82/MT73/MT79 /MT65/MT67/MT79/MT77/MT80/MT65/MT78/MT72/MT65/MT77/MT69/MT78/MT84/MT79/MT32/MT65/MT82/MT81/MT85/MT69/MT79/MT76/MT211/MT71/MT73/MT67/MT79 /MT32/MT81/MT85/MT73/MT78/MT84/MT65/MT32/MT68/MT79/MT32/MT77/MT79/MT83/MT84/MT69/MT73/MT82/MT79 /MT76/MT69/MT199/MT65/MT32/MT68/MT79/MT32/MT66/MT65/MT76/MT73/MT79 /MT77/MT65/MT84/MT79/MT83/MT73/MT78/MT72/MT79/MT83 /MT50/MT48/MT48/MT50 Acompanhamento Arqueológico no Mosteiro de Leça do Balio 1/59 Índice 1. Apresentação................................................................................................................ ..........2 2. Introdução Histórica........................................................................................................ .....4 3. Metodologia ..............................................................................................</text:p>
          </table:table-cell>
          <table:table-cell table:number-columns-repeated="1015"/>
        </table:table-row>
        <table:table-row table:style-name="ro1">
          <table:table-cell office:value-type="string">
            <text:p>004_IA_Porto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intervenção arqueológica, intervencao arqueologica, sondagem.</text:p>
          </table:table-cell>
          <table:table-cell office:value-type="string">
            <text:p>relatório, relatorio, relatório final, relatorio final, intervenção arqueológica, intervencao arqueologica, sondagem</text:p>
          </table:table-cell>
          <table:table-cell office:value-type="string">
            <text:p>Assinatura PDF</text:p>
          </table:table-cell>
          <table:table-cell office:value-type="string">
            <text:p>D:20060822145027+01'00' D:20060822145027+01'00' Acrobat Distiller 5.0.5 (Windows) RT&amp;VF - Utilizador PScript5.dll Version 5.2.2 Microsoft Word - Relatório Final PORTOS- 29 04 2003.doc RREECCOONNVVEERRSSÃÃOO EEMM VVIIAA LLAARRGGAA EE EELLEECCTTRRIIFFIICCAAÇÇÃÃOO DDAA LLIINNHHAA DDEE GGUUIIMMAARRÃÃEESS TTRROOÇÇOO:: SSAANNTTOO TTIIRRSSOO –– LLOORRDDEELLOO TTRRAABBAALLHHOOSS AARRQQUUEEOOLLÓÓGGIICCOOSS NNAA ÁÁRREEAA EENNVVOOLLVVEENNTTEE DDAA EESSTTAAÇÇÃÃOO RROOMMAANNAA DDEE PPOORRTTOOSS ((PPoorrttooss..0022)) Porto 2003 J. MENÉNDEZ, UNIPESSOAL LDA Arqueologia e serviços Relatório Final. Portos.02 Pág. 2 SSuummáárriioo 1- INTRODUÇÃO. ENQUADRAMENTO DA INTERVENÇÃO ARQUEOLÓGICA ............................................... 5 1.1. A ESTAÇÃO ARQUEOLÓGICA DE MONTE DOS SALTOS / PORTOS: ................................................... 5 O CONTEXTO ARQUEOLÓGICO REGIONAL........................................................................................ 5 1.2. A ESTAÇÃO ARQUEOLÓGICA DE MONTE...</text:p>
          </table:table-cell>
          <table:table-cell table:number-columns-repeated="1015"/>
        </table:table-row>
        <table:table-row table:style-name="ro1">
          <table:table-cell office:value-type="string">
            <text:p>005_IA_MLV.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3. Pistas usadas: relatório, relatorio, projecto, intervenção arqueológica, intervencao arqueologica, acompanhamento arqueológico, acompanhamento arqueologico, sondagem, sondagens, trabalhos arqueológicos, trabalhos arqueologicos.</text:p>
          </table:table-cell>
          <table:table-cell office:value-type="string">
            <text:p>relatório, relatorio, projecto, intervenção arqueológica, intervencao arqueologica, acompanhamento arqueológico, acompanhamento arqueologico, sondagem, sondagens, trabalhos arqueológicos, trabalhos arqueologicos</text:p>
          </table:table-cell>
          <table:table-cell office:value-type="string">
            <text:p>Assinatura PDF</text:p>
          </table:table-cell>
          <table:table-cell office:value-type="string">
            <text:p>D:20040329175457Z D:20060822145852+01'00' Acrobat Distiller 5.0.5 (Windows) RT&amp;VF - Director PScript5.dll Version 5.2 Microsoft Word - .ndice.doc /MT82/MT101/MT108/MT97/MT116/MT243/MT114/MT105/MT111/MT32/MT73/MT110/MT116/MT101/MT114/MT118/MT101/MT110/MT231/MT227/MT111/MT32/MT65/MT114/MT113/MT117/MT101/MT111/MT108/MT243/MT103/MT105/MT99/MT97 /MT77/MT111/MT115/MT116/MT101/MT105/MT114/MT111/MT32/MT100/MT101/MT32/MT76/MT111/MT110/MT103/MT111/MT115/MT32/MT86/MT97/MT108/MT101/MT115 /MT77/MT111/MT110/MT231/MT227/MT111 /MT50/MT48/MT48/MT50 Índice 1. Introdução …………1 2. Informação Histórica Sobre o Local …………2 3. A Intervenção Arqueológica …………9 3.1. Objectivos e Metodologia …………. 9 3.2 Sondagens Arqueológicas …………11 3.2.1. Sondagem 1 …………12 3.2.1.1. A Estratigrafia Observada …………12 3.2.1.2. Matriz Estratigráfica …………17 3.2.1.3. Descrição das Unidades Estratigráficas …………18 3.2.1.4. O Espólio …………20 3.2.2. Sondagem 2 …………27 3.2.2.1. A Estratigrafia Observada …………27 3.2.2.2. Matriz Estratigráfic...</text:p>
          </table:table-cell>
          <table:table-cell table:number-columns-repeated="1015"/>
        </table:table-row>
        <table:table-row table:style-name="ro1">
          <table:table-cell office:value-type="string">
            <text:p>008_Vila_Real_PP-CH.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bibliografia / artigo / publicação. Foram analisadas as primeiras 4 página(s) de um total de 20. Pistas usadas: bibliografia, referências, referencias.</text:p>
          </table:table-cell>
          <table:table-cell office:value-type="string">
            <text:p>bibliografia, referências, referencias</text:p>
          </table:table-cell>
          <table:table-cell office:value-type="string">
            <text:p>Assinatura PDF</text:p>
          </table:table-cell>
          <table:table-cell office:value-type="string">
            <text:p>D:20060822153706+01'00' D:20060822153706+01'00' Acrobat Distiller 5.0.5 (Windows) RT&amp;VF - Utilizador PScript5.dll Version 5.2.2 Microsoft Word - ARQUEOLOGIA CENTRO HISTÓRICO.doc 1 / 20 POLIS-VILA REAL PLANO DE PORMENOR DO CENTRO HISTÓRICO ESTUDO SECTORIAL DE ARQUEOLOGIA 2 / 20 POLIS-VILA REAL PLANO DE PORMENOR DO CENTRO HISTÓRICO ESTUDO SECTORIAL DE ARQUEOLOGIA 1. INTRODUÇÃO 2. CARACTERIZAÇÃO HISTORICO-ARQUEOLÓGICA 2.1. ELEMENTOS DA EVOLUÇÃO URBANA 2.2. IMÓVEIS CLASSIFICADOS 2.3. IMÓVEIS, NÃO CLASSIFICADOS, COM ELEMENTOS ARQUITECTÓNICOS ATÉ AO SÉC. XVI 2.4. OUTROS ELEMENTOS OU ÁREAS SENSÍVEIS DO PONTO DE VISTA ARQUEOLÓGICO 3. PROPOSTA 3.1. FUNDAMENTAÇÃO DA PROPOSTA 3.2. REGULAMENTO 4. BIBLIOGRAFIA 5. ANEXOS 5.1. PLANTA DE CARACTERIZAÇÃO 5.2. PLANTA DE PROPOSTA 3 / 20 POLIS-VILA REAL PLANO DE PORMENOR DO CENTRO HISTÓRICO ESTUDO SECTORIAL DE ARQUEOLOGIA 1. INTRODUÇÃO O objectivo essencial deste estudo visou a caracterização geral, do ponto de vista arqueológico, da área abrangida pelo Pl...</text:p>
          </table:table-cell>
          <table:table-cell table:number-columns-repeated="1015"/>
        </table:table-row>
        <table:table-row table:style-name="ro1">
          <table:table-cell office:value-type="string">
            <text:p>009_IA_MJD.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projecto, intervenção arqueológica, intervencao arqueologica, acompanhamento arqueológico, acompanhamento arqueologico, sondagem, sondagens.</text:p>
          </table:table-cell>
          <table:table-cell office:value-type="string">
            <text:p>relatório, relatorio, projecto, intervenção arqueológica, intervencao arqueologica, acompanhamento arqueológico, acompanhamento arqueologico, sondagem, sondagens</text:p>
          </table:table-cell>
          <table:table-cell office:value-type="string">
            <text:p>Assinatura PDF</text:p>
          </table:table-cell>
          <table:table-cell office:value-type="string">
            <text:p>D:20040302161043Z D:20040302175005Z Acrobat Distiller 5.0.5 (Windows) RT&amp;VF - Director PScript5.dll Version 5.2 Capa.FH10 /MT82/MT101/MT108/MT97/MT116/MT243/MT114/MT105/MT111/MT32/MT65/MT99/MT111/MT109/MT112/MT97/MT110/MT104/MT97/MT109/MT101/MT110/MT116/MT111/MT32/MT65/MT114/MT113/MT117/MT101/MT111/MT108/MT243/MT103/MT105/MT99/MT111 /MT77/MT97/MT116/MT101/MT114/MT110/MT105/MT100/MT97/MT100/MT101/MT32/MT74/MT250/MT108/MT105/MT111/MT32/MT68/MT105/MT110/MT105/MT115 /MT77/MT97/MT115/MT115/MT97/MT114/MT101/MT108/MT111/MT115/MT32/MT45/MT32/MT80/MT111/MT114/MT116/MT111 /MT50/MT48/MT48/MT50 1 / 55 Índice 1. Introdução.................................................................................................................. ....................................................................................2 2. Localização e Informação Histórica sobre o Local ............................................................................ ........................................................</text:p>
          </table:table-cell>
          <table:table-cell table:number-columns-repeated="1015"/>
        </table:table-row>
        <table:table-row table:style-name="ro1">
          <table:table-cell office:value-type="string">
            <text:p>010_IA_NVP_02_601.pdf</text:p>
          </table:table-cell>
          <table:table-cell office:value-type="string">
            <text:p>.pdf</text:p>
          </table:table-cell>
          <table:table-cell office:value-type="string">
            <text:p>Documento PDF</text:p>
          </table:table-cell>
          <table:table-cell office:value-type="string">
            <text:p>Relatório de projeto / intervenção arqueológica / Lista / inventário de espólio</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73. Pistas usadas: relatório, relatorio, intervenção arqueológica, intervencao arqueologica, acompanhamento arqueológico, acompanhamento arqueologico, espólio, espolio, materiais arqueológicos, materiais arqueologicos, fragmentos, contexto.</text:p>
          </table:table-cell>
          <table:table-cell office:value-type="string">
            <text:p>relatório, relatorio, intervenção arqueológica, intervencao arqueologica, acompanhamento arqueológico, acompanhamento arqueologico, espólio, espolio, materiais arqueológicos, materiais arqueologicos, fragmentos, contexto</text:p>
          </table:table-cell>
          <table:table-cell office:value-type="string">
            <text:p>Assinatura PDF</text:p>
          </table:table-cell>
          <table:table-cell office:value-type="string">
            <text:p>D:20040302141548Z D:20060822150608+01'00' Acrobat Distiller 5.0.5 (Windows) RT&amp;VF - Director PScript5.dll Version 5.2 Microsoft Word - RELAT.RIO VISABEIRA 05 02 2004.doc /MT82/MT101/MT108/MT97/MT116/MT243/MT114/MT105/MT111 /MT65/MT99/MT111/MT109/MT112/MT97/MT110/MT104/MT97/MT109/MT101/MT110/MT116/MT111/MT32/MT65/MT114/MT113/MT117/MT101/MT111/MT108/MT243/MT103/MT105/MT99/MT111 /MT82/MT117/MT97/MT32/MT100/MT101/MT32/MT83/MT227/MT111/MT32/MT74/MT111/MT227/MT111 /MT80/MT225/MT116/MT105/MT111/MT32/MT100/MT101/MT32/MT83/MT227/MT111/MT32/MT83/MT97/MT108/MT118/MT97/MT100/MT111/MT114 /MT82/MT117/MT97/MT32/MT77/MT111/MT117/MT122/MT105/MT110/MT104/MT111/MT32/MT100/MT97/MT32/MT83/MT105/MT108/MT118/MT101/MT105/MT114/MT97 /MT82/MT117/MT97/MT32/MT67/MT108/MT117/MT98/MT101/MT32/MT70/MT108/MT117/MT118/MT105/MT97/MT108/MT32/MT80/MT111/MT114/MT116/MT117/MT101/MT110/MT115/MT101 /MT80/MT111/MT114/MT116/MT111 /MT50/MT48/MT48/MT50 1 / 34 Índice 1. Introdução......................................................</text:p>
          </table:table-cell>
          <table:table-cell table:number-columns-repeated="1015"/>
        </table:table-row>
        <table:table-row table:style-name="ro1">
          <table:table-cell office:value-type="string">
            <text:p>011_IA_FMS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0. Pistas usadas: relatório, relatorio, relatório final, relatorio final, projecto, acompanhamento arqueológico, acompanhamento arqueologico, escavação, escavacao, sondagens, trabalhos arqueológicos, trabalhos arqueologicos.</text:p>
          </table:table-cell>
          <table:table-cell office:value-type="string">
            <text:p>relatório, relatorio, relatório final, relatorio final, projecto,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31203163907Z D:20040301152007Z Acrobat Distiller 5.0.5 (Windows) RT&amp;VF - Utilizador PScript5.dll Version 5.2 Microsoft Word - relatorio final.doc /MT82/MT101/MT108/MT97/MT116/MT243/MT114/MT105/MT111/MT32/MT47/MT32/MT73/MT110/MT102/MT111/MT114/MT109/MT97/MT231/MT227/MT111/MT32/MT80/MT114/MT101/MT108/MT105/MT109/MT105/MT110/MT97/MT114 /MT84/MT114/MT97/MT98/MT97/MT108/MT104/MT111/MT115/MT32/MT65/MT114/MT113/MT117/MT101/MT111/MT108/MT243/MT103/MT105/MT99/MT111/MT115 /MT32/MT110/MT111/MT32/MT226/MT109/MT98/MT105/MT116/MT111/MT32/MT100/MT97/MT32/MT67/MT111/MT110/MT115/MT116/MT114/MT117/MT231/MT227/MT111 /MT100/MT111/MT32/MT67/MT111/MT109/MT112/MT108/MT101/MT120/MT111/MT32/MT73/MT109/MT111/MT98/MT105/MT108/MT105/MT225/MT114/MT105/MT111/MT32/MT110/MT97/MT32/MT225/MT114/MT101/MT97/MT32/MT100/MT97 /MT82/MT101/MT102/MT105/MT110/MT97/MT114/MT105/MT97/MT32/MT47/MT32/MT70/MT225/MT98/MT114/MT105/MT99/MT97/MT32/MT100/MT101/MT32/MT67/MT101/MT114/MT226/MT109/MT105/MT99/MT97/MT32/MT100/MT101/MT32/MT...</text:p>
          </table:table-cell>
          <table:table-cell table:number-columns-repeated="1015"/>
        </table:table-row>
        <table:table-row table:style-name="ro1">
          <table:table-cell office:value-type="string">
            <text:p>012_Bolhao.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Alta</text:p>
          </table:table-cell>
          <table:table-cell office:value-type="string">
            <text:p>Documento PDF; o conteúdo aparenta corresponder a tabela / base de dados / desenho / planta / cad. Foram analisadas as primeiras 4 página(s) de um total de 112. Pistas usadas: data, observações, observacoes, estado, planta, implantação, implantacao.</text:p>
          </table:table-cell>
          <table:table-cell office:value-type="string">
            <text:p>data, observações, observacoes, estado, planta, implantação, implantacao</text:p>
          </table:table-cell>
          <table:table-cell office:value-type="string">
            <text:p>Assinatura PDF</text:p>
          </table:table-cell>
          <table:table-cell office:value-type="string">
            <text:p>D:20031229223920Z D:20040301153346Z Acrobat Distiller 5.0.5 (Windows) RT&amp;VF - Director PScript5.dll Version 5.2 Microsoft Word - FINAL 2.doc TRANSMETRO ESTUDO PATRIMONIAL DE PORMENOR DA FRENTE DE OBRA DA ESTAÇÃO DO BOLHÃO ESTUDO PATRIMONIAL DE PORMENOR DA FRENTE DE OBRA DA ESTAÇÃO DO BOLHÃO ÍNDICE 1. ENQUADRAMENTO GERA L NO PROCESSO DE EVOLUÇÃO URBANA DO PORTO 1.1. Das origens até à época Almadina.......................................................................... 1 1.2. Os Almadas................................................................................................................ 2 1.3. Século XIX.................................................................................................................. 3 2. URBANIZAÇÃO E PROJECTOS DA ÁREA DA FRENTE DE OBRA DA ESTAÇÃO DO BOLHÃO 2.1. Rua de Santa Catarina ............................................................................................. 4 2.2. Rua Fernandes Tomás ..........................................</text:p>
          </table:table-cell>
          <table:table-cell table:number-columns-repeated="1015"/>
        </table:table-row>
        <table:table-row table:style-name="ro1">
          <table:table-cell office:value-type="string">
            <text:p>012_REST_rel_int.pdf</text:p>
          </table:table-cell>
          <table:table-cell office:value-type="string">
            <text:p>.pdf</text:p>
          </table:table-cell>
          <table:table-cell office:value-type="string">
            <text:p>Documento PDF</text:p>
          </table:table-cell>
          <table:table-cell office:value-type="string">
            <text:p>Relatório de projeto</text:p>
          </table:table-cell>
          <table:table-cell office:value-type="string">
            <text:p>Alta</text:p>
          </table:table-cell>
          <table:table-cell office:value-type="string">
            <text:p>Documento PDF; o conteúdo aparenta corresponder a tabela / base de dados / fotografia / registo fotográfico. Foram analisadas as primeiras 4 página(s) de um total de 74. Pistas usadas: tabela, registo, registos, estado, fotografias, registo fotográfico, registo fotografico.</text:p>
          </table:table-cell>
          <table:table-cell office:value-type="string">
            <text:p>tabela, registo, registos, estado, fotografias, registo fotográfico, registo fotografico</text:p>
          </table:table-cell>
          <table:table-cell office:value-type="string">
            <text:p>Assinatura PDF</text:p>
          </table:table-cell>
          <table:table-cell office:value-type="string">
            <text:p>D:20070302110507Z D:20070306160914Z Acrobat Distiller 5.0.5 (Windows) anpaulo PScript5.dll Version 5.2.2 Capa relatorio.FH10 /MT82/MT69/MT76/MT65/MT84/MT211/MT82/MT73/MT79 /MT80/MT79/MT82/MT84/MT79/MT32/MT45/MT32/MT50/MT48/MT48/MT53 /MT73/MT78/MT84/MT69/MT82/MT86/MT69/MT78/MT199/MT195/MT79/MT32/MT68/MT69/MT32/MT67/MT79/MT78/MT83/MT69/MT82/MT86/MT65/MT199/MT195/MT79 /MT69/MT32/MT82/MT69/MT83/MT84/MT65/MT85/MT82/MT79/MT32/MT68/MT65/MT32/MT67/MT65/MT80/MT69/MT76/MT65/MT32/MT68/MT65/MT83/MT32/MT65/MT76/MT77/MT65/MT83 Intervenção de Conservação e Restauro – Capela das Almas 1 de 17 INDICE 1. Introdução............................................................................................................................... ............................................ 2 2. Processo de Tratamento ............................................................................................................................... ................ 3 2.1. Levantamento Gráfico e Fotográfico ...........</text:p>
          </table:table-cell>
          <table:table-cell table:number-columns-repeated="1015"/>
        </table:table-row>
        <table:table-row table:style-name="ro1">
          <table:table-cell office:value-type="string">
            <text:p>013_IA_M_VLL_60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 Pistas usadas: relatório, relatorio, projecto, intervenção arqueológica, intervencao arqueologica, trabalhos arqueológicos, trabalhos arqueologicos.</text:p>
          </table:table-cell>
          <table:table-cell office:value-type="string">
            <text:p>relatório, relatorio, projecto, intervenção arqueológica, intervencao arqueologica, trabalhos arqueológicos, trabalhos arqueologicos</text:p>
          </table:table-cell>
          <table:table-cell office:value-type="string">
            <text:p>Assinatura PDF</text:p>
          </table:table-cell>
          <table:table-cell office:value-type="string">
            <text:p>D:20060822140749Z D:20060822151156+01'00' Acrobat Distiller 5.0.5 (Windows) RT&amp;VF - Utilizador PScript5.dll Version 5.2.2 Microsoft Word - RELAT.RIO.doc RELATÓRIO INTERVENÇÃO ARQUEOLÓGICA “LUGAR DO MOSTEIRO” – VILELA - PAREDES RELATÓRIO INTERVENÇÃO ARQUEOLÓGICA “LUGAR DO MOSTEIRO” – VILELA - PAREDES ÍNDICE 1. INTRODUÇÃO ........................................................................................................................ 1 2. METODOLOGIA ..................................................................................................................... 4 3. ESTRATIGRAFIA OBSERVADA ............................................................................................6 4. RELAÇÕES ESTRATIGRÁFICAS ........................................................................................19 5. ESPÓLIO................................................................................................................................ 20 6. CONCLUSÕES PRELIMINARES E PARECERES...</text:p>
          </table:table-cell>
          <table:table-cell table:number-columns-repeated="1015"/>
        </table:table-row>
        <table:table-row table:style-name="ro1">
          <table:table-cell office:value-type="string">
            <text:p>014_S_Domingos.pdf</text:p>
          </table:table-cell>
          <table:table-cell office:value-type="string">
            <text:p>.pdf</text:p>
          </table:table-cell>
          <table:table-cell office:value-type="string">
            <text:p>Documento PDF</text:p>
          </table:table-cell>
          <table:table-cell office:value-type="string">
            <text:p>Relatório de projeto / intervenção arqueológica / Tabela / base de dados</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105. Pistas usadas: relatório, relatorio, memória descritiva, memoria descritiva, registos, data, descrição, descricao.</text:p>
          </table:table-cell>
          <table:table-cell office:value-type="string">
            <text:p>relatório, relatorio, memória descritiva, memoria descritiva, registos, data, descrição, descricao</text:p>
          </table:table-cell>
          <table:table-cell office:value-type="string">
            <text:p>Assinatura PDF</text:p>
          </table:table-cell>
          <table:table-cell office:value-type="string">
            <text:p>D:20031203113801Z D:20040517181540+01'00' Acrobat Distiller 5.0.5 (Windows) RT&amp;VF - Utilizador PScript5.dll Version 5.2 capa.FH10 /MT76/MT101/MT118/MT97/MT110/MT116/MT97/MT109/MT101/MT110/MT116/MT111/MT32/MT100/MT101/MT32/MT83/MT105/MT108/MT104/MT97/MT114/MT101/MT115/MT32/MT83/MT105/MT103/MT108/MT97/MT100/MT111/MT115 /MT73/MT103/MT114/MT101/MT106/MT97/MT32/MT100/MT101/MT32/MT83/MT46/MT32/MT68/MT111/MT109/MT105/MT110/MT103/MT111/MT115 /MT86/MT105/MT108/MT97/MT32/MT114/MT101/MT97/MT108 /MT50/MT48/MT48/MT50 1 / 31 Índice 1. Introdução.................................................................................................................. ........................................... 2 2. História e Intervenções no Edifício .................................................................................................................. 3 3. Metodologia ......................................................................................................................................</text:p>
          </table:table-cell>
          <table:table-cell table:number-columns-repeated="1015"/>
        </table:table-row>
        <table:table-row table:style-name="ro1">
          <table:table-cell office:value-type="string">
            <text:p>016_REST_S_Bento.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desenho / planta / cad / relatório de projeto / intervenção arqueológica. Foram analisadas as primeiras 4 página(s) de um total de 16. Pistas usadas: alçado, alcado, levantamento, relatório, relatorio.</text:p>
          </table:table-cell>
          <table:table-cell office:value-type="string">
            <text:p>alçado, alcado, levantamento, relatório, relatorio</text:p>
          </table:table-cell>
          <table:table-cell office:value-type="string">
            <text:p>Assinatura PDF</text:p>
          </table:table-cell>
          <table:table-cell office:value-type="string">
            <text:p>D:20031230190016Z00'00' D:20031230190016Z00'00' Acrobat Distiller 5.0.5 (Windows) RT&amp;VF - Utilizador PScript5.dll Version 5.2 Microsoft Word - relatório.doc 1 / 16 TRANSMETRO LEVANTAMENTO DE REFERÊNCIA DO ESTADO DE CONSERVAÇÃO DOS PAINÉIS AZULEJARES DO ÁTRIO DA ESTAÇÃO DE S. BENTO, PORTO 1. INTRODUÇÃO O presente documento visa responder à solicitação feita pela Transmetro no sentido da elaboração de um plano de intervenção para os painéis azulejares do átrio da Estação de S. Bento, com o objectivo de caracterizar e registar o seu estado de conservação tendo em vista a implementação de uma monitorização específica e apontar medidas preventivas que reduzam o eventual impacto que a obra do Metro possa ter sobre os mesmos. Servirá também como documento de referência para qualquer intervenção que venha a ser necessário realizar em consequência de eventuais efeitos provocados ou imputados às obras do Metro. As conclusões e as medidas propostas neste documento traduzem a análise particular e...</text:p>
          </table:table-cell>
          <table:table-cell table:number-columns-repeated="1015"/>
        </table:table-row>
        <table:table-row table:style-name="ro1">
          <table:table-cell office:value-type="string">
            <text:p>017_Corpo_Guarda.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tabela / base de dados. Foram analisadas as primeiras 4 página(s) de um total de 95. Pistas usadas: observações, observacoes, valor, estado.</text:p>
          </table:table-cell>
          <table:table-cell office:value-type="string">
            <text:p>observações, observacoes, valor, estado</text:p>
          </table:table-cell>
          <table:table-cell office:value-type="string">
            <text:p>Assinatura PDF</text:p>
          </table:table-cell>
          <table:table-cell office:value-type="string">
            <text:p>D:20031229192228Z D:20040301162524Z Acrobat Distiller 5.0.5 (Windows) RT&amp;VF - Director PScript5.dll Version 5.2 Microsoft Word - Relat.rio.doc ESTUDO PATRIMONIAL DE PORMENOR DA FRENTE DE OBRA DA ESTAÇÃO DE S. BENTO - RUA CORPO DA GUARDA PORTO 2003 0/24/S/CO/01.09/919/NM/RT/000288/A/01 0/24/S/CO/01.09/919/NM/RT/000288/A/01 1 / 44 INTRODUÇÃO ............................................................................................................................................ 2 1. ENQUADRAMENTO GERAL NO PROCESSO DE EVOLUÇÃO URBANA DO PORTO ................................. 3 2. URBANIZAÇÃO E PROJECTOS DA ÁREA DA FRENTE DE OBRA DA ESTAÇÃO DE S. BENTO – RUA CORPO DA GURDA .................................................................................................................................... 6 2.1. RUA MOUSINHO DA SILVEIRA ....................................................................................................... 6 2.2. RUA DO CORPO DA GUARDA .......................</text:p>
          </table:table-cell>
          <table:table-cell table:number-columns-repeated="1015"/>
        </table:table-row>
        <table:table-row table:style-name="ro1">
          <table:table-cell office:value-type="string">
            <text:p>018_Casa_do_Poc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9.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302145453Z D:20091013101606+01'00' RELATÓRIO LAMEGO - 2002 INTERVENÇÃO ARQUEOLÓGICA NA CASA DO POÇO Intervenção Arqueológica na Casa do Poço – Lamego FICHA TÉCNICA COORDENAÇÃO GERAL Ricardo Teixeira, Arqueólogo, Mestre em Arqueologia Vítor Fonseca, Arqueólogo COORDENAÇÃO DE PROJECTO Ricardo Teixeira TRABALHO DE CAMPO Direcção, Escavação e Registos Miguel Marques e Fátima Marques TRABALHO DE GABINETE Relatório Fátima Marques, Miguel Marques, Ricardo Teixeira, Teresa Silva Desenho Gráfico Ana Paulo Fotografia de Espólio Sara Costa, Teresa Silva Revisão Liliana Barbosa MOSTRA MUSEOLÓGICA Concepção Ricardo Teixeira Apoio técnico, selecção e gestão de informação Teresa Silva CONSERVAÇÃO E RESTAURO Coordenação Anabela Hipólito Execução Anabela Hipólito e Sónia Santos (tratamento de metais e cerâmica) Anabela Rodrigues (pesquisa) Bruno Silva (tratamento de material pétreo) DATA Setembro de 2009 Relatório Final Setembro de 2009 Página 1 de 69 Intervenção Arqueológica na Casa do Poço – L...</text:p>
          </table:table-cell>
          <table:table-cell table:number-columns-repeated="1015"/>
        </table:table-row>
        <table:table-row table:style-name="ro1">
          <table:table-cell office:value-type="string">
            <text:p>018_IA_CPC.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9.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302145453Z D:20091013101606+01'00' RELATÓRIO LAMEGO - 2002 INTERVENÇÃO ARQUEOLÓGICA NA CASA DO POÇO Intervenção Arqueológica na Casa do Poço – Lamego FICHA TÉCNICA COORDENAÇÃO GERAL Ricardo Teixeira, Arqueólogo, Mestre em Arqueologia Vítor Fonseca, Arqueólogo COORDENAÇÃO DE PROJECTO Ricardo Teixeira TRABALHO DE CAMPO Direcção, Escavação e Registos Miguel Marques e Fátima Marques TRABALHO DE GABINETE Relatório Fátima Marques, Miguel Marques, Ricardo Teixeira, Teresa Silva Desenho Gráfico Ana Paulo Fotografia de Espólio Sara Costa, Teresa Silva Revisão Liliana Barbosa MOSTRA MUSEOLÓGICA Concepção Ricardo Teixeira Apoio técnico, selecção e gestão de informação Teresa Silva CONSERVAÇÃO E RESTAURO Coordenação Anabela Hipólito Execução Anabela Hipólito e Sónia Santos (tratamento de metais e cerâmica) Anabela Rodrigues (pesquisa) Bruno Silva (tratamento de material pétreo) DATA Setembro de 2009 Relatório Final Setembro de 2009 Página 1 de 69 Intervenção Arqueológica na Casa do Poço – L...</text:p>
          </table:table-cell>
          <table:table-cell table:number-columns-repeated="1015"/>
        </table:table-row>
        <table:table-row table:style-name="ro1">
          <table:table-cell office:value-type="string">
            <text:p>019_BD_Espolio_Feira.pdf</text:p>
          </table:table-cell>
          <table:table-cell office:value-type="string">
            <text:p>.pdf</text:p>
          </table:table-cell>
          <table:table-cell office:value-type="string">
            <text:p>Documento PDF</text:p>
          </table:table-cell>
          <table:table-cell office:value-type="string">
            <text:p>Base de Dados</text:p>
          </table:table-cell>
          <table:table-cell office:value-type="string">
            <text:p>Alta</text:p>
          </table:table-cell>
          <table:table-cell office:value-type="string">
            <text:p>Documento PDF; o conteúdo aparenta corresponder a lista / inventário de espólio / relatório de projeto / intervenção arqueológica. Foram analisadas as primeiras 4 página(s) de um total de 115. Pistas usadas: espólio, espolio, inventário, inventario, intervenção arqueológica, intervencao arqueologica, sondagem.</text:p>
          </table:table-cell>
          <table:table-cell office:value-type="string">
            <text:p>espólio, espolio, inventário, inventario, intervenção arqueológica, intervencao arqueologica, sondagem</text:p>
          </table:table-cell>
          <table:table-cell office:value-type="string">
            <text:p>Assinatura PDF</text:p>
          </table:table-cell>
          <table:table-cell office:value-type="string">
            <text:p>D:20040723134228Z D:20040729142529+01'00' Acrobat Distiller 5.0.5 (Windows) RT&amp;VF - Utilizador PScript5.dll Version 5.2 Capa Feira bd.FH10 /MT66/MT97/MT115/MT101/MT32/MT100/MT101/MT32/MT68/MT97/MT100/MT111/MT115/MT32/MT69/MT115/MT112/MT243/MT108/MT105/MT111/MT32/MT77/MT101/MT116/MT225/MT108/MT105/MT99/MT111 /MT32/MT32/MT73/MT110/MT116/MT101/MT114/MT118/MT101/MT110/MT231/MT227/MT111/MT32/MT65/MT114/MT113/MT117/MT101/MT111/MT108/MT243/MT103/MT105/MT99/MT97 /MT67/MT97/MT115/MT116/MT101/MT108/MT111/MT32/MT100/MT101/MT32/MT83/MT97/MT110/MT116/MT97/MT32/MT77/MT97/MT114/MT105/MT97/MT32/MT100/MT97/MT32/MT70/MT101/MT105/MT114/MT97 /MT50/MT48/MT48/MT50/MT47/MT50/MT48/MT48/MT51 Intervenção Arqueológica no Castelo da Feira – Santa Maria da Feira B ASE DE DADOS DE ESPÓLIO METÁLICO NUMISMÁTICA OBJECTOS DE ADORNO ARMAS INSTRUMENTOS E UTENSÍLIOS Intervenção Arqueológica no Castelo da Feira – Santa Maria da Feira NUMISMÁTICA NUMISMÁTICA PROVENIÊNCIA CONSERVAÇÃO INFORMAÇÃO TÉCNICA Bibliografia Deficient...</text:p>
          </table:table-cell>
          <table:table-cell table:number-columns-repeated="1015"/>
        </table:table-row>
        <table:table-row table:style-name="ro1">
          <table:table-cell office:value-type="string">
            <text:p>019_Feir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9.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611143216Z teresasilva PScript5.dll Version 5.2 Acrobat Distiller 5.0.5 (Windows) D:20070622142858+01'00' Microsoft Word - 019 Rel Fin.doc /MT82/MT69/MT76/MT65/MT84/MT211/MT82/MT73/MT79 /MT83/MT97/MT110/MT116/MT97/MT32/MT77/MT97/MT114/MT105/MT97/MT32/MT100/MT97/MT32/MT70/MT101/MT105/MT114/MT97/MT32/MT45/MT32/MT50/MT48/MT48/MT53/MT32/MT47/MT32/MT50/MT48/MT48/MT54 /MT73/MT78/MT84/MT69/MT82/MT86/MT69/MT78/MT199/MT195/MT79/MT32/MT65/MT82/MT81/MT85/MT69/MT79/MT76/MT211/MT71/MT73/MT67/MT79/MT83/MT65/MT32/MT78/MT79/MT32/MT194/MT77/MT66/MT73/MT84/MT79/MT32/MT68/MT79 /MT147/MT80/MT82/MT79/MT74/MT69/MT67/MT84/MT79/MT32/MT68/MT69/MT32/MT82/MT69/MT81/MT85/MT65/MT76/MT73/MT70/MT73/MT67/MT65/MT199/MT195/MT79/MT32/MT69/MT32/MT82/MT69/MT77/MT79/MT68/MT69/MT76/MT65/MT199/MT195/MT79/MT32/MT68/MT65 /MT84/MT79/MT82/MT82/MT69/MT32/MT68/MT69/MT32/MT77/MT69/MT78/MT65/MT71/MT69/MT77/MT32/MT68/MT79/MT32/MT67/MT65/MT83/MT84/MT69/MT76/MT79/MT32/MT68/MT69/MT32/MT83/MT65/MT78/MT84/MT65/MT32/MT77/MT65/MT82/M...</text:p>
          </table:table-cell>
          <table:table-cell table:number-columns-repeated="1015"/>
        </table:table-row>
        <table:table-row table:style-name="ro1">
          <table:table-cell office:value-type="string">
            <text:p>019_IA_CSF_2002_0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0.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40728150926Z D:20040729142423+01'00' Acrobat Distiller 5.0.5 (Windows) RT&amp;VF-Utilizador PScript5.dll Version 5.2 Microsoft Word - Feira Rel Fin.doc /MT82/MT101/MT108/MT97/MT116/MT243/MT114/MT105/MT111 /MT32/MT32/MT73/MT110/MT116/MT101/MT114/MT118/MT101/MT110/MT231/MT227/MT111/MT32/MT65/MT114/MT113/MT117/MT101/MT111/MT108/MT243/MT103/MT105/MT99/MT97 /MT67/MT97/MT115/MT116/MT101/MT108/MT111/MT32/MT100/MT101/MT32/MT83/MT97/MT110/MT116/MT97/MT32/MT77/MT97/MT114/MT105/MT97/MT32/MT100/MT97/MT32/MT70/MT101/MT105/MT114/MT97 /MT50/MT48/MT48/MT50/MT47/MT50/MT48/MT48/MT51 Intervenção Arqueológica no Castelo da Feira – Santa Maria da Feira 1 / 79 Índice 1. Introdução ............................................................................................................................................3 1.1. Localização ........................................................................................................................................4 1.2. Enquadramento Histórico ........</text:p>
          </table:table-cell>
          <table:table-cell table:number-columns-repeated="1015"/>
        </table:table-row>
        <table:table-row table:style-name="ro1">
          <table:table-cell office:value-type="string">
            <text:p>019_Rel_Feira_2005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9.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611143216Z teresasilva PScript5.dll Version 5.2 Acrobat Distiller 5.0.5 (Windows) D:20070622142858+01'00' Microsoft Word - 019 Rel Fin.doc /MT82/MT69/MT76/MT65/MT84/MT211/MT82/MT73/MT79 /MT83/MT97/MT110/MT116/MT97/MT32/MT77/MT97/MT114/MT105/MT97/MT32/MT100/MT97/MT32/MT70/MT101/MT105/MT114/MT97/MT32/MT45/MT32/MT50/MT48/MT48/MT53/MT32/MT47/MT32/MT50/MT48/MT48/MT54 /MT73/MT78/MT84/MT69/MT82/MT86/MT69/MT78/MT199/MT195/MT79/MT32/MT65/MT82/MT81/MT85/MT69/MT79/MT76/MT211/MT71/MT73/MT67/MT79/MT83/MT65/MT32/MT78/MT79/MT32/MT194/MT77/MT66/MT73/MT84/MT79/MT32/MT68/MT79 /MT147/MT80/MT82/MT79/MT74/MT69/MT67/MT84/MT79/MT32/MT68/MT69/MT32/MT82/MT69/MT81/MT85/MT65/MT76/MT73/MT70/MT73/MT67/MT65/MT199/MT195/MT79/MT32/MT69/MT32/MT82/MT69/MT77/MT79/MT68/MT69/MT76/MT65/MT199/MT195/MT79/MT32/MT68/MT65 /MT84/MT79/MT82/MT82/MT69/MT32/MT68/MT69/MT32/MT77/MT69/MT78/MT65/MT71/MT69/MT77/MT32/MT68/MT79/MT32/MT67/MT65/MT83/MT84/MT69/MT76/MT79/MT32/MT68/MT69/MT32/MT83/MT65/MT78/MT84/MT65/MT32/MT77/MT65/MT82/M...</text:p>
          </table:table-cell>
          <table:table-cell table:number-columns-repeated="1015"/>
        </table:table-row>
        <table:table-row table:style-name="ro1">
          <table:table-cell office:value-type="string">
            <text:p>019_sinalectic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 desenho / planta / cad. Foram analisadas as primeiras 4 página(s) de um total de 58. Pistas usadas: projecto, trabalhos arqueológicos, trabalhos arqueologicos, desenho, implantação, implantacao.</text:p>
          </table:table-cell>
          <table:table-cell office:value-type="string">
            <text:p>projecto, trabalhos arqueológicos, trabalhos arqueologicos, desenho, implantação, implantacao</text:p>
          </table:table-cell>
          <table:table-cell office:value-type="string">
            <text:p>Assinatura PDF</text:p>
          </table:table-cell>
          <table:table-cell office:value-type="string">
            <text:p>Ricardo Teixeira Writer OpenOffice.org 1.9.130 D:20070606100453+01'00' D:20070614110921+01'00' CASTELO DE SANTA MARIA DA FEIRA PLANO DE SINALÉTICA, 2007 Ficha técnica COORDENAÇÃO: Ricardo Teixeira Vítor Fonseca CONCEPÇÃO E TEXTO: Ricardo Teixeira DESENHO FREHAND: Ricardo Teixeira Ana Paulo BASE DE DADOS DE PEÇAS: Ricardo Teixeira Jorge Fonseca Teresa Silva FOTOGRAFIA DE PEÇAS: Ricardo Teixeira Jorge Fonseca REGISTO PEÇAS EM CAMPO: Jorge Fonseca Verónica Biscaia DATA: Porto, 6 de Junho de 2007 1. INTRODUÇÃO Na sequência das recentes obras de remodelação realizadas no Monumento, o presente Plano de Sinalética inscreve-se no intuito da Comissão de Vigilância do Castelo de Santa Maria da Feira em dotar o castelo de melhores condições de visita, articulando-se também com outros instrumentos que estarão disponíveis para o visitante, como o desdobrável de distribuição gratuita e o video que será visionado no piso térreo da Torre / Alcáçova. O estudo implicou uma primeira fase de avaliação e d...</text:p>
          </table:table-cell>
          <table:table-cell table:number-columns-repeated="1015"/>
        </table:table-row>
        <table:table-row table:style-name="ro1">
          <table:table-cell office:value-type="string">
            <text:p>020_Ancede 200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1. Pistas usadas: relatório, relatorio, relatório final, relatorio final, projecto, intervenção arqueológica, intervencao arqueologica, escavação, escavacao, sondagem, sondagens, plano de trabalhos.</text:p>
          </table:table-cell>
          <table:table-cell office:value-type="string">
            <text:p>relatório, relatorio, relatório final, relatorio final, projecto, intervenção arqueológica, intervencao arqueologica, escavação, escavacao, sondagem, sondagens, plano de trabalhos</text:p>
          </table:table-cell>
          <table:table-cell office:value-type="string">
            <text:p>Assinatura PDF</text:p>
          </table:table-cell>
          <table:table-cell office:value-type="string">
            <text:p>D:20081217105949Z joanaborges Adobe Acrobat 8.1 Combine Files Adobe Acrobat 8.1 D:20081218114617Z IPA trabalhos arqueologicos remodelaÃ§Ã£o.jpg RELATÓRIO BAIÃO - 2005 TRABALHOS ARQUEOLÓGICOS NA CASA DO CASEIRO E DO BEIRAL DO MOSTEIRO DE SANTO ANDRÉ DE ANCÊDE Trabalhos Arqueológicos na Casa do Caseiro e do Beiral do Mosteiro de Santo André de Ancêde - Baião FICHA TÉCNICA COORDENAÇÃO GERAL Ricardo Teixeira, Mestre em Arqueologia Vítor Fonseca, Arqueólogo TRABALHO DE CAMPO REGISTO DE EDIFICADO Teresa Silva e César Guedes LEVANTAMENTO TOPOGRÁFICO Pedro Mendes, arquitectos SONDAGENS ARQUEOLÓGICAS Direcção Ana Maria Oliveira, Arqueóloga Arqueólogos César Guedes, Arqueólogo Desenho Ana Maria Oliveira, César Guedes TRABALHO DE GABINETE Relatório sondagens arqueológicas Ana Maria Oliveira Estudo de edificado Teresa Silva Desenho Gráfico Ana Paulo Tratamento de Espólio Teresa Gonçalves Fotografia de Espólio Ana Maria Oliveira Revisão Teresa Silva, Arqueóloga, Pós-graduada em Museologia DATA 17 d...</text:p>
          </table:table-cell>
          <table:table-cell table:number-columns-repeated="1015"/>
        </table:table-row>
        <table:table-row table:style-name="ro1">
          <table:table-cell office:value-type="string">
            <text:p>020_IA_M ANC 200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6. Pistas usadas: intervenção arqueológica, intervencao arqueologica, escavação, escavacao, sondagem, sondagens.</text:p>
          </table:table-cell>
          <table:table-cell office:value-type="string">
            <text:p>intervenção arqueológica, intervencao arqueologica, escavação, escavacao, sondagem, sondagens</text:p>
          </table:table-cell>
          <table:table-cell office:value-type="string">
            <text:p>Assinatura PDF</text:p>
          </table:table-cell>
          <table:table-cell office:value-type="string">
            <text:p>D:20040827145223Z D:20040907141300+01'00' Acrobat Distiller 5.0.5 (Windows) RT&amp;VF - Utilizador PScript5.dll Version 5.2 Microsoft Word - Rel ancede 28 08 2004.doc /MT82/MT69/MT76/MT65/MT84/MT211/MT82/MT73/MT79 /MT73/MT78/MT84/MT69/MT82/MT86/MT69/MT78/MT199/MT195/MT79/MT32/MT65/MT82/MT81/MT85/MT69/MT79/MT76/MT211/MT71/MT73/MT67/MT65 /MT77/MT79/MT83/MT84/MT69/MT73/MT82/MT79/MT32/MT68/MT69/MT32/MT65/MT78/MT67/MT69/MT68/MT69 /MT66/MT65/MT73/MT195/MT79 /MT50/MT48/MT48/MT51 Intervenção Arqueológica no Mosteiro de Ancede - Baião 1 / 43 ÍNDICE 1. Introdução .................................................................................................................................................... 2 2. Localização ................................................................................................................................................... 3 3. Informação Histórica sobre o Local.............................................................................................</text:p>
          </table:table-cell>
          <table:table-cell table:number-columns-repeated="1015"/>
        </table:table-row>
        <table:table-row table:style-name="ro1">
          <table:table-cell office:value-type="string">
            <text:p>020_IA_MANC_200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1. Pistas usadas: relatório, relatorio, relatório final, relatorio final, projecto, intervenção arqueológica, intervencao arqueologica, escavação, escavacao, sondagem, sondagens, plano de trabalhos.</text:p>
          </table:table-cell>
          <table:table-cell office:value-type="string">
            <text:p>relatório, relatorio, relatório final, relatorio final, projecto, intervenção arqueológica, intervencao arqueologica, escavação, escavacao, sondagem, sondagens, plano de trabalhos</text:p>
          </table:table-cell>
          <table:table-cell office:value-type="string">
            <text:p>Assinatura PDF</text:p>
          </table:table-cell>
          <table:table-cell office:value-type="string">
            <text:p>D:20081217105949Z joanaborges Adobe Acrobat 8.1 Combine Files Adobe Acrobat 8.1 D:20081222153943Z IPA trabalhos arqueologicos remodelaÃ§Ã£o.jpg RELATÓRIO BAIÃO - 2005 TRABALHOS ARQUEOLÓGICOS NA CASA DO CASEIRO E DO BEIRAL DO MOSTEIRO DE SANTO ANDRÉ DE ANCÊDE Trabalhos Arqueológicos na Casa do Caseiro e do Beiral do Mosteiro de Santo André de Ancêde - Baião FICHA TÉCNICA COORDENAÇÃO GERAL Ricardo Teixeira, Mestre em Arqueologia Vítor Fonseca, Arqueólogo TRABALHO DE CAMPO REGISTO DE EDIFICADO Teresa Silva e César Guedes LEVANTAMENTO TOPOGRÁFICO Pedro Mendes, arquitectos SONDAGENS ARQUEOLÓGICAS Direcção Ana Maria Oliveira, Arqueóloga Arqueólogos César Guedes, Arqueólogo Desenho Ana Maria Oliveira, César Guedes TRABALHO DE GABINETE Relatório sondagens arqueológicas Ana Maria Oliveira Estudo de edificado Teresa Silva Desenho Gráfico Ana Paulo Tratamento de Espólio Teresa Gonçalves Fotografia de Espólio Ana Maria Oliveira Revisão Teresa Silva, Arqueóloga, Pós-graduada em Museologia DATA 17 d...</text:p>
          </table:table-cell>
          <table:table-cell table:number-columns-repeated="1015"/>
        </table:table-row>
        <table:table-row table:style-name="ro1">
          <table:table-cell office:value-type="string">
            <text:p>021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022_EIA_Guimara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projecto, acompanhamento arqueológico, acompanhamento arqueologico, prospecção, prospeccao.</text:p>
          </table:table-cell>
          <table:table-cell office:value-type="string">
            <text:p>relatório, relatorio, projecto, acompanhamento arqueológico, acompanhamento arqueologico, prospecção, prospeccao</text:p>
          </table:table-cell>
          <table:table-cell office:value-type="string">
            <text:p>Assinatura PDF</text:p>
          </table:table-cell>
          <table:table-cell office:value-type="string">
            <text:p>D:20030905140745Z D:20030905154826+01'00' Acrobat Distiller 5.0.5 (Windows) RT&amp;VF - Utilizador PScript5.dll Version 5.2 Microsoft Word - RELAT.RIO ESTRUTURA FINAL novo.d /MT82/MT101/MT108/MT97/MT116/MT243/MT114/MT105/MT111 /MT100/MT97/MT32/MT80/MT114/MT111/MT115/MT112/MT101/MT99/MT231/MT227/MT111/MT32/MT65/MT114/MT113/MT117/MT101/MT111/MT108/MT243/MT103/MT105/MT99/MT97/MT32/MT83/MT105/MT115/MT116/MT101/MT109/MT225/MT116/MT105/MT99/MT97 /MT101/MT32/MT82/MT101/MT97/MT118/MT97/MT108/MT105/MT97/MT231/MT227/MT111/MT32/MT100/MT111/MT115/MT32/MT83/MT237/MT116/MT105/MT111/MT115/MT32/MT47/MT32/MT77/MT111/MT110/MT117/MT109/MT101/MT110/MT116/MT111/MT115 /MT65/MT110/MT116/MT101/MT114/MT105/MT111/MT114/MT109/MT101/MT110/MT116/MT101/MT32/MT82/MT101/MT102/MT101/MT114/MT101/MT110/MT99/MT105/MT97/MT100/MT111/MT115 /MT67/MT111/MT110/MT99/MT101/MT115/MT115/MT227/MT111/MT32/MT78/MT111/MT114/MT116/MT101/MT58 /MT76/MT97/MT110/MT231/MT111/MT58/MT32/MT71/MT117/MT105/MT109/MT97/MT114/MT227/MT101/MT115/MT32/MT7...</text:p>
          </table:table-cell>
          <table:table-cell table:number-columns-repeated="1015"/>
        </table:table-row>
        <table:table-row table:style-name="ro1">
          <table:table-cell office:value-type="string">
            <text:p>023_IA_R_E_MONIZ.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projecto, intervenção arqueológica, intervencao arqueologica, sondagem, sondagens, plano de trabalhos, trabalhos arqueológicos, trabalhos arqueologicos.</text:p>
          </table:table-cell>
          <table:table-cell office:value-type="string">
            <text:p>relatório, relatorio, projecto, intervenção arqueológica, intervencao arqueologica, sondagem, sondagens, plano de trabalhos, trabalhos arqueológicos, trabalhos arqueologicos</text:p>
          </table:table-cell>
          <table:table-cell office:value-type="string">
            <text:p>Assinatura PDF</text:p>
          </table:table-cell>
          <table:table-cell office:value-type="string">
            <text:p>D:20040903112147Z D:20040907144758+01'00' Acrobat Distiller 5.0.5 (Windows) RT&amp;VF - Utilizador PScript5.dll Version 5.2 Microsoft Word - 023 rel 30 08 2004.doc /MT82/MT69/MT76/MT65/MT84/MT211/MT82/MT73/MT79 /MT73/MT78/MT84/MT69/MT82/MT86/MT69/MT78/MT199/MT195/MT79/MT32/MT65/MT82/MT81/MT85/MT69/MT79/MT76/MT211/MT71/MT73/MT67/MT65 /MT82/MT85/MT65/MT32/MT69/MT71/MT65/MT83/MT32/MT77/MT79/MT78/MT73/MT90/MT44/MT32/MT49/MT53/MT45/MT49/MT55 /MT71/MT85/MT73/MT77/MT65/MT82/MT195/MT69/MT83 /MT50/MT48/MT48/MT51 Intervenção Arqueológica na Rua Egaz Moniz 15-17 - Guimarães Pág. 1 de 31 Índice 1. Introdução.................................................................................................................. ............2 2. Localização................................................................................................................. ............3 3. Informação Histórica Sobre o Local ..................................................................................4 3.1. Enq...</text:p>
          </table:table-cell>
          <table:table-cell table:number-columns-repeated="1015"/>
        </table:table-row>
        <table:table-row table:style-name="ro1">
          <table:table-cell office:value-type="string">
            <text:p>025_IA_SCA_311_0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31124135432Z D:20031124142644Z Acrobat Distiller 5.0.5 (Windows) RT&amp;VF - Utilizador PScript5.dll Version 5.2 Microsoft Word - Relat.rio Sta Catatarina 305.doc /MT82/MT101/MT108/MT97/MT116/MT243/MT114/MT105/MT111 /MT65/MT99/MT111/MT109/MT112/MT97/MT110/MT104/MT97/MT109/MT101/MT110/MT116/MT111/MT32/MT65/MT114/MT113/MT117/MT101/MT111/MT108/MT243/MT103/MT105/MT99/MT111 /MT82/MT101/MT109/MT111/MT100/MT101/MT108/MT97/MT231/MT227/MT111/MT32/MT73/MT110/MT116/MT101/MT114/MT105/MT111/MT114/MT32/MT100/MT101/MT32/MT69/MT100/MT105/MT102/MT237/MT99/MT105/MT111 /MT82/MT117/MT97/MT32/MT83/MT97/MT110/MT116/MT97/MT32/MT67/MT97/MT116/MT97/MT114/MT105/MT110/MT97/MT32/MT51/MT48/MT53/MT45/MT51/MT49/MT49/MT44 /MT83/MT97/MT110/MT116/MT111/MT32/MT73/MT108/MT100/MT101/MT102/MT111/MT110/MT115/MT111/MT44/MT32/MT80/MT111/MT114/MT116/MT111 /MT50/MT48/MT48/MT51 1 / 42 Índice 1. INTRODUÇÃO…………………………………………………………………………......2 1.1. LOCALIZAÇÃO E INFORMAÇÃO HISTÓRICA SOBRE O LOCAL…………………………3 1.1.1. Rua de Santa Cata...</text:p>
          </table:table-cell>
          <table:table-cell table:number-columns-repeated="1015"/>
        </table:table-row>
        <table:table-row table:style-name="ro1">
          <table:table-cell office:value-type="string">
            <text:p>026_033_AMR_PCR03_CSG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9. Pistas usadas: relatório, relatorio, projecto, intervenção arqueológica, intervencao arqueologica, acompanhamento arqueológico, acompanhamento arqueologico, escavação, escavacao, sondagem, sondagens, plano de trabalhos.</text:p>
          </table:table-cell>
          <table:table-cell office:value-type="string">
            <text:p>relatório, relatorio, projecto, intervenção arqueológica, intervencao arqueologica, acompanhamento arqueológico, acompanhamento arqueologico, escavação, escavacao, sondagem, sondagens, plano de trabalhos</text:p>
          </table:table-cell>
          <table:table-cell office:value-type="string">
            <text:p>Assinatura PDF</text:p>
          </table:table-cell>
          <table:table-cell office:value-type="string">
            <text:p>D:20180105150036Z Xerox Color C60 D:20200908134207+01'00' Adobe Acrobat Pro 11.0.1 Paper Capture Plug-in RELATÓRIO TRABALHOS ARQUEOLÓGICOS NO ÂMBITO DO ARRANJO URBANÍSTICO DA PRAÇA DA REPÚBLICA E RUA 5 DE OUTUBRO AMARANTE - 2003 / 2004 arqueologia &amp; patri ~~~~'ónic ricardo teixeira &amp; vitor fonseca - arqueologia Ida r:!\ j - "" Intenwr?ío _ 4.rcp1eo!qgim 1w Pra,-a da Rep!Íh!im e R11e1 5 de 011t11hro ricardo teixeira &amp; -.itorfonseca- arqueologia Ida P:lg. 1 ÍNDICE 1. Introdução ............................................................................................................................... 2 2. Enquadramento Urbanístico - Praça da República e Rua 5 de Outubro ...................... 5 3. A Intervenção Arqueológica ................................................................................................. 9 3.1. Metodologia .................................................................................................................... 9 3.2. Trabalhos Arqueológicos...</text:p>
          </table:table-cell>
          <table:table-cell table:number-columns-repeated="1015"/>
        </table:table-row>
        <table:table-row table:style-name="ro1">
          <table:table-cell office:value-type="string">
            <text:p>027_EIA_Cervei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9. Pistas usadas: relatório, relatorio, projecto, acompanhamento arqueológico, acompanhamento arqueologico, sondagem, sondagens, trabalhos arqueológicos, trabalhos arqueologicos.</text:p>
          </table:table-cell>
          <table:table-cell office:value-type="string">
            <text:p>relatório, relatorio, projecto, acompanhamento arqueológico, acompanhamento arqueologico, sondagem, sondagens, trabalhos arqueológicos, trabalhos arqueologicos</text:p>
          </table:table-cell>
          <table:table-cell office:value-type="string">
            <text:p>Assinatura PDF</text:p>
          </table:table-cell>
          <table:table-cell office:value-type="string">
            <text:p>D:20040228192510Z D:20040324192107Z Acrobat Distiller 5.0.5 (Windows) RT&amp;VF - Director PScript5.dll Version 5.2 Microsoft Word - RELAT.RIO FINAL 28 fev.doc /MT82/MT101/MT108/MT97/MT116/MT243/MT114/MT105/MT111/MT32/MT80/MT114/MT111/MT115/MT112/MT101/MT99/MT231/MT227/MT111/MT32/MT65/MT114/MT113/MT117/MT101/MT111/MT108/MT243/MT103/MT105/MT99/MT97 /MT76/MT105/MT103/MT97/MT231/MT245/MT101/MT115/MT32/MT86/MT105/MT225/MT114/MT105/MT97/MT115 /MT32/MT100/MT97/MT32/MT80/MT111/MT110/MT116/MT101/MT32/MT73/MT110/MT116/MT101/MT114/MT110/MT97/MT99/MT105/MT111/MT110/MT97/MT108/MT32/MT67/MT101/MT114/MT118/MT101/MT105/MT114/MT97/MT32/MT47/MT32/MT71/MT111/MT121/MT97/MT110 /MT97/MT32/MT86/MT46/MT32/MT78/MT46/MT32/MT67/MT101/MT114/MT118/MT101/MT105/MT114/MT97/MT32/MT101/MT32/MT224/MT32/MT32/MT69/MT46/MT78/MT46/MT32/MT49/MT51/MT32/MT45/MT32/MT49/MT170/MT32/MT70/MT97/MT115/MT101 /MT86/MT46/MT32/MT78/MT46/MT32/MT67/MT101/MT114/MT118/MT101/MT105/MT114/MT97 /MT50/MT48/MT48/MT52 1 / 18 ÍÍNNDDIICCEE 11.. IINNTTRR...</text:p>
          </table:table-cell>
          <table:table-cell table:number-columns-repeated="1015"/>
        </table:table-row>
        <table:table-row table:style-name="ro1">
          <table:table-cell office:value-type="string">
            <text:p>028_IA_RP244_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40223175351Z D:20040225173955Z Acrobat Distiller 5.0.5 (Windows) RT&amp;VF - Director PScript5.dll Version 5.2 Microsoft Word - RP 244- RELAT.RIO FINAL Novo rev. teresa.doc /MT82/MT101/MT108/MT97/MT116/MT243/MT114/MT105/MT111/MT32/MT73/MT110/MT116/MT101/MT114/MT118/MT101/MT110/MT231/MT227/MT111/MT32/MT65/MT114/MT113/MT117/MT101/MT111/MT108/MT243/MT103/MT105/MT99/MT97 /MT82/MT101/MT109/MT111/MT100/MT101/MT108/MT97/MT231/MT227/MT111/MT32/MT73/MT110/MT116/MT101/MT114/MT105/MT111/MT114/MT32/MT100/MT101/MT32/MT69/MT100/MT105/MT102/MT237/MT99/MT105/MT111 /MT65/MT118/MT101/MT110/MT105/MT100/MT97/MT32/MT82/MT97/MT109/MT111/MT115/MT32/MT80/MT105/MT110/MT116/MT111/MT44/MT32/MT110/MT186/MT32/MT50/MT52/MT52/MT44 /MT83/MT97/MT110/MT116/MT97/MT32/MT77/MT97/MT114/MT105/MT110/MT104/MT97/MT44/MT32/MT86/MT46/MT32/MT78/MT46/MT32/MT71/MT97/MT105/MT97 /MT50/MT48/MT48/MT52 1 / 27 Índice 1. Introdução...............................................................................................................</text:p>
          </table:table-cell>
          <table:table-cell table:number-columns-repeated="1015"/>
        </table:table-row>
        <table:table-row table:style-name="ro1">
          <table:table-cell office:value-type="string">
            <text:p>029_IA_BAT_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99. Pistas usadas: relatório, relatorio, projecto, intervenção arqueológica, intervencao arqueologica, acompanhamento arqueológico, acompanhamento arqueologico, sondagens, trabalhos arqueológicos, trabalhos arqueologicos.</text:p>
          </table:table-cell>
          <table:table-cell office:value-type="string">
            <text:p>relatório, relatorio, projec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office:value-type="string">
            <text:p>D:20051209163005Z D:20051214165445Z Acrobat Distiller 5.0.5 (Windows) RT&amp;VF - Utilizador PScript5.dll Version 5.2 Microsoft Word - BATALHA rel fin teresa.doc /MT82/MT69/MT76/MT65/MT84/MT211/MT82/MT73/MT79 /MT32/MT32/MT73/MT78/MT84/MT69/MT82/MT86/MT69/MT78/MT199/MT195/MT79/MT32/MT65/MT82/MT81/MT85/MT69/MT79/MT76/MT211/MT71/MT73/MT67/MT65 /MT66/MT65/MT84/MT65/MT76/MT72/MT65/MT32/MT82/MT69/MT68/MT69/MT32/MT71/MT193/MT83 /MT66/MT65/MT84/MT32/MT48/MT52 /MT50/MT48/MT48/MT52 Intervenção Arqueológica Batalha Rede Gás – BAT 04 1 / 109 Índice 1. Introdução.................................................................................................................. ...............................................3 1.1. Localização.............................................................................................................................................................4 1.2. Enquadramento Histórico....................................................................................</text:p>
          </table:table-cell>
          <table:table-cell table:number-columns-repeated="1015"/>
        </table:table-row>
        <table:table-row table:style-name="ro1">
          <table:table-cell office:value-type="string">
            <text:p>030_IA_ILVR_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4. Pistas usadas: relatório, relatorio, intervenção arqueológica, intervencao arqueologica, sondagem, sondagens, trabalhos arqueológicos, trabalhos arqueologicos.</text:p>
          </table:table-cell>
          <table:table-cell office:value-type="string">
            <text:p>relatório, relatorio, intervenção arqueológica, intervencao arqueologica, sondagem, sondagens, trabalhos arqueológicos, trabalhos arqueologicos</text:p>
          </table:table-cell>
          <table:table-cell office:value-type="string">
            <text:p>Assinatura PDF</text:p>
          </table:table-cell>
          <table:table-cell office:value-type="string">
            <text:p>D:20051214183905Z D:20051216144910Z Acrobat Distiller 5.0.5 (Windows) RT&amp;VF - Utilizador PScript5.dll Version 5.2.2 Microsoft Word - 030 Relat.rio Teresa.doc /MT82/MT69/MT76/MT65/MT84/MT211/MT82/MT73/MT79 /MT32/MT32/MT73/MT78/MT84/MT69/MT82/MT86/MT69/MT78/MT199/MT195/MT79/MT32/MT65/MT82/MT81/MT85/MT69/MT79/MT76/MT211/MT71/MT73/MT67/MT65 /MT76/MT65/MT86/MT82/MT65/MT32/MT45/MT32/MT73/MT76/MT86/MT82/MT32/MT48/MT52 /MT77/MT65/MT84/MT79/MT83/MT73/MT78/MT72/MT79/MT83 /MT50/MT48/MT48/MT52 1 / 57 Índice 1. Introdução ............................................................................................................................................3 1.1. Localização ........................................................................................................................................4 1.2. Informação Histórico-Arqueológica sobre o Local ....................................................................5 2. Metodologia......................................................</text:p>
          </table:table-cell>
          <table:table-cell table:number-columns-repeated="1015"/>
        </table:table-row>
        <table:table-row table:style-name="ro1">
          <table:table-cell office:value-type="string">
            <text:p>031_IA_Rel_fin_chav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7. Pistas usadas: relatório, relatorio, relatório final, relatorio final, intervenção arqueológica, intervencao arqueologica, acompanhamento arqueológico, acompanhamento arqueologico, sondagem, sondagens.</text:p>
          </table:table-cell>
          <table:table-cell office:value-type="string">
            <text:p>relatório, relatorio, relatório final, relatorio final, intervenção arqueológica, intervencao arqueologica, acompanhamento arqueológico, acompanhamento arqueologico, sondagem, sondagens</text:p>
          </table:table-cell>
          <table:table-cell office:value-type="string">
            <text:p>Assinatura PDF</text:p>
          </table:table-cell>
          <table:table-cell office:value-type="string">
            <text:p>D:20050114183955Z D:20050311121211Z Acrobat Distiller 5.0.5 (Windows) RT&amp;VF - Utilizador PScript5.dll Version 5.2 Microsoft Word - Relat.rio Final.doc /MT83/MT111/MT110/MT100/MT97/MT103/MT101/MT110/MT115/MT32/MT101 /MT65/MT99/MT111/MT109/MT112/MT97/MT110/MT104/MT97/MT109/MT101/MT110/MT116/MT111 /MT65/MT114/MT113/MT117/MT101/MT111/MT108/MT243/MT103/MT105/MT99/MT111/MT115 /MT66/MT77/MT67/MT32/MT48/MT52 /MT66/MT105/MT98/MT108/MT105/MT111/MT116/MT101/MT99/MT97/MT32/MT77/MT117/MT110/MT105/MT99/MT105/MT112/MT97/MT108/MT32/MT100/MT101/MT32/MT67/MT104/MT97/MT118/MT101/MT115 /MT50/MT48/MT48/MT52 1 Junto são apresentados quatro relatórios que quer pelos objectivos quer pela sua localização e também pela entidade promotora e entidade adjudi cada para a realização desses trabalhos serem os mesmos, achou-se de toda a importância a presentação dos respectivos relatórios em conjunto. Assim, este Relatório Final é constituído por quatr o partes distintas, resultado da progressão dos trabalhos de obras...</text:p>
          </table:table-cell>
          <table:table-cell table:number-columns-repeated="1015"/>
        </table:table-row>
        <table:table-row table:style-name="ro1">
          <table:table-cell office:value-type="string">
            <text:p>032_EIA_Argozel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relatório, relatorio, projecto, prospecção, prospeccao, património arqueológico, patrimonio arqueologico.</text:p>
          </table:table-cell>
          <table:table-cell office:value-type="string">
            <text:p>relatório, relatorio, projecto, prospecção, prospeccao, património arqueológico, patrimonio arqueologico</text:p>
          </table:table-cell>
          <table:table-cell office:value-type="string">
            <text:p>Assinatura PDF</text:p>
          </table:table-cell>
          <table:table-cell office:value-type="string">
            <text:p>D:20040324180524Z D:20040324181927Z Acrobat Distiller 5.0.5 (Windows) JMenendez - Utilizad PScript5.dll Version 5.2 Microsoft Word - RELAT.RIO FINAL ARGOZELO.doc /MT69/MT115/MT116/MT117/MT100/MT111/MT32/MT100/MT101/MT32/MT73/MT109/MT112/MT97/MT99/MT116/MT101/MT32/MT65/MT109/MT98/MT105/MT101/MT110/MT116/MT97/MT108 /MT77/MT105/MT110/MT97/MT115/MT32/MT100/MT101/MT32/MT65/MT114/MT103/MT111/MT122/MT101/MT108/MT111/MT32/MT45/MT32/MT86/MT105/MT109/MT105/MT111/MT115/MT111 /MT50/MT48/MT48/MT52 1 / 19 ÍÍNNDDIICCEE 11.. IINNTTRROODDUUÇÇÃÃOO................................................................................................................ 2 22.. MMEETTOODDOOLLOOGGIIAA DDOO EESSTTUUDDOO.................................................................................... 3 33.. SSIITTUUAAÇÇÃÃOO DDEE RREEFFEERRÊÊNNCCIIAA EE AAVVAALLIIAAÇÇÃÃOO PPAATTRRIIMMOONNIIAALL ............................. 5 3.1. Enquadramento histórico-geográfico ........................................................</text:p>
          </table:table-cell>
          <table:table-cell table:number-columns-repeated="1015"/>
        </table:table-row>
        <table:table-row table:style-name="ro1">
          <table:table-cell office:value-type="string">
            <text:p>034_EIA_Chav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projecto, acompanhamento arqueológico, acompanhamento arqueologico, sondagens, prospecção, prospeccao, património arqueológico, patrimonio arqueologico.</text:p>
          </table:table-cell>
          <table:table-cell office:value-type="string">
            <text:p>relatório, relatorio, projecto, acompanhamento arqueológico, acompanhamento arqueologico, sondagens, prospecção, prospeccao, património arqueológico, patrimonio arqueologico</text:p>
          </table:table-cell>
          <table:table-cell office:value-type="string">
            <text:p>Assinatura PDF</text:p>
          </table:table-cell>
          <table:table-cell office:value-type="string">
            <text:p>D:20040525142953+01'00' D:20040525142953+01'00' Acrobat Distiller 5.0.5 (Windows) RT&amp;VF - Utilizador PScript5.dll Version 5.2 Microsoft Word - RELATÓRIO IPA IPPAR CMC.doc 1 / 34 ÍÍNNDDIICCEE 11.. IINNTTRROODDUUÇÇÃÃOO ..................................................................................................................................... 2 22.. RREESSUUMMOO NNÃÃOO TTÉÉCCNNIICCOO................................................................................................................. 3 33.. MMEETTOODDOOLLOOGGIIAA DDOO EESSTTUUDDOO...................................................................................................... 4 44.. SSIITTUUAAÇÇÃÃOO DDEE RREEFFEERRÊÊNNCCIIAA EE AAVVAALLIIAAÇÇÃÃOO PPAATTRRIIMMOONNIIAALL ......................................... 6 4.1. Localização ........................................................................................................................................ 6 4.2. Caracterização ................................</text:p>
          </table:table-cell>
          <table:table-cell table:number-columns-repeated="1015"/>
        </table:table-row>
        <table:table-row table:style-name="ro1">
          <table:table-cell office:value-type="string">
            <text:p>035_IA_BA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40526161243Z D:20040527122109+01'00' Acrobat Distiller 5.0.5 (Windows) RT&amp;VF - Utilizador PScript5.dll Version 5.2 Microsoft Word - BAS04.REL.FINAL 3.doc /MT83/MT111/MT110/MT100/MT97/MT103/MT101/MT110/MT115/MT32/MT65/MT114/MT113/MT117/MT101/MT111/MT108/MT243/MT103/MT105/MT99/MT97/MT115 /MT82/MT117/MT97/MT32/MT66/MT101/MT114/MT116/MT97/MT32/MT65/MT108/MT118/MT101/MT115/MT32/MT100/MT101/MT32/MT83/MT111/MT117/MT115/MT97/MT44 /MT32/MT76/MT111/MT116/MT101/MT32/MT49/MT44/MT32/MT50/MT32/MT101/MT32/MT51 /MT80/MT111/MT114/MT116/MT111 /MT50/MT48/MT48/MT52 1/33 Índice 1- Introdução.................................................................................................................. .............2 2- Localização e Informação Histórica Sobre o Local..........................................................3 3- Objectivos e Metodologia.................................................................................................... .9 4- As Sondagens Arqueológicas ...................</text:p>
          </table:table-cell>
          <table:table-cell table:number-columns-repeated="1015"/>
        </table:table-row>
        <table:table-row table:style-name="ro1">
          <table:table-cell office:value-type="string">
            <text:p>036_IA_SOL_63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cto, acompanhamento arqueológico, acompanhamento arqueologico, escavação, escavacao, plano de trabalhos, trabalhos arqueológicos, trabalhos arqueologicos.</text:p>
          </table:table-cell>
          <table:table-cell office:value-type="string">
            <text:p>relatório, relatorio, relatório final, relatorio final, projecto, acompanhamento arqueológico, acompanhamento arqueologico, escavação, escavacao, plano de trabalhos, trabalhos arqueológicos, trabalhos arqueologicos</text:p>
          </table:table-cell>
          <table:table-cell office:value-type="string">
            <text:p>Assinatura PDF</text:p>
          </table:table-cell>
          <table:table-cell office:value-type="string">
            <text:p>D:20070822151429+01'00' D:20070822153859+01'00' RELATÓRIO PORTO - 2007 ACOMPANHAMENTO ARQUEOLÓGICO NO ÂMBITO DA RECUPERAÇÃO DO EDIFÍCIO Nº63 DA RUA DO SOL - PORTO Acompanhamento Arqueológico na Rua do Sol, nº 63 – Porto FICHA TÉCNICA COORDENAÇÃO GERAL Ricardo Teixeira, Mestre em Arqueologia Vítor Fonseca, Arqueólogo TRABALHO DE CAMPO Direcção Ana Maria Oliveira, Arqueóloga Arqueólogos Assistentes de arqueólogo Desenhadores Nilton Nunes TRABALHO DE GABINETE Relatório Ana Maria Oliveira Desenho Gráfico Ana Paulo Fotografia de Espólio Revisão Teresa Silva, Arqueóloga, Pós-graduada em Museologia DATA 31 de Julho de 2007 Relatório Final Junho de 2007 Página 1 de 29 Acompanhamento Arqueológico na Rua do Sol, nº 63 – Porto Índice de conteúdos 1.Introdução............................................................................................................ 3 1.1.Localização..................................................................................................... 4 1.2. Informa...</text:p>
          </table:table-cell>
          <table:table-cell table:number-columns-repeated="1015"/>
        </table:table-row>
        <table:table-row table:style-name="ro1">
          <table:table-cell office:value-type="string">
            <text:p>037_IA_BAN_78_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0.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70627152827+01'00' D:20070628165604+01'00' RELATÓRIO PORTO - 2004 TRABALHOS ARQUEOLÓGICOS NO ÂMBITO DO PROJECTO IMOBILIÁRIO DE REMODELAÇÃO DO EDIFICIO NA RUA DA BANDEIRINHA 78-80 Intervenção Arqueológica na Rua da Bandeirinha 78-80 – Porto 04 1 de 38 FICHA TÉCNICA COORDENAÇÃO Ricardo Teixeira e Vítor Fonseca TRABALHO DE CAMPO Direcção Graça Pereira Assistente de Arqueólogo Bibiana Pereira Desenho de Campo Bibiana Pereira Verónica Biscaia TRABALHO DE GABINETE Pesquisa Bibliográfica e Documental Graça Pereira e Márcia Barros Relatório da Intervenção Arqueológica Graça Pereira Desenho AutoCAD e FreeHand 10 Ana Paulo Tratamento de Espólio Teresa Gonçalves Bibiana Preira Fotografia de Espólio Graça Pereira Revisão Teresa Silva Porto, 27 de Junho de 2007 Relatório Final Junho de 2007 Intervenção Arqueológica na Rua da Bandeirinha 78-80 – Porto 04 2 de 38 ÍNDICE 1.Introdução......................................................................................................................</text:p>
          </table:table-cell>
          <table:table-cell table:number-columns-repeated="1015"/>
        </table:table-row>
        <table:table-row table:style-name="ro1">
          <table:table-cell office:value-type="string">
            <text:p>038_REL_guardaria_castelo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aparenta corresponder a relatório de projeto / intervenção arqueológica. Foram analisadas as primeiras 4 página(s) de um total de 15. Pistas usadas: relatório, relatorio.</text:p>
          </table:table-cell>
          <table:table-cell office:value-type="string">
            <text:p>relatório, relatorio</text:p>
          </table:table-cell>
          <table:table-cell office:value-type="string">
            <text:p>Assinatura PDF</text:p>
          </table:table-cell>
          <table:table-cell office:value-type="string">
            <text:p>D:20070816161806+01'00' D:20070816164906+01'00' RELATÓRIO VISIT AS AOS CASTELOS DE ALGOSO E DE MONFORTE DE RIO LIVRE Guardaria e Manutenção Castelos de Algoso e Monforte 1/ 14 Índice 1. Guardaria e Manutenção nos Catelos de Algoso e Monforte de Rio Livre .................... 2 2. Registo e Análise do número de visitantes ..................................................................... 5 2.1. Castelo de Monforte de Rio Livre............................................................................ 6 2.1. Castelo de Algoso.................................................................................................. 10 3. Conclusões..................................................................................................................... 14 Guardaria e Manutenção Castelos de Algoso e Monforte 2/ 14 1. GUARDARIA E MANUTENÇÃO NOS CASTELOS DE ALGOSO E MONFORTE DE RIO LIVRE O trabalho efectuado pela empresa Ricardo Teixeira &amp; Vítor Fonseca contemplou a prestação de serviç...</text:p>
          </table:table-cell>
          <table:table-cell table:number-columns-repeated="1015"/>
        </table:table-row>
        <table:table-row table:style-name="ro1">
          <table:table-cell office:value-type="string">
            <text:p>039_IA_RNF_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1. Pistas usadas: relatório, relatorio, projecto, intervenção arqueológica, intervencao arqueologica, acompanhamento arqueológico, acompanhamento arqueologico, escavação, escavacao, sondagem, plano de trabalhos, trabalhos arqueológicos.</text:p>
          </table:table-cell>
          <table:table-cell office:value-type="string">
            <text:p>relatório, relatorio, projecto, intervenção arqueológica, intervencao arqueologica, acompanhamento arqueológico, acompanhamento arqueologico, escavação, escavacao, sondagem, plano de trabalhos, trabalhos arqueológicos</text:p>
          </table:table-cell>
          <table:table-cell office:value-type="string">
            <text:p>Assinatura PDF</text:p>
          </table:table-cell>
          <table:table-cell office:value-type="string">
            <text:p>D:20060217144934Z D:20060224103907Z Acrobat Distiller 5.0.5 (Windows) RT&amp;VF - Utilizador PScript5.dll Version 5.2.2 039- Capa Rel.FH10 /MT82/MT69/MT76/MT65/MT84/MT211/MT82/MT73/MT79 /MT32/MT32/MT73/MT78/MT84/MT69/MT82/MT86/MT69/MT78/MT199/MT195/MT79/MT32/MT65/MT82/MT81/MT85/MT69/MT79/MT76/MT211/MT71/MT73/MT67/MT65 /MT80/MT79/MT78/MT84/MT69/MT32/MT68/MT79/MT83/MT32/MT82/MT79/MT78/MT70/MT79/MT83/MT32/MT45/MT32/MT82/MT78/MT70/MT32/MT48/MT52 /MT77/MT65/MT84/MT79/MT83/MT73/MT78/MT72/MT79/MT83 /MT50/MT48/MT48/MT52 Intervenção Arqueológica na Ponte dos Ronfos 1 / 31 Índice 1. Introdução.............................................................................................................................................................2 1.1. Localização.........................................................................................................................................................3 2. Metodologia ........................................................................</text:p>
          </table:table-cell>
          <table:table-cell table:number-columns-repeated="1015"/>
        </table:table-row>
        <table:table-row table:style-name="ro1">
          <table:table-cell office:value-type="string">
            <text:p>040_Lagos_previo.pdf</text:p>
          </table:table-cell>
          <table:table-cell office:value-type="string">
            <text:p>.pdf</text:p>
          </table:table-cell>
          <table:table-cell office:value-type="string">
            <text:p>Documento PDF</text:p>
          </table:table-cell>
          <table:table-cell office:value-type="string">
            <text:p>Memória Descritiva</text:p>
          </table:table-cell>
          <table:table-cell office:value-type="string">
            <text:p>Alta</text:p>
          </table:table-cell>
          <table:table-cell office:value-type="string">
            <text:p>Documento PDF; o conteúdo aparenta corresponder a lista / inventário de espólio. Foram analisadas as primeiras 4 página(s) de um total de 22. Pistas usadas: espólio, espolio, cerâmica, ceramica, lítico, litico, fragmentos.</text:p>
          </table:table-cell>
          <table:table-cell office:value-type="string">
            <text:p>espólio, espolio, cerâmica, ceramica, lítico, litico, fragmentos</text:p>
          </table:table-cell>
          <table:table-cell office:value-type="string">
            <text:p>Assinatura PDF</text:p>
          </table:table-cell>
          <table:table-cell office:value-type="string">
            <text:p>D:20050328140646Z D:20050328171525+01'00' Acrobat Distiller 5.0.5 (Windows) RT&amp;VF - Utilizador PScript5.dll Version 5.2 Microsoft Word - lagos estudo previo arqueologia.doc LAGOS Revisão do Estudo Prévio PROJECTO DE REQUALIFICAÇÃO DA FRENTE RIBEIRINHA PROGRAMA POLIS Memória Descritiva 26 de Março de 2005 Revisão do Estudo Prévio PROJECTO DE REQUALIFICAÇÃO DA FRENTE RIBEIRINHA PROGRAMA POLIS Memória Descritiva 1 8.1 INTRODUÇÃO Os estudos desenvolvidos, nesta fase de Estudo Prévio, no âmbito da especialidade de História e Arqueologia, integraram, para além da recolha bibliográfica e a pesquisa das bases de dados disponibilizadas pelo IPPAR, DGEMN e IPA, o contacto com o Gabinete do Centro Histórico, (Arqto. Frederico Paula), tendo-se procedido também ao reconhecimento “in loco” da área de intervenção e ao levantamento das situações patrimoniais e problemáticas correlacionadas com as soluções apontadas para o desenvolvimento do projecto de requalificação da frente ribeirinha. A fase de re...</text:p>
          </table:table-cell>
          <table:table-cell table:number-columns-repeated="1015"/>
        </table:table-row>
        <table:table-row table:style-name="ro1">
          <table:table-cell office:value-type="string">
            <text:p>041_EIA_Obidos.pdf</text:p>
          </table:table-cell>
          <table:table-cell office:value-type="string">
            <text:p>.pdf</text:p>
          </table:table-cell>
          <table:table-cell office:value-type="string">
            <text:p>Documento PDF</text:p>
          </table:table-cell>
          <table:table-cell office:value-type="string">
            <text:p>Relatório de projeto / intervenção arqueológica / Fotografia / registo fotográfico</text:p>
          </table:table-cell>
          <table:table-cell office:value-type="string">
            <text:p>Média</text:p>
          </table:table-cell>
          <table:table-cell office:value-type="string">
            <text:p>Documento PDF; o conteúdo aparenta corresponder a relatório de projeto / intervenção arqueológica / fotografia / registo fotográfico. Foram analisadas as primeiras 4 página(s) de um total de 44. Pistas usadas: projecto, prospecção, prospeccao, fotografia, câmara, camara.</text:p>
          </table:table-cell>
          <table:table-cell office:value-type="string">
            <text:p>projecto, prospecção, prospeccao, fotografia, câmara, camara</text:p>
          </table:table-cell>
          <table:table-cell office:value-type="string">
            <text:p>Assinatura PDF</text:p>
          </table:table-cell>
          <table:table-cell office:value-type="string">
            <text:p>Acrobat Distiller 5.0.5 (Windows) RICARDO TEIXEIRA Acrobat PDFMaker 5.0 for Word D:20041022115700+01'00' ÍNDICE D:20041017170302Z /MT82/MT69/MT76/MT65/MT84/MT211/MT82/MT73/MT79 /MT69/MT83/MT84/MT85/MT68/MT79/MT32/MT68/MT69/MT32/MT73/MT77/MT80/MT65/MT67/MT84/MT69/MT32/MT65/MT77/MT66/MT73/MT69/MT78/MT84/MT65/MT76 /MT67/MT69/MT78/MT84/MT82/MT79/MT32/MT67/MT79/MT77/MT69/MT82/MT67/MT73/MT65/MT76 /MT211/MT66/MT73/MT68/MT79/MT83/MT45/MT32/MT71/MT65/MT69/MT73/MT82/MT65/MT83 /MT50/MT48/MT48/MT52 1 / 40 ÍNDICE 1. INTRODUÇÃO ............................................................................................... 2 2. METODOLOGIA DO ESTUDO ...................................................................... 3 3. SITUAÇÃO DE REFERENCIA E AVALIAÇÃO PATRIMONIAL ..................... 5 3.1. Localização e áreas de incidência do Projecto ........................................ 5 3.2. Condições de execução do trabalho de campo ....................................... 8 3.3. Caracterização das oc...</text:p>
          </table:table-cell>
          <table:table-cell table:number-columns-repeated="1015"/>
        </table:table-row>
        <table:table-row table:style-name="ro1">
          <table:table-cell office:value-type="string">
            <text:p>043_IA_SGS 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3. Pistas usadas: relatório, relatorio, projecto, intervenção arqueológica, intervencao arqueologica, acompanhamento arqueológico, acompanhamento arqueologico, sondagem, sondagens, trabalhos arqueológicos, trabalhos arqueologicos.</text:p>
          </table:table-cell>
          <table:table-cell office:value-type="string">
            <text:p>relatório, relatorio, projecto, intervenção arqueológica, intervencao arqueologica, acompanhamento arqueológico, acompanhamento arqueologico, sondagem, sondagens, trabalhos arqueológicos, trabalhos arqueologicos</text:p>
          </table:table-cell>
          <table:table-cell office:value-type="string">
            <text:p>Assinatura PDF</text:p>
          </table:table-cell>
          <table:table-cell office:value-type="string">
            <text:p>D:20050330155920Z D:20050404180258+01'00' Acrobat Distiller 5.0.5 (Windows) RT&amp;VF - Utilizador PScript5.dll Version 5.2 Microsoft Word - Rel Final 28 03 2005.doc /MT83/MT79/MT78/MT68/MT65/MT71/MT69/MT78/MT83/MT32/MT65/MT82/MT81/MT85/MT69/MT79/MT76/MT211/MT71/MT73/MT67/MT65/MT83 /MT82/MT85/MT65/MT32/MT68/MT69/MT32/MT83/MT65/MT71/MT82/MT69/MT83 /MT80/MT79/MT82/MT84/MT79 /MT50/MT48/MT48/MT52 Intervenção Arqueológica na Rua de Sagres 1 / 35 Índice 1. Introdução ..................................................................................................................................... 2 1.1. Localização ............................................................................................................................ 3 1.2. Informação Histórica sobre o Local.................................................................................. 3 1.3. Contexto e Objectivos da Intervenção Arqueológica ..................................................... 4 2. Metologia .............</text:p>
          </table:table-cell>
          <table:table-cell table:number-columns-repeated="1015"/>
        </table:table-row>
        <table:table-row table:style-name="ro1">
          <table:table-cell office:value-type="string">
            <text:p>044_IA_ATV_76_0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5.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50314183832Z D:20050315121241Z Acrobat Distiller 5.0.5 (Windows) RT&amp;VF - Utilizador PScript5.dll Version 5.2 CAPA 044.FH10 /MT82/MT69/MT76/MT65/MT84/MT211/MT82/MT73/MT79 /MT32/MT84/MT82/MT65/MT66/MT65/MT76/MT72/MT79/MT83/MT32/MT65/MT82/MT81/MT85/MT69/MT79/MT76/MT211/MT71/MT73/MT67/MT79/MT83 /MT80/MT82/MT79/MT74/MT69/MT67/MT84/MT79/MT32/MT68/MT69/MT32/MT82/MT69/MT77/MT79/MT68/MT69/MT76/MT65/MT199/MT195/MT79 /MT32/MT69/MT32/MT65/MT77/MT80/MT76/MT73/MT65/MT199/MT195/MT79/MT32/MT68/MT69/MT32/MT77/MT79/MT82/MT65/MT68/MT73/MT65 /MT82/MT85/MT65/MT32/MT65/MT76/MT84/MT79/MT32/MT68/MT69/MT32/MT86/MT73/MT76/MT65/MT44/MT32/MT55/MT54/MT32/MT80/MT79/MT82/MT84/MT79 /MT50/MT48/MT48/MT53 Intervenção Arqueológica na Rua Alto de Vila – Porto 1/38 Índice 1 - Introdução .............................................................................................................................2 2 - Localização e Informação Histórica Sobre o Local...........................................................</text:p>
          </table:table-cell>
          <table:table-cell table:number-columns-repeated="1015"/>
        </table:table-row>
        <table:table-row table:style-name="ro1">
          <table:table-cell office:value-type="string">
            <text:p>045_EIA_Camelias.pdf</text:p>
          </table:table-cell>
          <table:table-cell office:value-type="string">
            <text:p>.pdf</text:p>
          </table:table-cell>
          <table:table-cell office:value-type="string">
            <text:p>Documento PDF</text:p>
          </table:table-cell>
          <table:table-cell office:value-type="string">
            <text:p>Relatório de projeto</text:p>
          </table:table-cell>
          <table:table-cell office:value-type="string">
            <text:p>Alta</text:p>
          </table:table-cell>
          <table:table-cell office:value-type="string">
            <text:p>Documento PDF; o conteúdo aparenta corresponder a tabela / base de dados / fotografia / registo fotográfico. Foram analisadas as primeiras 4 página(s) de um total de 72. Pistas usadas: base de dados, registo, data, valor, fotografia, registo fotográfico, registo fotografico.</text:p>
          </table:table-cell>
          <table:table-cell office:value-type="string">
            <text:p>base de dados, registo, data, valor, fotografia, registo fotográfico, registo fotografico</text:p>
          </table:table-cell>
          <table:table-cell office:value-type="string">
            <text:p>Assinatura PDF</text:p>
          </table:table-cell>
          <table:table-cell office:value-type="string">
            <text:p>D:20050906142955Z D:20050906170456+01'00' Acrobat Distiller 5.0.5 (Windows) RT&amp;VF - Utilizador PScript5.dll Version 5.2 045 est inc capa.FH10 /MT82/MT69/MT76/MT65/MT84/MT211/MT82/MT73/MT79 /MT69/MT83/MT84/MT85/MT68/MT79/MT32/MT68/MT69/MT32/MT73/MT78/MT67/MT73/MT68/MT202/MT78/MT67/MT73/MT65/MT83/MT32/MT65/MT77/MT66/MT73/MT69/MT78/MT84/MT65/MT73/MT83 /MT80/MT65/MT82/MT81/MT85/MT69/MT32/MT68/MT65/MT83/MT32/MT67/MT65/MT77/MT201/MT76/MT73/MT65/MT83 /MT80/MT79/MT82/MT84/MT79 /MT50/MT48/MT48/MT53 EIA Parque das Camélias - Descritor Património Arquitectónico e Arqueológico 1 / 52 ÍNDICE 1. Introdução ...........................................................................................................................2 2. Metodologia do Estudo.....................................................................................................3 3. Situação de Referência e Avaliação Patrimonial ............................................................5 3.1. Localização da Área de Incidênc...</text:p>
          </table:table-cell>
          <table:table-cell table:number-columns-repeated="1015"/>
        </table:table-row>
        <table:table-row table:style-name="ro1">
          <table:table-cell office:value-type="string">
            <text:p>045_Estudo_camelias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9. Pistas usadas: projecto, intervenção arqueológica, intervencao arqueologica, acompanhamento arqueológico, acompanhamento arqueologico, sondagens, trabalhos arqueológicos, trabalhos arqueologicos.</text:p>
          </table:table-cell>
          <table:table-cell office:value-type="string">
            <text:p>projec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office:value-type="string">
            <text:p>D:20050517165419Z D:20050517184712+01'00' Acrobat Distiller 5.0.5 (Windows) RT&amp;VF - Utilizador PScript5.dll Version 5.2 Microsoft Word - 045 Estudo hist arq 17 05 2005.doc /MT69/MT83/MT84/MT85/MT68/MT79/MT32/MT72/MT73/MT83/MT84/MT211/MT82/MT73/MT67/MT79/MT32/MT80/MT82/MT69/MT76/MT73/MT77/MT73/MT78/MT65/MT82 /MT71/MT65/MT86/MT69/MT84/MT79/MT32/MT84/MT82/MT65/MT86/MT69/MT83/MT83/MT65/MT32/MT68/MT65/MT83/MT32/MT65/MT76/MT77/MT65/MT83 /MT32/MT67/MT79/MT77/MT32/MT65/MT32/MT82/MT85/MT65/MT32/MT70/MT69/MT82/MT78/MT65/MT78/MT68/MT69/MT83/MT32/MT84/MT79/MT77/MT193/MT83 /MT70/MT193/MT66/MT82/MT73/MT67/MT65/MT32/MT68/MT69/MT32/MT84/MT69/MT67/MT73/MT68/MT79/MT83/MT32/MT68/MT69/MT32/MT83/MT69/MT68/MT65 Estudo Histórico Preliminar - Gaveto Travessa das Almas com a Rua Fernandes Tomás e Rua da Alegria 1/ 78 Índice 1. Introdução .................................................................................................................................................... 2 2. Metodologia.............</text:p>
          </table:table-cell>
          <table:table-cell table:number-columns-repeated="1015"/>
        </table:table-row>
        <table:table-row table:style-name="ro1">
          <table:table-cell office:value-type="string">
            <text:p>045_IA_ALG_253_0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65.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1008135557+01'00' teresasilva PScript5.dll Version 5.2 Acrobat Distiller 8.2.3 (Windows) D:20110119114240Z 1_ 045 rel rev 2010 10 07 Relatório Final Porto 2010 Intervenção Arqueológica na Fábrica das Sedas Intervenção Arqueológica na Fábrica das Sedas FICHA TÉCNICA Código de Projecto: 045 COORDENAÇÃO GERAL Ricardo Teixeira, Arqueólogo, Mestre em arqueologia Vítor Fonseca, Arqueólogo TRABALHO DE CAMPO Assessoria Científica Maria da Luz Sampaio Direcção Ana Maria Oliveira, Arqueóloga Isabel Andrade Arqueólogos César Guedes Assistentes de arqueólogo Rodry Mendonça Verónica Biscaia Operários de arqueologia Alexandre Pinto Francisco Monteiro Pedro Pinto Rui Carmesim Registo fotográfico edifício Teresa Silva, arqueóloga, pós-graduada em Museologia TRABALHO DE GABINETE Pesquisa Documental Maria da Luz Sampaio, Historiadora especialista em Arqueologia Industrial BD Documental Teresa Silva Relatório Ana Maria Oliveira Desenho gráfico Sara Costa, desenhadora de arqueologia Ana Paulo, desen...</text:p>
          </table:table-cell>
          <table:table-cell table:number-columns-repeated="1015"/>
        </table:table-row>
        <table:table-row table:style-name="ro1">
          <table:table-cell office:value-type="string">
            <text:p>045_Sedas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projecto, intervenção arqueológica, intervencao arqueologica, acompanhamento arqueológico, acompanhamento arqueologico, escavação, escavacao, sondagem, sondagens, trabalhos arqueológicos.</text:p>
          </table:table-cell>
          <table:table-cell office:value-type="string">
            <text:p>relatório, relatorio, projecto, intervenção arqueológica, intervencao arqueologica, acompanhamento arqueológico, acompanhamento arqueologico, escavação, escavacao, sondagem, sondagens, trabalhos arqueológicos</text:p>
          </table:table-cell>
          <table:table-cell office:value-type="string">
            <text:p>Assinatura PDF</text:p>
          </table:table-cell>
          <table:table-cell office:value-type="string">
            <text:p>D:20051117103022Z D:20051117115005Z Acrobat Distiller 5.0.5 (Windows) RT&amp;VF - Utilizador PScript5.dll Version 5.2 Microsoft Word - 045 Relatorio Pre.doc /MT83/MT111/MT110/MT100/MT97/MT103/MT101/MT110/MT115/MT32/MT65/MT114/MT113/MT117/MT101/MT111/MT108/MT243/MT103/MT105/MT99/MT97/MT115 /MT82/MT101/MT108/MT97/MT116/MT243/MT114/MT105/MT111/MT32/MT80/MT114/MT101/MT108/MT105/MT109/MT105/MT110/MT97/MT114 /MT80/MT97/MT114/MT113/MT117/MT101/MT32/MT100/MT97/MT115/MT32/MT67/MT97/MT109/MT233/MT108/MT105/MT97/MT115 /MT80/MT111/MT114/MT116/MT111 /MT50/MT48/MT48/MT53 CENTRO DE LAZER DAS CAMÉLIAS (quarteirão entre Travessa das Almas, Rua Fernandes Tomás, Rua da Alegria e Rua Firmeza) ALG 253.05 Sondagens Arqueológicas Relatório Preliminar Relatório Preliminar das Sondagens Arqueológicas –EIA Parque das Camélias 2/29 ÍNDICE 1. Introdução.................................................................................................................. .............................. 3 2. Localização........</text:p>
          </table:table-cell>
          <table:table-cell table:number-columns-repeated="1015"/>
        </table:table-row>
        <table:table-row table:style-name="ro1">
          <table:table-cell office:value-type="string">
            <text:p>047_IA_GRF_0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48.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71219111645Z Writer Adobe Acrobat 8.0 D:20071219163437Z RELATÓRIO PORTO - 2005 INTERVENÇÃO ARQUEOLÓGICA NO GAVETO AV. RODRIGUES DE FREITAS Intervenção Arqueológica no Gaveto Av. Rodrigues de Freitas – Porto – GRF 05 FICHA TÉCNICA COORDENAÇÃO GERAL Ricardo Teixeira, Arqueólogo, Mestre em arqueologia Vítor Fonseca, Arqueólogo TRABALHO DE CAMPO Direcção Graça Pereira Arqueólogos César Guedes Assistentes de arqueólogo Bibiana Pereira Rodry Mendonça Verónica Biscaia Desenhadores Bibiana Pereira Rodry Mendonça Verónica Biscaia TRABALHO DE GABINETE Relatório Graça Pereira Desenho Gráfico Ana Paulo Fotografia de Espólio Sara Costa Revisão Teresa Silva DATA 19 de Dezembro de 2007 Relatório Final Dezembro de 2007 Página 1 de 97 Intervenção Arqueológica no Gaveto Av. Rodrigues de Freitas – Porto – GRF 05 Índice 1.Introdução........................................................................................................................... 3 1.1. Localização................................</text:p>
          </table:table-cell>
          <table:table-cell table:number-columns-repeated="1015"/>
        </table:table-row>
        <table:table-row table:style-name="ro1">
          <table:table-cell office:value-type="string">
            <text:p>047_RodFreitas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1.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50518144947Z D:20050518155927+01'00' Acrobat Distiller 5.0.5 (Windows) RT&amp;VF - Utilizador PScript5.dll Version 5.2 Microsoft Word - GRF05 preliminar.doc /MT83/MT111/MT110/MT100/MT97/MT103/MT101/MT110/MT115/MT32/MT65/MT114/MT113/MT117/MT101/MT111/MT108/MT243/MT103/MT105/MT99/MT97/MT115 /MT71/MT97/MT118/MT101/MT116/MT111/MT32/MT65/MT118/MT46/MT32/MT82/MT111/MT100/MT114/MT105/MT103/MT117/MT101/MT115/MT32/MT100/MT101/MT32/MT70/MT114/MT101/MT105/MT116/MT97/MT115/MT47/MT32/MT82/MT117/MT97/MT32/MT100/MT97/MT115/MT32/MT70/MT111/MT110/MT116/MT97/MT105/MT110/MT104/MT97/MT115 /MT82/MT101/MT108/MT97/MT116/MT243/MT114/MT105/MT111/MT32/MT80/MT114/MT101/MT108/MT105/MT109/MT105/MT110/MT97/MT114 /MT80/MT111/MT114/MT116/MT111 /MT50/MT48/MT48/MT53 Relatório Preliminar GRF.05 1/17 Índice 1 - Introdução .............................................................................................................................2 2 - Localização..............................................................</text:p>
          </table:table-cell>
          <table:table-cell table:number-columns-repeated="1015"/>
        </table:table-row>
        <table:table-row table:style-name="ro1">
          <table:table-cell office:value-type="string">
            <text:p>048_IA_BTL_97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cto, intervenção arqueológica, intervencao arqueologica, acompanhamento arqueológico, acompanhamento arqueologico.</text:p>
          </table:table-cell>
          <table:table-cell office:value-type="string">
            <text:p>relatório, relatorio, relatório final, relatorio final, projecto, intervenção arqueológica, intervencao arqueologica, acompanhamento arqueológico, acompanhamento arqueologico</text:p>
          </table:table-cell>
          <table:table-cell office:value-type="string">
            <text:p>Assinatura PDF</text:p>
          </table:table-cell>
          <table:table-cell office:value-type="string">
            <text:p>D:20091012122850+01'00' D:20091012125105+01'00' RELATÓRIO PORTO - 2009 INTERVENÇÃO ARQUEOLÓGICA PRAÇA DA BATALHA Nº97 Intervenção Arqueológica na Praça da Batalha, nº 97 – BTL 97.08 FICHA TÉCNICA COORDENAÇÃO GERAL Ricardo Teixeira, Arqueólogo, Mestre em arqueologia Vítor Fonseca, Arqueólogo COORDENAÇÃO DE PROJECTO Jorge Fonseca TRABALHO DE CAMPO Direcção Jorge Fonseca TRABALHO DE GABINETE Pesquisa Bibliográfica Jorge Fonseca Introdução Histórica Jorge Fonseca Relatório Jorge Fonseca Desenho Gráfico Ana Paulo Revisão Liliana Barbosa DATA 14 de Outubro de 2009 Relatório Final Outubro de 2009 Página 1 de 13 Intervenção Arqueológica na Praça da Batalha, nº 97 – BTL 97.08 Índice 1.Introdução..............................................................................................................3 1.1.Contexto e Objectivos.........................................................................................3 1.2.Localização.................................................................</text:p>
          </table:table-cell>
          <table:table-cell table:number-columns-repeated="1015"/>
        </table:table-row>
        <table:table-row table:style-name="ro1">
          <table:table-cell office:value-type="string">
            <text:p>049_e_050_IA_MP_ARV.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58. Pistas usadas: relatório, relatorio, relatório final, relatorio final, sondagens.</text:p>
          </table:table-cell>
          <table:table-cell office:value-type="string">
            <text:p>relatório, relatorio, relatório final, relatorio final, sondagens</text:p>
          </table:table-cell>
          <table:table-cell office:value-type="string">
            <text:p>Assinatura PDF</text:p>
          </table:table-cell>
          <table:table-cell office:value-type="string">
            <text:p>D:20060419101414Z D:20060419182236+01'00' Acrobat Distiller 5.0.5 (Windows) RT&amp;VF - Utilizador PScript5.dll Version 5.2 Microsoft Word - rel 17 abr.doc /MT82/MT69/MT76/MT65/MT84/MT211/MT82/MT73/MT79/MT32/MT70/MT73/MT78/MT65/MT76 /MT83/MT79/MT78/MT68/MT65/MT71/MT69/MT78/MT83/MT32/MT65/MT82/MT81/MT85/MT69/MT79/MT76/MT211/MT71/MT73/MT67/MT65/MT83 /MT81/MT85/MT73/MT78/MT84/MT195/MT32/MT69/MT32/MT70/MT65/MT205/MT83/MT67/MT65/MT47/MT32/MT193/MT82/MT86/MT79/MT82/MT69/MT47/MT32/MT86/MT73/MT76/MT65/MT32/MT68/MT79/MT32/MT67/MT79/MT78/MT68/MT69 /MT80/MT79/MT82/MT84/MT79/MT32/MT50/MT48/MT48/MT53 SISTEMA DE METRO LIGEIRO DA ÁREA METROPOLITANA DO PORTO MP-ARV 01.05, MP-ARV 02.05 e MP-ARV 03.05 Sondagens Arqueológicas Nos lugares da Quintã e da Quinta da Faísca, Árvore, Vila do Conde, Porto MP-585337/06 Relatório Final Sistema de Metro Ligeiro da Área Metropolitana do Porto Linha P_T07.22-A7.23 Varziela - Quintã, Árvore, Vila do Conde MP-ARV_ Relatório Final MP-585337/06 Liliana Barbosa; Iva Botelho....</text:p>
          </table:table-cell>
          <table:table-cell table:number-columns-repeated="1015"/>
        </table:table-row>
        <table:table-row table:style-name="ro1">
          <table:table-cell office:value-type="string">
            <text:p>050_Quinta_Faisc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 Pistas usadas: relatório, relatorio, intervenção arqueológica, intervencao arqueologica, sondagens, trabalhos arqueológicos, trabalhos arqueologicos.</text:p>
          </table:table-cell>
          <table:table-cell office:value-type="string">
            <text:p>relatório, relatorio, intervenção arqueológica, intervencao arqueologica, sondagens, trabalhos arqueológicos, trabalhos arqueologicos</text:p>
          </table:table-cell>
          <table:table-cell office:value-type="string">
            <text:p>Assinatura PDF</text:p>
          </table:table-cell>
          <table:table-cell office:value-type="string">
            <text:p>D:20050808144220Z D:20050808182048+01'00' Acrobat Distiller 5.0.5 (Windows) RT&amp;VF-Utilizador PScript5.dll Version 5.2 Microsoft Word - MP-ARV0205_Relatorio Preliminar Qta.doc /MT83/MT111/MT110/MT100/MT97/MT103/MT101/MT110/MT115/MT32/MT65/MT114/MT113/MT117/MT101/MT111/MT108/MT243/MT103/MT105/MT99/MT97/MT115 /MT81/MT117/MT105/MT110/MT116/MT97/MT32/MT100/MT97/MT32/MT70/MT97/MT237/MT115/MT99/MT97/MT47/MT32/MT193/MT114/MT118/MT111/MT114/MT101/MT47/MT32/MT86/MT105/MT108/MT97/MT32/MT100/MT111/MT32/MT67/MT111/MT110/MT100/MT101 /MT82/MT101/MT108/MT97/MT116/MT243/MT114/MT105/MT111/MT32/MT80/MT114/MT101/MT108/MT105/MT109/MT105/MT110/MT97/MT114 /MT80/MT111/MT114/MT116/MT111 /MT50/MT48/MT48/MT53 SISTEMA DE METRO LIGEIRO DA ÁREA METROPOLITANA DO PORTO MP-ARV 02.05 Sondagens Arqueológicas (Quinta da Faísca/Árvore, Vila do Conde, Porto) MP-528286/05 Relatório Preliminar MP-A R V 0 2 . 0 5 - Relatório Preliminar M P - 5 2 8 2 8 6 / 0 5 P á g . 2 / 1 4 Metro do Porto, S.A &amp; Arqueologia &amp; Património L.da...</text:p>
          </table:table-cell>
          <table:table-cell table:number-columns-repeated="1015"/>
        </table:table-row>
        <table:table-row table:style-name="ro1">
          <table:table-cell office:value-type="string">
            <text:p>051_IA_QTA_74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090213145033Z D:20090213145033Z RELATÓRIO FINAL PORTO - 2009 ACOMPANHAMENTO ARQUEOLÓGICO RUA DA QUINTA, 747 PORTO Acompanhamento Arqueológico na Rua da Quinta, 747-QTA 747 08 Ficha Técnica COORDENAÇÃO GERAL Ricardo Teixeira Vítor Fonseca COORDENAÇÃO DE PROJECTO Jorge Fonseca TRABALHO DE CAMPO Direcção Helena Marçal Assistentes de arqueólogo Bebiana Mota Ricardo Mota TRABALHO DE GABINETE Pesquisa Bibliográfica Helena Marçal Márcia Barros Introdução Histórica Helena Marçal Márcia Barros Relatório Helena Marçal Desenho Gráfico Rodry Mendonça Tratamento de Espólio Anabela Rodrigues Teresa Gonçalves Fotografia de Espólio Pedro Maia Revisão Jorge Fonseca DATA 06 de Fevereiro de 2009 Relatório Final Fevereiro de 2009 Página 1 de 19 Acompanhamento Arqueológico na Rua da Quinta, 747-QTA 747 08 Índice 1.Introdução................................................................................................................. 3 1.1. CONTEXTO E OBJECTIVOS .........................................</text:p>
          </table:table-cell>
          <table:table-cell table:number-columns-repeated="1015"/>
        </table:table-row>
        <table:table-row table:style-name="ro1">
          <table:table-cell office:value-type="string">
            <text:p>052_EIA_Pacos_de_Ferrei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6.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50414233739Z D:20050415004344+01'00' Acrobat Distiller 5.0.5 (Windows) RT&amp;VF - Director PScript5.dll Version 5.2.2 Microsoft Photo Editor - capa.jpg 1 / 25 ÍNDICE 1. INTRODUÇÃO..................................................................................................... 2 2. METODOLOGIA DO ESTUDO............................................................................ 3 3. SITUAÇÃO DE REFERENCIA E AVALIAÇÃO PATRIMONIAL .......................... 5 3.1. Localização e áreas de incidência do Projecto ......................................................................... 5 3.2. Condições de execução do trabalho de campo........................................................................ 7 3.3. Caracterização das ocorrências.................................................................................................12 3.4. Avaliação patrimonial.................................................................................................................16 4. AVAL...</text:p>
          </table:table-cell>
          <table:table-cell table:number-columns-repeated="1015"/>
        </table:table-row>
        <table:table-row table:style-name="ro1">
          <table:table-cell office:value-type="string">
            <text:p>054_IA_NVCB_0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acompanhamento arqueológico, acompanhamento arqueologico, escavação, escavacao, plano de trabalhos, trabalhos arqueológicos, trabalhos arqueologicos.</text:p>
          </table:table-cell>
          <table:table-cell office:value-type="string">
            <text:p>relatório, relatorio, relatório final, relatorio final, acompanhamento arqueológico, acompanhamento arqueologico, escavação, escavacao, plano de trabalhos, trabalhos arqueológicos, trabalhos arqueologicos</text:p>
          </table:table-cell>
          <table:table-cell office:value-type="string">
            <text:p>Assinatura PDF</text:p>
          </table:table-cell>
          <table:table-cell office:value-type="string">
            <text:p>D:20100927152850+01'00' Writer OpenOffice.org 3.0 D:20101103174224Z Relatório Final Porto 2010 Acompanhamento Arqueológico na Zona de Protecção do Castelo de Castelo Branco Acompanhamento Arqueológico na Zona de Protecção do Castelo de Castelo Branco FICHA TÉCNICA COORDENAÇÃO GERAL Ricardo Teixeira, Arqueólogo, Mestre em arqueologia Vítor Fonseca, Arqueólogo TRABALHO DE CAMPO Arqueólogo Ana Maria Oliveira, arqueóloga TRABALHO DE GABINETE Relatório Ana Maria Oliveira Tratamento de espólio Teresa Gonçalves Revisão de texto Teresa Silva, Arqueóloga, pós-graduada em Museologia DATA Novembro de 2010 Relatório Novembro de 2010 Página 3 de 27 Acompanhamento Arqueológico na Zona de Protecção do Castelo de Castelo Branco Índice 1.Introdução......................................................................................................................................... 7 2.Localização.............................................................................................................</text:p>
          </table:table-cell>
          <table:table-cell table:number-columns-repeated="1015"/>
        </table:table-row>
        <table:table-row table:style-name="ro1">
          <table:table-cell office:value-type="string">
            <text:p>055_EIA_Penafi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8.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51006132407Z D:20051006142613+01'00' Acrobat Distiller 5.0.5 (Windows) RT&amp;VF - Utilizador PScript5.dll Version 5.2 Microsoft Word - PENAFIEL ARQUEOLOGIA.doc /MT69/MT83/MT84/MT85/MT68/MT79/MT32/MT68/MT69/MT32/MT73/MT77/MT80/MT65/MT67/MT84/MT69/MT32/MT65/MT77/MT66/MT73/MT69/MT78/MT84/MT65/MT76 /MT68/MT69/MT83/MT67/MT82/MT73/MT84/MT79/MT82/MT32/MT80/MT65/MT84/MT82/MT73/MT77/MT211/MT78/MT73/MT79/MT32/MT65/MT82/MT81/MT85/MT69/MT79/MT76/MT211/MT71/MT73/MT67/MT79 /MT67/MT69/MT78/MT84/MT82/MT79/MT32/MT67/MT79/MT77/MT69/MT82/MT67/MT73/MT65/MT76 /MT82/MT69/MT71/MT73/MT195/MT79/MT32/MT68/MT79/MT32/MT86/MT65/MT76/MT69/MT32/MT68/MT79/MT32/MT83/MT79/MT85/MT83/MT65 /MT80/MT69/MT78/MT65/MT70/MT73/MT69/MT76 /MT50/MT48/MT48/MT53 Estudo de Impacte Ambiental do Centro Comercial, Região do Vale do Sousa 1 / 34 ÍNDICE 1. INTRODUÇÃO .......................................................................................................................... 2 2. METODOLOGIA DO ESTUDO...........................</text:p>
          </table:table-cell>
          <table:table-cell table:number-columns-repeated="1015"/>
        </table:table-row>
        <table:table-row table:style-name="ro1">
          <table:table-cell office:value-type="string">
            <text:p>056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057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059_IA_RCD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40. Pistas usadas: relatório, relatorio, relatório final, relatorio final, projecto, intervenção arqueológica, intervencao arqueologica, acompanhamento arqueológico, acompanhamento arqueologico, sondagem, sondagens, plano de trabalhos.</text:p>
          </table:table-cell>
          <table:table-cell office:value-type="string">
            <text:p>relatório, relatorio, relatório final, relatorio final, projecto, intervenção arqueológica, intervencao arqueologica, acompanhamento arqueológico, acompanhamento arqueologico, sondagem, sondagens, plano de trabalhos</text:p>
          </table:table-cell>
          <table:table-cell office:value-type="string">
            <text:p>Assinatura PDF</text:p>
          </table:table-cell>
          <table:table-cell office:value-type="string">
            <text:p>D:20100630114230+01'00' Adobe Acrobat 8.2 Combine Files Adobe Acrobat 8.2 D:20100630172509+01'00' Relatório Final Porto 2010 Intervenção Arqueológica na Rua da Restauração / Calçada sobre o Douro Intervenção Arqueológica na Rua da Restauração / Calçada sobre o Douro FICHA TÉCNICA COORDENAÇÃO GERAL Ricardo Teixeira, Arqueólogo, Mestre em arqueologia Vítor Fonseca, Arqueólogo TRABALHO DE CAMPO Direcção Direcção Acompanhamento César Guedes, Arqueólogo Helena Marçal, Arqueóloga Arqueólogos Ana Maria da Costa Oliveira Graça Pereira Jorge Fonseca Assistentes de arqueólogo Anabela Rodrigues Rodry Mendonça Sónia Santos Verónica Biscaia Óperários de arqueologia Pedro Pinto TRABALHO DE GABINETE Relatório da intervenção arqueológica César Guedes Desenho gráfico Ana Paulo Rodry Mendonça Sara Costa Tratamento de espólio Teresa Gonçalves Fotografia de espólio Pedro Maia Revisão de texto Liliana Barbosa, Arqueóloga DATA Julho de 2010 Relatório Final Julho de 2010 Página 3 de 84 Intervenção Arqueológi...</text:p>
          </table:table-cell>
          <table:table-cell table:number-columns-repeated="1015"/>
        </table:table-row>
        <table:table-row table:style-name="ro1">
          <table:table-cell office:value-type="string">
            <text:p>059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8. Pistas usadas: relatório, relatorio, projecto, acompanhamento arqueológico, acompanhamento arqueologico, sondagem, sondagens, plano de trabalhos, trabalhos arqueológicos, trabalhos arqueologicos.</text:p>
          </table:table-cell>
          <table:table-cell office:value-type="string">
            <text:p>relatório, relatorio, projecto, acompanhamento arqueológico, acompanhamento arqueologico, sondagem, sondagens, plano de trabalhos, trabalhos arqueológicos, trabalhos arqueologicos</text:p>
          </table:table-cell>
          <table:table-cell office:value-type="string">
            <text:p>Assinatura PDF</text:p>
          </table:table-cell>
          <table:table-cell office:value-type="string">
            <text:p>IP3 — SCUT INTERIOR NORTE / LANÇO CHAVES - VILA REAL **** Writer OpenOffice.org 2.1 D:20071009134033+01'00' RECUPERAÇÃO E AMPLIAÇÃO DE EDIFÍCIO R. DA RESTAURAÇÃO / CALÇADA DE SOBRE O DOURO - PORTO Sondagens Arqueológicas RCD.06 Relatório Preliminar Relatório Preliminar. Sondagens Arqueológicas – Rua da Restauração/Calçada sobre o Douro 2/28 ÍNDICE 1.Introdução...............................................................................................................................2 2.Localização..............................................................................................................................4 3. Objectivos e Metodologia dos Trabalhos..............................................................................6 3.1. Objectivos................................................................................................................................. 6 3.2. Metodologia.......................................................................................</text:p>
          </table:table-cell>
          <table:table-cell table:number-columns-repeated="1015"/>
        </table:table-row>
        <table:table-row table:style-name="ro1">
          <table:table-cell office:value-type="string">
            <text:p>060_IA_TR_10_18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9. Pistas usadas: relatório, relatorio, projecto, intervenção arqueológica, intervencao arqueologica, sondagem, sondagens, plano de trabalhos, trabalhos arqueológicos, trabalhos arqueologicos.</text:p>
          </table:table-cell>
          <table:table-cell office:value-type="string">
            <text:p>relatório, relatorio, projecto, intervenção arqueológica, intervencao arqueologica, sondagem, sondagens, plano de trabalhos, trabalhos arqueológicos, trabalhos arqueologicos</text:p>
          </table:table-cell>
          <table:table-cell office:value-type="string">
            <text:p>Assinatura PDF</text:p>
          </table:table-cell>
          <table:table-cell office:value-type="string">
            <text:p>D:20060712083024Z D:20060712114247+01'00' Acrobat Distiller 5.0.5 (Windows) RT&amp;VF - Utilizador PScript5.dll Version 5.2 Microsoft Word - 060 Rel Final para impress.o.doc /MT82/MT69/MT76/MT65/MT84/MT211/MT82/MT73/MT79 /MT84/MT82/MT65/MT66/MT65/MT76/MT72/MT79/MT83/MT32/MT65/MT82/MT81/MT85/MT69/MT79/MT76/MT211/MT71/MT73/MT67/MT79/MT83 /MT32/MT82/MT85/MT65/MT32/MT84/MT79/MT77/MT193/MT83/MT32/MT82/MT73/MT66/MT69/MT73/MT82/MT79/MT32/MT78/MT46/MT186/MT32/MT49/MT56/MT45/MT50/MT54 /MT84/MT79/MT82/MT82/MT69/MT32/MT68/MT69/MT32/MT77/MT79/MT78/MT67/MT79/MT82/MT86/MT79 /MT50/MT48/MT48/MT54 Intervenção Arqueológica – Rua Tomás Ribeiro n.º 18-26 – Torre de Moncorvo 1/41 Índice 1. Introdução..................................................................................................................... ........................................................2 2. Informação Histórica........................................................................................................... ............</text:p>
          </table:table-cell>
          <table:table-cell table:number-columns-repeated="1015"/>
        </table:table-row>
        <table:table-row table:style-name="ro1">
          <table:table-cell office:value-type="string">
            <text:p>061_REL_Bempost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aparenta corresponder a relatório de projeto / intervenção arqueológica. Foram analisadas as primeiras 4 página(s) de um total de 73. Pistas usadas: projecto.</text:p>
          </table:table-cell>
          <table:table-cell office:value-type="string">
            <text:p>projecto</text:p>
          </table:table-cell>
          <table:table-cell office:value-type="string">
            <text:p>Assinatura PDF</text:p>
          </table:table-cell>
          <table:table-cell office:value-type="string">
            <text:p>D:20070416162505Z teresasilva PScript5.dll Version 5.2.2 Acrobat Distiller 5.0.5 (Windows) D:20070619143548+01'00' Microsoft Word - folh div Anexos.doc /MT82/MT69/MT76/MT65/MT84/MT211/MT82/MT73/MT79 /MT66/MT69/MT77/MT80/MT79/MT83/MT84/MT65/MT32/MT45/MT32/MT50/MT48/MT48/MT55 /MT69/MT83/MT84/MT85/MT68/MT79/MT32/MT68/MT69/MT32/MT73/MT77/MT80/MT65/MT67/MT84/MT69/MT32/MT65/MT77/MT66/MT73/MT69/MT78/MT84/MT65/MT76 /MT80/MT82/MT79/MT74/MT69/MT67/MT84/MT79/MT32/MT68/MT69/MT32/MT82/MT69/MT70/MT79/MT82/MT199/MT79/MT32/MT68/MT69/MT32/MT80/MT79/MT84/MT202/MT78/MT67/MT73/MT65/MT32/MT68/MT65/MT32/MT66/MT65/MT82/MT82/MT65/MT71/MT69/MT77/MT32/MT68/MT69/MT32/MT66/MT69/MT77/MT80/MT79/MT83/MT84/MT65 /MT68/MT69/MT83/MT67/MT82/MT73/MT84/MT79/MT82 /MT80/MT65/MT84/MT82/MT73/MT77/MT211/MT78/MT73/MT79/MT32/MT65/MT82/MT81/MT85/MT69/MT79/MT76/MT211/MT71/MT73/MT67/MT79/MT32/MT69/MT32/MT65/MT82/MT81/MT85/MT73/MT84/MT69/MT67/MT84/MT211/MT78/MT73/MT67/MT79 EIA Reforço de Potência da Barragem da Bemposta 1 de 55 Índic...</text:p>
          </table:table-cell>
          <table:table-cell table:number-columns-repeated="1015"/>
        </table:table-row>
        <table:table-row table:style-name="ro1">
          <table:table-cell office:value-type="string">
            <text:p>062_REL_EIA_Picote.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Média</text:p>
          </table:table-cell>
          <table:table-cell office:value-type="string">
            <text:p>Documento PDF; o conteúdo aparenta corresponder a relatório de projeto / intervenção arqueológica / tabela / base de dados. Foram analisadas as primeiras 4 página(s) de um total de 52. Pistas usadas: projecto, escavação, escavacao, descrição, descricao.</text:p>
          </table:table-cell>
          <table:table-cell office:value-type="string">
            <text:p>projecto, escavação, escavacao, descrição, descricao</text:p>
          </table:table-cell>
          <table:table-cell office:value-type="string">
            <text:p>Assinatura PDF</text:p>
          </table:table-cell>
          <table:table-cell office:value-type="string">
            <text:p>D:20060327110811Z D:20060329171411+01'00' Acrobat Distiller 5.0.5 (Windows) RT&amp;VF - Utilizador PScript5.dll Version 5.2.2 062 capa rel IPA.FH10 /MT69/MT83/MT84/MT85/MT68/MT79/MT32/MT68/MT69/MT32/MT73/MT77/MT80/MT65/MT67/MT84/MT69/MT32/MT65/MT77/MT66/MT73/MT69/MT78/MT84/MT65/MT76 /MT80/MT82/MT79/MT74/MT69/MT67/MT84/MT79/MT32/MT68/MT69/MT32/MT82/MT69/MT70/MT79/MT82/MT199/MT79/MT32/MT68/MT69/MT32/MT80/MT79/MT84/MT202/MT78/MT67/MT73/MT65 /MT68/MT65/MT32/MT66/MT65/MT82/MT82/MT65/MT71/MT69/MT77/MT32/MT68/MT79/MT32/MT80/MT73/MT67/MT79/MT84/MT69 /MT68/MT69/MT83/MT67/MT82/MT73/MT84/MT79/MT82 /MT80/MT65/MT84/MT82/MT73/MT77/MT211/MT78/MT73/MT79/MT32/MT65/MT82/MT81/MT85/MT69/MT79/MT76/MT211/MT71/MT73/MT67/MT79/MT32/MT69/MT32/MT65/MT82/MT81/MT85/MT73/MT84/MT69/MT67/MT84/MT211/MT78/MT73/MT67/MT79 EIA – Descritor Património – do Projecto de Reforço de Potência da Barragem do Picote 1 / 42 Índice 1. Introdução ...............................................................................................</text:p>
          </table:table-cell>
          <table:table-cell table:number-columns-repeated="1015"/>
        </table:table-row>
        <table:table-row table:style-name="ro1">
          <table:table-cell office:value-type="string">
            <text:p>063_IA_RNS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8.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101013111153+01'00' Writer OpenOffice.org 3.0 D:20101103165632Z Relatório Final Porto 2010 Intervenção Arqueológica Rampa Nossa Senhora da Saúde Carvalhos 2006/2007 Intervenção Arqueológica na Rampa Nossa Senhora da Saúde FICHA TÉCNICA Projecto nº: 063 COORDENAÇÃO GERAL Ricardo Teixeira, Arqueólogo, Mestre em arqueologia Vítor Fonseca, Arqueólogo COORDENAÇÃO DE PROJECTO TRABALHO DE CAMPO Direcção Ana Maria Oliveira, arqueóloga Arqueólogos César Guedes José Gomes Assistentes de arqueólogo Rodry Mendonça Verónica Biscaia Nilton Nunes Operários de arqueologia Alexandre Pinto Pedro Pinto TRABALHO DE GABINETE Relatório Ana Maria Oliveira Desenho gráfico Ana Paulo, desenhadora de arqueologia Sara Costa, desenhadora de arqueologia Tratamento de espólio Teresa Gonçalves Conservação e restauro Anabela Hipólito Fotografia de espólio Pedro Maia, tecnico superior de património cultural Revisão de texto Teresa Silva, arqueóloga, pós-graduada em Museologia DATA Outubro de 2010 Relatório Final Ou...</text:p>
          </table:table-cell>
          <table:table-cell table:number-columns-repeated="1015"/>
        </table:table-row>
        <table:table-row table:style-name="ro1">
          <table:table-cell office:value-type="string">
            <text:p>063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relatório, relatorio, projecto, sondagem, sondagens, trabalhos arqueológicos, trabalhos arqueologicos.</text:p>
          </table:table-cell>
          <table:table-cell office:value-type="string">
            <text:p>relatório, relatorio, projecto, sondagem, sondagens, trabalhos arqueológicos, trabalhos arqueologicos</text:p>
          </table:table-cell>
          <table:table-cell office:value-type="string">
            <text:p>Assinatura PDF</text:p>
          </table:table-cell>
          <table:table-cell office:value-type="string">
            <text:p>D:20060321140347Z00'00' D:20060321140347Z00'00' Acrobat Distiller 5.0.5 (Windows) RT&amp;VF - Utilizador PScript5.dll Version 5.2 Microsoft Word - 045 Relatorio Pre.doc CONSTRUÇÃO DE MORADIA UNIFAMILIAR RAMPA NOSSA SENHORA DA SAÚDE – CARVALHOS – V. N. GAIA RNSS 06 Sondagens Arqueológicas Relatório Preliminar Relatório Preliminar Sondagens Arqueológicas – Rampa N. Sra. Saúde 2/22 ÍNDICE 1. Introdução .............................................................................................................................3 2. Localização ............................................................................................................................4 3. Objectivos e Metodologia dos Trabalhos..............................................................................6 3.1. Objectivos ................................................................................................................ .............. 6 3.2. Metodologia.....................................................</text:p>
          </table:table-cell>
          <table:table-cell table:number-columns-repeated="1015"/>
        </table:table-row>
        <table:table-row table:style-name="ro1">
          <table:table-cell office:value-type="string">
            <text:p>063_Rel_Prel_2007 06 27rev T.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Writer OpenOffice.org 2.1 D:20070627163444+01'00' Intervenção Arqueológica na Rampa Nossa Srª da Saúde – Vila Nova de Gaia Página 1 de 15 FICHA TÉCNICA COORDENAÇÃO GERAL Ricardo Teixeira, Mestre em Arqueologia Vítor Fonseca, Arqueólogo TRABALHO DE CAMPO Direcção Ana Maria Oliveira, Arqueóloga Equipa Técnica José Gomes, Arqueólogo Verónica Biscaia, Assistente de Arqueóloga Nilton Nunes, Técnica Alexandre Pinto, Trabalhador TRABALHO DE GABINETE Relatório Ana Maria Oliveira Desenho Gráfico Ana Paulo, Desenhadora de arqueologia (Os desenhos das plantas foram feitos a partir das plantas fornecidas pela empresa Engiramos) Revisão Teresa Silva, Arqueóloga, pós-graduada em Museologia Relatório Preliminar Junho de 2007 Intervenção Arqueológica na Rampa Nossa Srª da Saúde – Vila Nova de Gaia Página 2 de 15 ÍNDICE Índice............................................................................................................................................................................. 2 1.I...</text:p>
          </table:table-cell>
          <table:table-cell table:number-columns-repeated="1015"/>
        </table:table-row>
        <table:table-row table:style-name="ro1">
          <table:table-cell office:value-type="string">
            <text:p>065_REST_rel_patologias.pdf</text:p>
          </table:table-cell>
          <table:table-cell office:value-type="string">
            <text:p>.pdf</text:p>
          </table:table-cell>
          <table:table-cell office:value-type="string">
            <text:p>Documento PDF</text:p>
          </table:table-cell>
          <table:table-cell office:value-type="string">
            <text:p>Relatório de projeto</text:p>
          </table:table-cell>
          <table:table-cell office:value-type="string">
            <text:p>Média</text:p>
          </table:table-cell>
          <table:table-cell office:value-type="string">
            <text:p>Documento PDF; o conteúdo aparenta corresponder a tabela / base de dados. Foram analisadas as primeiras 4 página(s) de um total de 9. Pistas usadas: registo, descrição, descricao, valor, estado.</text:p>
          </table:table-cell>
          <table:table-cell office:value-type="string">
            <text:p>registo, descrição, descricao, valor, estado</text:p>
          </table:table-cell>
          <table:table-cell office:value-type="string">
            <text:p>Assinatura PDF</text:p>
          </table:table-cell>
          <table:table-cell office:value-type="string">
            <text:p>D:20061102154305Z00'00' D:20061102154305Z00'00' Acrobat Distiller 5.0.5 (Windows) JoanaBorges PScript5.dll Version 5.2 Microsoft Word - 065 rel patologias rev.doc PROJECTO DE HOTEL E CASINO DE CHAVES RELATÓRIO DO ESTADO DE CONSERVAÇÃO DA ESTRUTURA E ELEMENTOS CONSTITUTIVOS DA BARRAGEM ROMANA DA ABOBOLEIRA 1. ANÁLISE DA ESTRUTURA E DOS ELEMENTOS CONSTITUTIVOS DA BARRAGEM ROMANA O presente Relatório inscreve-se no âmbito do Plano de Monitorização da Barragem Romana da Aboboleira do Projecto de Hotel e Casino, em Chav es. A caracterização e avaliação do estado de conservação destas estruturas, têm como principa l objectivo obter a informação que constituirá a Situação de Referência a partir da qual será possível monitorizar os efeitos da execução do Projecto. 2. METODOLOGIA DE IDENTIFICAÇÃO E CARACTERIZAÇÃO DAS PATOLOGIAS PRESENTES Para a realização do presente Relatório efectuou- se um levantamento e vistoria técnica na área de Conservação e Restauro de Estruturas Arqueológicas. A identi...</text:p>
          </table:table-cell>
          <table:table-cell table:number-columns-repeated="1015"/>
        </table:table-row>
        <table:table-row table:style-name="ro1">
          <table:table-cell office:value-type="string">
            <text:p>066_EIA_Lanhes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2.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60419101730Z D:20060419121835+01'00' Acrobat Distiller 5.0.5 (Windows) RT&amp;VF - Utilizador PScript5.dll Version 5.2.2 Microsoft Word - 066 - lanheses.doc /MT69/MT83/MT84/MT85/MT68/MT79/MT32/MT68/MT69/MT32/MT73/MT77/MT80/MT65/MT67/MT84/MT69/MT32/MT65/MT77/MT66/MT73/MT69/MT78/MT84/MT65/MT76 /MT82/MT69/MT67/MT73/MT65/MT76/MT32/MT45/MT32/MT82/MT69/MT67/MT73/MT67/MT76/MT65/MT71/MT69/MT77/MT32/MT68/MT69/MT32/MT65/MT76/MT85/MT77/MT205/MT78/MT73/MT79/MT32/MT83/MT46/MT65/MT46 EIA Recial – Reciclagem de Alumínio S.A. – Descritor Património Arquitectónico e Arqueológico Pág. 1 de 19 ÍNDICE 1. Introdução ..................................................................................................................... .......................... 2 2. Metodologia do Estudo .......................................................................................................... ............... 3 3. Caracterização da Situação de Referência e Avaliação Patrimonial ..................................</text:p>
          </table:table-cell>
          <table:table-cell table:number-columns-repeated="1015"/>
        </table:table-row>
        <table:table-row table:style-name="ro1">
          <table:table-cell office:value-type="string">
            <text:p>067_ERV06_IA_FORTE_ERVIL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6. Pistas usadas: relatório, relatorio, relatório final, relatorio final, projeto, projecto, intervenção arqueológica, intervencao arqueologica, acompanhamento arqueológico, acompanhamento arqueologico, escavação, escavacao.</text:p>
          </table:table-cell>
          <table:table-cell office:value-type="string">
            <text:p>relatório, relatorio, relatório final, relatorio final, projeto, projecto, intervenção arqueológica, intervencao arqueologica, acompanhamento arqueológico, acompanhamento arqueologico, escavação, escavacao</text:p>
          </table:table-cell>
          <table:table-cell office:value-type="string">
            <text:p>Assinatura PDF</text:p>
          </table:table-cell>
          <table:table-cell office:value-type="string">
            <text:p>GPL Ghostscript 9.14 D:20160829140311+01'00' D:20160829140311+01'00' IPPAR PDF24 Creator NSI-IPPAR-DRF RELATÓRIO FINAL Intervenção Arqueológica Terrenos do Forte – Rua de Fez e Rua Dr. Afonso Baldaia Porto 2006 Copyright © arqueologia e património Matosinhos 2016 EVR. 06 Intervenção Arqueológica – ERV.06 FICHA TÉCNICA Ricardo Teixeira &amp; Vítor Fonseca, Arqueologia Lda. PROJECTO 067 Coordenação geral Ricardo Teixeira, arqueólogo, mestre em arqueologia Vítor Fonseca, arqueólogo Coordenação de projeto Lídia Baptista, mestre em arqueologia (acompanhamento arqueológico) Jorge Fonseca, arqueólogo (escavação arqueológica) TRABALHO DE CAMPO Direção do acompanhamento arqueológico Isabel Andrade, arqueóloga Direção da escavação arqueológica Jorge Fonseca Arqueólogo César Guedes Assistentes de arqueólogo Rodry Mendonça Verónica Biscaia Operários de arqueologia Alexandre Pinto Nilton Nunes Pedro Pinto TRABALHO DE GABINETE Relatório Isabel Andrade (acompanhamento arqueológico) Jorge Fonseca(escavaçã...</text:p>
          </table:table-cell>
          <table:table-cell table:number-columns-repeated="1015"/>
        </table:table-row>
        <table:table-row table:style-name="ro1">
          <table:table-cell office:value-type="string">
            <text:p>067_Rel_Prel_esc.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projecto, intervenção arqueológica, intervencao arqueologica, acompanhamento arqueológico, acompanhamento arqueologico, sondagens, trabalhos arqueológicos, trabalhos arqueologicos.</text:p>
          </table:table-cell>
          <table:table-cell office:value-type="string">
            <text:p>relatório, relatorio, projec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office:value-type="string">
            <text:p>D:20061205123428Z D:20061205143700Z Acrobat Distiller 5.0.5 (Windows) JorgeFonseca PScript5.dll Version 5.2 Microsoft Word - 067 Rel Pre esc.doc /MT83/MT111/MT110/MT100/MT97/MT103/MT101/MT110/MT115/MT32/MT65/MT114/MT113/MT117/MT101/MT111/MT108/MT243/MT103/MT105/MT99/MT97/MT115 /MT81/MT117/MT105/MT110/MT116/MT97/MT32/MT100/MT111/MT32/MT70/MT111/MT114/MT116/MT101/MT32/MT45/MT32/MT69/MT82/MT86/MT46/MT32/MT48/MT54 /MT82/MT101/MT108/MT97/MT116/MT243/MT114/MT105/MT111/MT32/MT80/MT114/MT101/MT108/MT105/MT109/MT105/MT110/MT97/MT114 /MT80/MT111/MT114/MT116/MT111 /MT50/MT48/MT48/MT54 Intervenção Arqueológica – ERV. 06 1 / 25 Índice 1. Introdução .................................................................................................................. ..........................................................2 2. Enquadramento Histórico/ Militar ............................................................................................ .......................................3 3. Sondagen...</text:p>
          </table:table-cell>
          <table:table-cell table:number-columns-repeated="1015"/>
        </table:table-row>
        <table:table-row table:style-name="ro1">
          <table:table-cell office:value-type="string">
            <text:p>068_EIA_Braga.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Alta</text:p>
          </table:table-cell>
          <table:table-cell office:value-type="string">
            <text:p>Documento PDF; o conteúdo aparenta corresponder a relatório de projeto / intervenção arqueológica / desenho / planta / cad. Foram analisadas as primeiras 4 página(s) de um total de 40. Pistas usadas: relatório, relatorio, projecto, prospecção, prospeccao, planta, levantamento, implantação, implantacao.</text:p>
          </table:table-cell>
          <table:table-cell office:value-type="string">
            <text:p>relatório, relatorio, projecto, prospecção, prospeccao, planta, levantamento, implantação, implantacao</text:p>
          </table:table-cell>
          <table:table-cell office:value-type="string">
            <text:p>Assinatura PDF</text:p>
          </table:table-cell>
          <table:table-cell office:value-type="string">
            <text:p>D:20060512152950Z D:20060518151120+01'00' Acrobat Distiller 5.0.5 (Windows) RT&amp;VF - Utilizador PScript5.dll Version 5.2.2 Microsoft Word - 068 forum thetrum braga final.doc /MT69/MT83/MT84/MT85/MT68/MT79/MT32/MT68/MT69/MT32/MT73/MT77/MT80/MT65/MT67/MT84/MT69/MT32/MT65/MT77/MT66/MT73/MT69/MT78/MT84/MT65/MT76 /MT69/MT73/MT65/MT32/MT45/MT32/MT70/MT111/MT114/MT117/MT109/MT32/MT84/MT104/MT101/MT97/MT116/MT114/MT117/MT109/MT32/MT100/MT101/MT32/MT66/MT114/MT97/MT103/MT97 EIA Forum Theatrum de Braga Pág. 1 de 36 ÍNDICE 1. Introdução ..................................................................................................................... .......................... 2 2. Metodologia do Estudo .......................................................................................................... ............... 3 3. Caracterização da Situação de Referência e Avaliação Patrimonial ................................................. 4 3.1. Localização e Área de Incidência do Projecto......</text:p>
          </table:table-cell>
          <table:table-cell table:number-columns-repeated="1015"/>
        </table:table-row>
        <table:table-row table:style-name="ro1">
          <table:table-cell office:value-type="string">
            <text:p>069_EIA_Forum_Evo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4.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60725152554Z D:20060725164916+01'00' Acrobat Distiller 5.0.5 (Windows) RT&amp;VF - Utilizador PScript5.dll Version 5.2.2 Microsoft Word - 069 relat.rio ipa 2006 07 19.doc /MT82/MT69/MT76/MT65/MT84/MT211/MT82/MT73/MT79 /MT69/MT83/MT84/MT85/MT68/MT79/MT32/MT68/MT69/MT32/MT73/MT77/MT80/MT65/MT67/MT84/MT69/MT32/MT65/MT77/MT66/MT73/MT69/MT78/MT84/MT65/MT76 /MT68/MT69/MT83/MT67/MT82/MT73/MT84/MT79/MT82/MT32/MT80/MT65/MT84/MT82/MT73/MT77/MT211/MT78/MT73/MT79/MT32/MT67/MT85/MT76/MT84/MT85/MT82/MT65/MT76 /MT70/MT79/MT82/MT85/MT77/MT32/MT201/MT86/MT79/MT82/MT65 /MT32/MT50/MT48/MT48/MT54 EIA Forum Évora Pág. 1 de 39 ÍNDICE 1. Introdução ..................................................................................................................... .......................... 2 2. Metodologia do Estudo .......................................................................................................... ............... 3 3. Caracterização da Situação de Referência e Avaliação Patrimonial...</text:p>
          </table:table-cell>
          <table:table-cell table:number-columns-repeated="1015"/>
        </table:table-row>
        <table:table-row table:style-name="ro1">
          <table:table-cell office:value-type="string">
            <text:p>070_IA_TEBA_SIF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125. Pistas usadas: relatório, relatorio, relatório final, relatorio final, intervenção arqueológica, intervencao arqueologica, sondagens, espólio, espolio, materiais arqueológicos, materiais arqueologicos, cerâmica, ceramica, contexto.</text:p>
          </table:table-cell>
          <table:table-cell office:value-type="string">
            <text:p>relatório, relatorio, relatório final, relatorio final, intervenção arqueológica, intervencao arqueologica, sondagens, espólio, espolio, materiais arqueológicos, materiais arqueologicos, cerâmica, ceramica, contexto</text:p>
          </table:table-cell>
          <table:table-cell office:value-type="string">
            <text:p>Assinatura PDF</text:p>
          </table:table-cell>
          <table:table-cell office:value-type="string">
            <text:p>D:20080408124619+01'00' Adobe Acrobat 8.1 Combine Files Adobe Acrobat 8.1 D:20080422141311+01'00' RELATÓRIO MAIA - 2008 INTERVENÇÃO ARQUEOLÓGICA LUGAR DA BARCA, SÍTIO DA FORCA Intervenção Arqueológica em TEBA/SIFO - Maia FICHA TÉCNICA COORDENAÇÃO GERAL Ricardo Teixeira, Arqueólogo, Mestre em Arqueologia Vítor Fonseca, Arqueólogo COORDENAÇÃO CIENTÍFICA João Muralha, Arqueólogo, Doutorado em Arqueologia TRABALHO DE CAMPO Direcção Liliana Barbosa, Arqueóloga Arqueólogos Graça Pereira e Jorge Fonseca Assistentes de Arqueólogo Anabela Rodrigues, Bebiana Mota, Gilberto Moura, Ricardo Mota, Sónia Santos, Desenhadores Sara Costa, Rodry Mendonça, Verónica Biscaia TRABALHO DE GABINETE Coordenação dos trabalhos de gabinete Liliana Barbosa Sistematização da informação e organização dos registos Liliana Barbosa Desenho gráfico Ana Paulo e Sara Costa Lavagem e tratamento do espólio Anabela Rodrigues Fotografia de espólio Teresa Silva, arqueóloga, pós-graduada em Museologia RELATÓRIO Contexto históri...</text:p>
          </table:table-cell>
          <table:table-cell table:number-columns-repeated="1015"/>
        </table:table-row>
        <table:table-row table:style-name="ro1">
          <table:table-cell office:value-type="string">
            <text:p>071_EIA_Evora_Retail_Park.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0.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60731173151Z D:20060731183504+01'00' Acrobat Distiller 5.0.5 (Windows) RT&amp;VF - Utilizador PScript5.dll Version 5.2.2 071 capa rel final.FH10 /MT82/MT69/MT76/MT65/MT84/MT211/MT82/MT73/MT79 /MT69/MT83/MT84/MT85/MT68/MT79/MT32/MT68/MT69/MT32/MT73/MT77/MT80/MT65/MT67/MT84/MT69/MT32/MT65/MT77/MT66/MT73/MT69/MT78/MT84/MT65/MT76 /MT68/MT69/MT83/MT67/MT82/MT73/MT84/MT79/MT82/MT32/MT80/MT65/MT84/MT82/MT73/MT77/MT211/MT78/MT73/MT79/MT32/MT67/MT85/MT76/MT84/MT85/MT82/MT65/MT76 /MT201/MT86/MT79/MT82/MT65/MT32/MT82/MT69/MT84/MT65/MT73/MT76/MT32/MT80/MT65/MT82/MT75 /MT32/MT50/MT48/MT48/MT54 EIA Évora Retail Park Pág. 1 de 24 ÍNDICE 1. Introdução ..................................................................................................................... .......................... 2 2. Metodologia do Estudo .......................................................................................................... ............... 3 3. Caracterização da Situação de Referência e Avaliação Pa...</text:p>
          </table:table-cell>
          <table:table-cell table:number-columns-repeated="1015"/>
        </table:table-row>
        <table:table-row table:style-name="ro1">
          <table:table-cell office:value-type="string">
            <text:p>072_EIA_Forum_Guard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9. Pistas usadas: relatório, relatorio, projecto, sondagens, prospecção, prospeccao, memória descritiva, memoria descritiva, trabalhos arqueológicos, trabalhos arqueologicos.</text:p>
          </table:table-cell>
          <table:table-cell office:value-type="string">
            <text:p>relatório, relatorio, projecto, sondagens, prospecção, prospeccao, memória descritiva, memoria descritiva, trabalhos arqueológicos, trabalhos arqueologicos</text:p>
          </table:table-cell>
          <table:table-cell office:value-type="string">
            <text:p>Assinatura PDF</text:p>
          </table:table-cell>
          <table:table-cell office:value-type="string">
            <text:p>D:20060808144945Z D:20060809194824+01'00' Acrobat Distiller 5.0.5 (Windows) RT&amp;VF - Utilizador PScript5.dll Version 5.2.2 Microsoft Word - Anexos Projecto.doc /MT82/MT69/MT76/MT65/MT84/MT211/MT82/MT73/MT79 /MT69/MT83/MT84/MT85/MT68/MT79/MT32/MT68/MT69/MT32/MT73/MT77/MT80/MT65/MT67/MT84/MT69/MT32/MT65/MT77/MT66/MT73/MT69/MT78/MT84/MT65/MT76 /MT68/MT69/MT83/MT67/MT82/MT73/MT84/MT79/MT82/MT32/MT80/MT65/MT84/MT82/MT73/MT77/MT211/MT78/MT73/MT79/MT32/MT67/MT85/MT76/MT84/MT85/MT82/MT65/MT76 /MT70/MT79/MT82/MT85/MT77/MT32/MT84/MT72/MT69/MT65/MT84/MT82/MT85/MT77/MT32/MT68/MT65/MT32/MT71/MT85/MT65/MT82/MT68/MT65 /MT32/MT50/MT48/MT48/MT54 EIA Forum Theatrum da Guarda Pág. 1 de 46 ÍNDICE 1. Introdução ..................................................................................................................... .......................... 2 2. Metodologia do Estudo .......................................................................................................... ............... 3 3. C...</text:p>
          </table:table-cell>
          <table:table-cell table:number-columns-repeated="1015"/>
        </table:table-row>
        <table:table-row table:style-name="ro1">
          <table:table-cell office:value-type="string">
            <text:p>074_C_FONTINH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80923153247+01'00' lilianabarbosa Writer OpenOffice.org 2.1 D:20080923153623+01'00' MODELO DE FORMATAÇÃO Sondagens Arqueológicas Cais da Fontinha - CF 06 Relatório Preliminar Gaia 2006 Intervenção Arqueológica C. Fontinha – Gaia 1 de 20 Índice 1. Introdução ................................................................................................................................ 2 2. Localização .............................................................................................................................. 3 3. Sondagens Arqueológicas ....................................................................................................... 4 4. Espólio ................................................................................................................................... 15 5. Conclusões e Pareceres ......................................................................................................... 18 6. Anexos .........................................</text:p>
          </table:table-cell>
          <table:table-cell table:number-columns-repeated="1015"/>
        </table:table-row>
        <table:table-row table:style-name="ro1">
          <table:table-cell office:value-type="string">
            <text:p>074_e_143_REL_FIN_PD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64.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110125151608Z Writer OpenOffice.org 3.2 D:20110208145145Z Relatório Final Intervenção Arqueológica Cais da Fontinha Santa Marinha – V .N. de Gaia 2006, 2008 e 2010 CF .06 Porto 2011 Intervenção Arqueológica no Cais da Fontinha – Vila Nova de Gaia - CF . 06 FICHA TÉCNICA Projecto nº: 074 e 143 COORDENAÇÃO GERAL Ricardo Teixeira, Arqueólogo, Mestre em arqueologia Vítor Fonseca, arqueólogo COORDENAÇÃO DE PROJECTO Jorge Fonseca, arqueólogo TRABALHO DE CAMPO Direcção de Escavação Graça Pereira, arqueóloga Acompanhamento Arqueológico 2008 Graça Pereira César Guedes, arqueólogo Acompanhamento Arqueológico 2010 Carlos Barbosa, arqueólogo Registo de Edificado César Guedes Teresa Silva, arqueóloga, pós-graduada em Museologia Arqueólogos Ana Oliveira Helena Marçal Assistentes de arqueólogo André Saraiva Bebiana Mota Nelson Vale Ricardo Mota Rodry Mendonça Operários de arqueologia Alexandre Pinto Francisco Monteiro Pedro Pinto TRABALHO DE GABINETE Relatório Graça Pereira e Jorge Fonseca (Escav...</text:p>
          </table:table-cell>
          <table:table-cell table:number-columns-repeated="1015"/>
        </table:table-row>
        <table:table-row table:style-name="ro1">
          <table:table-cell office:value-type="string">
            <text:p>077_EIA_Ma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1.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60713165916Z D:20060713180636+01'00' Acrobat Distiller 5.0.5 (Windows) RT&amp;VF - Utilizador PScript5.dll Version 5.2.2 Microsoft Word - 077 relat.rio ipa.doc /MT82/MT69/MT76/MT65/MT84/MT211/MT82/MT73/MT79 /MT69/MT83/MT84/MT85/MT68/MT79/MT32/MT68/MT69/MT32/MT73/MT77/MT80/MT65/MT67/MT84/MT69/MT32/MT65/MT77/MT66/MT73/MT69/MT78/MT84/MT65/MT76 /MT68/MT69/MT83/MT67/MT82/MT73/MT84/MT79/MT82/MT32/MT80/MT65/MT84/MT82/MT73/MT77/MT211/MT78/MT73/MT79/MT32/MT67/MT85/MT76/MT84/MT85/MT82/MT65/MT76 /MT70/MT79/MT82/MT85/MT77/MT32/MT84/MT72/MT69/MT65/MT84/MT82/MT85/MT77/MT32/MT68/MT65/MT32/MT77/MT65/MT73/MT65 /MT80/MT79/MT82/MT84/MT79/MT32/MT50/MT48/MT48/MT54 EIA Forum Theatrum da Maia Pág. 1 de 17 ÍNDICE 1. Introdução ..................................................................................................................... .......................... 2 2. Metodologia do Estudo .......................................................................................................... ..........</text:p>
          </table:table-cell>
          <table:table-cell table:number-columns-repeated="1015"/>
        </table:table-row>
        <table:table-row table:style-name="ro1">
          <table:table-cell office:value-type="string">
            <text:p>078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079_EIA_Caldas_da_Rain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aparenta corresponder a relatório de projeto / intervenção arqueológica. Foram analisadas as primeiras 4 página(s) de um total de 43. Pistas usadas: projecto.</text:p>
          </table:table-cell>
          <table:table-cell office:value-type="string">
            <text:p>projecto</text:p>
          </table:table-cell>
          <table:table-cell office:value-type="string">
            <text:p>Assinatura PDF</text:p>
          </table:table-cell>
          <table:table-cell office:value-type="string">
            <text:p>D:20060920142929Z D:20060920162754+01'00' Acrobat Distiller 5.0.5 (Windows) RT&amp;VF - Utilizador PScript5.dll Version 5.2.2 079 capa rel final.FH10 /MT82/MT69/MT76/MT65/MT84/MT211/MT82/MT73/MT79 /MT69/MT83/MT84/MT85/MT68/MT79/MT32/MT68/MT69/MT32/MT73/MT77/MT80/MT65/MT67/MT84/MT69/MT32/MT65/MT77/MT66/MT73/MT69/MT78/MT84/MT65/MT76 /MT68/MT69/MT83/MT67/MT82/MT73/MT84/MT79/MT82/MT32/MT80/MT65/MT84/MT82/MT73/MT77/MT211/MT78/MT73/MT79/MT32/MT67/MT85/MT76/MT84/MT85/MT82/MT65/MT76 /MT70/MT79/MT82/MT85/MT77/MT32/MT84/MT72/MT69/MT65/MT84/MT82/MT85/MT77/MT32/MT67/MT65/MT76/MT68/MT65/MT83/MT32/MT68/MT65/MT32/MT82/MT65/MT73/MT78/MT72/MT65 /MT32/MT50/MT48/MT48/MT54 EIA Forum Theatrum Caldas da Rainha Pág. 1 de 38 ÍNDICE 1. Introdução ..................................................................................................................... .......................... 2 2. Metodologia do Estudo .......................................................................................................</text:p>
          </table:table-cell>
          <table:table-cell table:number-columns-repeated="1015"/>
        </table:table-row>
        <table:table-row table:style-name="ro1">
          <table:table-cell office:value-type="string">
            <text:p>080_IA_GNC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Sergio Gomes D:20100901121313+01'00' Adobe Acrobat Pro Extended 9.0.0 D:20100901121313+01'00' Adobe Acrobat Pro Extended 9.0.0 Relatório Final Porto 2010 Infra-estruturas para Gás Natural no Centro Histórico de Chaves GNC 06 Infra-estruturas para Gás Natural no Centro Histórico de Chaves GNC 06 FICHA TÉCNICA COORDENAÇÃO GERAL Ricardo Teixeira, Arqueólogo, Mestre em arqueologia Vítor Fonseca, Arqueólogo TRABALHO DE CAMPO Direcção Lídia Baptista Arqueólogo Isabel Andrade Assistentes de arqueólogo Rodry Mendonça Operários de arqueologia Leandro Costa TRABALHO DE GABINETE Relatório Lídia Baptista Desenho gráfico Rodry Mendonça Lídia Baptista Tratamento de espólio Verónica Biscaia Fotografia de espólio Rodry Mendonça Apoio técnico e revisão de texto Lídia Baptista DATA 8 de Setembro de 2010 Relatório Final Setembro de 2010 Página 3 de 25 Infra-estruturas para Gás Natural no Centro Histórico de Chaves GNC 06 Índice 1.Introdução....................................................................</text:p>
          </table:table-cell>
          <table:table-cell table:number-columns-repeated="1015"/>
        </table:table-row>
        <table:table-row table:style-name="ro1">
          <table:table-cell office:value-type="string">
            <text:p>081_IA_GFR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0. Pistas usadas: relatório, relatorio, relatório final, relatorio final, acompanhamento arqueológico, acompanhamento arqueologico, trabalhos arqueológicos, trabalhos arqueologicos.</text:p>
          </table:table-cell>
          <table:table-cell office:value-type="string">
            <text:p>relatório, relatorio, relatório final, relatorio final, acompanhamento arqueológico, acompanhamento arqueologico, trabalhos arqueológicos, trabalhos arqueologicos</text:p>
          </table:table-cell>
          <table:table-cell office:value-type="string">
            <text:p>Assinatura PDF</text:p>
          </table:table-cell>
          <table:table-cell office:value-type="string">
            <text:p>D:20070629100111+01'00' D:20070629100111+01'00' RELATÓRIO FAFE - 2007 ACOMPANHAMENTO ARQUEOLÓGICO PARCELA 48 DO INTERCEPTOR DE VIZELA FAFE / BRAGA Acompanhamento Arqueológico do Interceptor de Vizela Página 1 de 16 FICHA TÉCNICA COORDENAÇÃO Ricardo Teixeira e Vítor Fonseca TRABALHO DE CAMPO Liliana Barbosa e Vítor Fonseca TRABALHO DE GABINETE Relatório do Acompanhamento Arqueológico Liliana Barbosa Revisão Teresa Silva Porto, 28 de Junho de 2007 Relatório Final Junho de 2007 Acompanhamento Arqueológico do Interceptor de Vizela Página 2 de 16 ÍNDICE 1. Introdução................................................................................................................................... 3 2. Localização................................................................................................................................. 4 3. Enquadramento Histórico ...........................................................................................................6 4. Objectivos e...</text:p>
          </table:table-cell>
          <table:table-cell table:number-columns-repeated="1015"/>
        </table:table-row>
        <table:table-row table:style-name="ro1">
          <table:table-cell office:value-type="string">
            <text:p>082_IA_INF_119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1. Pistas usadas: relatório, relatorio, relatório final, relatorio final, projecto, intervenção arqueológica, intervencao arqueologica, sondagem, sondagens, trabalhos arqueológicos, trabalhos arqueologicos.</text:p>
          </table:table-cell>
          <table:table-cell office:value-type="string">
            <text:p>relatório, relatorio, relatório final, relatorio final, projecto, intervenção arqueológica, intervencao arqueologica, sondagem, sondagens, trabalhos arqueológicos, trabalhos arqueologicos</text:p>
          </table:table-cell>
          <table:table-cell office:value-type="string">
            <text:p>Assinatura PDF</text:p>
          </table:table-cell>
          <table:table-cell office:value-type="string">
            <text:p>D:20080916134446+01'00' Writer OpenOffice.org 2.1 D:20080916140130+01'00' RELATÓRIO PORTO - 2008 INTERVENÇÃO ARQUEOLÓGICA RUA INFANTE D.HENRIQUE N.º 119 - 123 S. NICOLAU, PORTO INF. 119.06 Intervenção Arqueológica na Rua do Infante D. Henrique nº 119 e 123 – INF 119. 06 FICHA TÉCNICA COORDENAÇÃO GERAL Ricardo Teixeira Vítor Fonseca COORDENAÇÃO DE PROJECTO Jorge Fonseca TRABALHO DE CAMPO Direcção Jorge Fonseca Arqueólogo César Guedes Desenho Sara Costa Operários de arqueologia Alexandre Pinto Nilton Nunes TRABALHO DE GABINETE Introdução Histórica Jorge Fonseca Descrição e interpretação da intervenção arqueológica Jorge Fonseca Fotografia de espólio Jorge Fonseca Pedro Maia Tratamento de espólio Anabela Rodrigues Teresa Gonçalves Desenho gráfico Ana Paulo Rodry Mendonça Revisão Teresa Silva DATA 15 de Setembro de 2008 Relatório Final Setembro de 2008 Página 1 de 20 Intervenção Arqueológica na Rua do Infante D. Henrique nº 119 e 123 – INF 119. 06 Índice 1.Introdução..........................</text:p>
          </table:table-cell>
          <table:table-cell table:number-columns-repeated="1015"/>
        </table:table-row>
        <table:table-row table:style-name="ro1">
          <table:table-cell office:value-type="string">
            <text:p>082_Infante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70126160808Z D:20070126161503Z Acrobat Distiller 5.0.5 (Windows) Jorgefonseca PScript5.dll Version 5.2 Microsoft Word - 082 Rel Pre esc.doc /MT82/MT101/MT108/MT97/MT116/MT243/MT114/MT105/MT111/MT32/MT80/MT114/MT101/MT108/MT105/MT109/MT105/MT110/MT97/MT114 /MT32/MT32/MT83/MT111/MT110/MT100/MT97/MT103/MT101/MT110/MT115/MT32/MT65/MT114/MT113/MT117/MT101/MT111/MT108/MT243/MT103/MT105/MT99/MT97/MT115 /MT69/MT100/MT105/MT102/MT237/MT99/MT105/MT111/MT32/MT45/MT32/MT82/MT117/MT97/MT32/MT73/MT110/MT102/MT97/MT110/MT116/MT101/MT32/MT68/MT46/MT32/MT72/MT101/MT110/MT114/MT105/MT113/MT117/MT101 /MT110/MT186/MT32/MT49/MT49/MT57/MT45/MT49/MT50/MT51/MT44/MT32/MT80/MT111/MT114/MT116/MT111 /MT73/MT78/MT70/MT32/MT49/MT49/MT57/MT46/MT32/MT48/MT54 /MT50/MT48/MT48/MT54 Intervenção Arqueológica – INF 119.06 1 / 15 Índice 1. Introdução .................................................................................................................. ...........................................................</text:p>
          </table:table-cell>
          <table:table-cell table:number-columns-repeated="1015"/>
        </table:table-row>
        <table:table-row table:style-name="ro1">
          <table:table-cell office:value-type="string">
            <text:p>082_Rel_Prel_esc.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70126160808Z D:20070126161503Z Acrobat Distiller 5.0.5 (Windows) Jorgefonseca PScript5.dll Version 5.2 Microsoft Word - 082 Rel Pre esc.doc /MT82/MT101/MT108/MT97/MT116/MT243/MT114/MT105/MT111/MT32/MT80/MT114/MT101/MT108/MT105/MT109/MT105/MT110/MT97/MT114 /MT32/MT32/MT83/MT111/MT110/MT100/MT97/MT103/MT101/MT110/MT115/MT32/MT65/MT114/MT113/MT117/MT101/MT111/MT108/MT243/MT103/MT105/MT99/MT97/MT115 /MT69/MT100/MT105/MT102/MT237/MT99/MT105/MT111/MT32/MT45/MT32/MT82/MT117/MT97/MT32/MT73/MT110/MT102/MT97/MT110/MT116/MT101/MT32/MT68/MT46/MT32/MT72/MT101/MT110/MT114/MT105/MT113/MT117/MT101 /MT110/MT186/MT32/MT49/MT49/MT57/MT45/MT49/MT50/MT51/MT44/MT32/MT80/MT111/MT114/MT116/MT111 /MT73/MT78/MT70/MT32/MT49/MT49/MT57/MT46/MT32/MT48/MT54 /MT50/MT48/MT48/MT54 Intervenção Arqueológica – INF 119.06 1 / 15 Índice 1. Introdução .................................................................................................................. ...........................................................</text:p>
          </table:table-cell>
          <table:table-cell table:number-columns-repeated="1015"/>
        </table:table-row>
        <table:table-row table:style-name="ro1">
          <table:table-cell office:value-type="string">
            <text:p>083_EIA_DV_Braga.pdf</text:p>
          </table:table-cell>
          <table:table-cell office:value-type="string">
            <text:p>.pdf</text:p>
          </table:table-cell>
          <table:table-cell office:value-type="string">
            <text:p>Documento PDF</text:p>
          </table:table-cell>
          <table:table-cell office:value-type="string">
            <text:p>Relatório de projeto</text:p>
          </table:table-cell>
          <table:table-cell office:value-type="string">
            <text:p>Média</text:p>
          </table:table-cell>
          <table:table-cell office:value-type="string">
            <text:p>Documento PDF; o conteúdo aparenta corresponder a desenho / planta / cad. Foram analisadas as primeiras 4 página(s) de um total de 39. Pistas usadas: planta, implantação, implantacao.</text:p>
          </table:table-cell>
          <table:table-cell office:value-type="string">
            <text:p>planta, implantação, implantacao</text:p>
          </table:table-cell>
          <table:table-cell office:value-type="string">
            <text:p>Assinatura PDF</text:p>
          </table:table-cell>
          <table:table-cell office:value-type="string">
            <text:p>D:20061215160658Z D:20061218181912Z Acrobat Distiller 5.0.5 (Windows) teresasilva PScript5.dll Version 5.2.2 079 capa rel final.FH10 /MT82/MT69/MT76/MT65/MT84/MT211/MT82/MT73/MT79 /MT69/MT83/MT84/MT85/MT68/MT79/MT32/MT68/MT69/MT32/MT73/MT77/MT80/MT65/MT67/MT84/MT69/MT32/MT65/MT77/MT66/MT73/MT69/MT78/MT84/MT65/MT76 /MT68/MT69/MT83/MT67/MT82/MT73/MT84/MT79/MT82/MT32/MT80/MT65/MT84/MT82/MT73/MT77/MT211/MT78/MT73/MT79/MT32/MT67/MT85/MT76/MT84/MT85/MT82/MT65/MT76 /MT68/MT79/MT76/MT67/MT69/MT32/MT86/MT73/MT84/MT65/MT32/MT68/MT69/MT32/MT66/MT82/MT65/MT71/MT65 /MT32/MT68/MT69/MT90/MT69/MT77/MT66/MT82/MT79/MT32/MT68/MT69/MT32/MT50/MT48/MT48/MT54 EIA Dolce Vita de Braga Pág. 1 de 28 ÍNDICE 1. Introdução ..................................................................................................................... .......................... 2 2. Metodologia do Estudo .......................................................................................................... ............... 6...</text:p>
          </table:table-cell>
          <table:table-cell table:number-columns-repeated="1015"/>
        </table:table-row>
        <table:table-row table:style-name="ro1">
          <table:table-cell office:value-type="string">
            <text:p>085_2012_12_0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4.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21205103907Z 085 2012 04 13d PScript5.dll Version 5.2.2 D:20121205010036 GPL Ghostscript 8.15 Pedro Intervenção Arqueológica Arquivo Municipal de Chaves – AMC.07 FICHA TÉCNICA Ricardo Teixeira &amp; Vítor Fonseca, Arqueologia Lda. PROJECTO 085 Coordenação geral Ricardo Teixeira, arqueólogo, mestre em arqueologia Vítor Fonseca, arqueólogo Trabalho de Campo Direção César Guedes, arqueólogo Arqueólogos Helena Marçal, arqueóloga João Ribeiro, arqueólogo Jorge Fonseca, arqueólogo Assistentes de arqueólogo Bebiana Mota, assistente de arqueólogo Ricardo Mota, assistente de arqueólogo Rodry Mendonça Operários de arqueologia Pedro Pinto Colaboração de 4 operários da empresa de Construção Civil Trabalho de Gabinete Coordenação Teresa Silva, arqueóloga, pós-graduada em museologia Relatório César Guedes (redação de texto) Teresa Silva (montagem e revisão de texto) Rui Oliveira (design do modelo) Pedro Maia (revisão de texto) Estudo de espólio César Guedes Ana Maria Oliveira Desenho gráfico Rui Ol...</text:p>
          </table:table-cell>
          <table:table-cell table:number-columns-repeated="1015"/>
        </table:table-row>
        <table:table-row table:style-name="ro1">
          <table:table-cell office:value-type="string">
            <text:p>085_Inf_prel (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intervenção arqueológica, intervencao arqueologica, acompanhamento arqueológico, acompanhamento arqueologico, escavação, escavacao, sondagem, sondagens, trabalhos arqueológicos, trabalhos arqueologicos.</text:p>
          </table:table-cell>
          <table:table-cell office:value-type="string">
            <text:p>intervenção arqueológica, intervencao arqueologica, acompanhamento arqueológico, acompanhamento arqueologico, escavação, escavacao, sondagem, sondagens, trabalhos arqueológicos, trabalhos arqueologicos</text:p>
          </table:table-cell>
          <table:table-cell office:value-type="string">
            <text:p>Assinatura PDF</text:p>
          </table:table-cell>
          <table:table-cell office:value-type="string">
            <text:p>D:20070309100311Z00'00' D:20070309100311Z00'00' Acrobat Distiller 5.0.5 (Windows) RTVF PScript5.dll Version 5.2 Microsoft Word - 085 Informaçãp preliminar.doc Informação Preliminar dos Trabalhos Arqueológicos 1 de 22 Arquivo Histórico Municipal de Chaves – AMC.07 ÍNDICE: 1. Introdução ...................................................................................................................................... 2 1.1. Localização, Contexto e objectivos da intervenção..................................................................... 2 2. Metodologia.................................................................................................................... ................ 4 3. Acompanhamento arqueológico ................................................................................................... 4 4. Resultados das sondagens Arqueológicas .................................................................................... 7 4.1. Sondagem o1..........................</text:p>
          </table:table-cell>
          <table:table-cell table:number-columns-repeated="1015"/>
        </table:table-row>
        <table:table-row table:style-name="ro1">
          <table:table-cell office:value-type="string">
            <text:p>085_INF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 Pistas usadas: relatório, relatorio, projecto, intervenção arqueológica, intervencao arqueologica, acompanhamento arqueológico, acompanhamento arqueologico, escavação, escavacao, sondagens.</text:p>
          </table:table-cell>
          <table:table-cell office:value-type="string">
            <text:p>relatório, relatorio,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Writer OpenOffice.org 2.1 D:20070827152341+01'00' Intervenção Arqueológica na Rua do Bispo Idácio, Chaves, Arquivo Histórico Municipal de Chaves. AMC.07 FICHA TÉCNICA COORDENAÇÃO GERAL Ricardo Teixeira, Mestre em Arqueologia Vítor Fonseca, Arqueólogo TRABALHO DE CAMPO Direcção César Guedes, Arqueólogo Arqueólogos Helena Marçal, Arqueóloga João Ribeiro, Arqueólogo Jorge Fonseca, Arqueólogo Assistentes de arqueólogo Bebiana Mota, Assistente de Arqueólogo Ricardo Mota, Assistente de Arqueólogo Rodry Mendonça, Assistente de Arqueólogo Operário de Arqueologia Pedro Pinto Colaboração de 4 operários da empresa de Construção Civil TRABALHO DE GABINETE Relatório César Guedes Desenho Gráfico Ana Paulo Rodry Mendonça Fotografia de Espólio Revisão Teresa Silva, Arqueóloga, Pós-graduada em Museologia DATA 24 de Agosto de 2007 Relatório Preliminar Agosto de 2007 Página 1 de 18 Intervenção Arqueológica na Rua do Bispo Idácio, Chaves, Arquivo Histórico Municipal de Chaves. AMC.07 Índice 1.Introdução.....</text:p>
          </table:table-cell>
          <table:table-cell table:number-columns-repeated="1015"/>
        </table:table-row>
        <table:table-row table:style-name="ro1">
          <table:table-cell office:value-type="string">
            <text:p>085_Inf_prel_tud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intervenção arqueológica, intervencao arqueologica, acompanhamento arqueológico, acompanhamento arqueologico, escavação, escavacao, sondagem, sondagens, trabalhos arqueológicos, trabalhos arqueologicos.</text:p>
          </table:table-cell>
          <table:table-cell office:value-type="string">
            <text:p>intervenção arqueológica, intervencao arqueologica, acompanhamento arqueológico, acompanhamento arqueologico, escavação, escavacao, sondagem, sondagens, trabalhos arqueológicos, trabalhos arqueologicos</text:p>
          </table:table-cell>
          <table:table-cell office:value-type="string">
            <text:p>Assinatura PDF</text:p>
          </table:table-cell>
          <table:table-cell office:value-type="string">
            <text:p>D:20070309100311Z00'00' D:20070309100311Z00'00' Acrobat Distiller 5.0.5 (Windows) RTVF PScript5.dll Version 5.2 Microsoft Word - 085 Informaçãp preliminar.doc Informação Preliminar dos Trabalhos Arqueológicos 1 de 22 Arquivo Histórico Municipal de Chaves – AMC.07 ÍNDICE: 1. Introdução ...................................................................................................................................... 2 1.1. Localização, Contexto e objectivos da intervenção..................................................................... 2 2. Metodologia.................................................................................................................... ................ 4 3. Acompanhamento arqueológico ................................................................................................... 4 4. Resultados das sondagens Arqueológicas .................................................................................... 7 4.1. Sondagem o1..........................</text:p>
          </table:table-cell>
          <table:table-cell table:number-columns-repeated="1015"/>
        </table:table-row>
        <table:table-row table:style-name="ro1">
          <table:table-cell office:value-type="string">
            <text:p>086_BRP_FCH1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70216094848Z D:20070216112638Z Acrobat Distiller 5.0.5 (Windows) gracapereira PScript5.dll Version 5.2.2 MODELO DE FORMATA..O /MT82/MT69/MT76/MT65/MT84/MT211/MT82/MT73/MT79 /MT66/MT69/MT74/MT65/MT32/MT45/MT32/MT50/MT48/MT48/MT55 /MT83/MT79/MT78/MT68/MT65/MT71/MT69/MT78/MT83/MT32/MT65/MT82/MT81/MT85/MT69/MT79/MT76/MT211/MT71/MT73/MT67/MT65/MT83 /MT66/MT76/MT79/MT67/MT79/MT32/MT68/MT69/MT32/MT82/MT69/MT71/MT65/MT32/MT68/MT79/MT32/MT80/MT73/MT83/MT195/MT79/MT32/MT45/MT32/MT66/MT76/MT79/MT67/MT79/MT32/MT65 /MT70/MT85/MT78/MT67/MT72/MT65/MT73/MT83/MT32/MT49/MT32/MT45/MT32/MT70/MT67/MT72/MT49/MT46/MT48/MT55 /MT40/MT66/MT69/MT82/MT73/MT78/MT71/MT69/MT76/MT44/MT32/MT66/MT69/MT74/MT65/MT41 Intervenção Arqueológica em Funchais 1 – FCH1.07 1 de 20 Índice 1. Introdução ..................................................................................................... ............................................. 2 2. A Intervenção Arqueológica ..................................................</text:p>
          </table:table-cell>
          <table:table-cell table:number-columns-repeated="1015"/>
        </table:table-row>
        <table:table-row table:style-name="ro1">
          <table:table-cell office:value-type="string">
            <text:p>086_BRP_MM3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5.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70214155604Z D:20070221152808Z Acrobat Distiller 5.0.5 (Windows) anpaulo PScript5.dll Version 5.2.2 086 MM3 rel.FH10 /MT82/MT69/MT76/MT65/MT84/MT211/MT82/MT73/MT79 /MT66/MT69/MT74/MT65/MT32/MT45/MT32/MT50/MT48/MT48/MT55 /MT83/MT79/MT78/MT68/MT65/MT71/MT69/MT78/MT83/MT32/MT65/MT82/MT81/MT85/MT69/MT79/MT76/MT211/MT71/MT73/MT67/MT65/MT83 /MT66/MT76/MT79/MT67/MT79/MT32/MT68/MT69/MT32/MT82/MT69/MT71/MT65/MT32/MT68/MT79/MT32/MT80/MT73/MT83/MT195/MT79/MT32/MT45/MT32/MT66/MT76/MT79/MT67/MT79/MT32/MT65 /MT77/MT79/MT78/MT84/MT69/MT32/MT68/MT79/MT32/MT77/MT65/MT82/MT81/MT85/MT202/MT83/MT32/MT51/MT32/MT45/MT32/MT77/MT77/MT51/MT46/MT48/MT55 /MT40/MT66/MT69/MT82/MT73/MT78/MT71/MT69/MT76/MT44/MT32/MT66/MT69/MT74/MT65/MT41 Intervenção Arqueológica no Monte do Marquês 3 – MM3.07 1 de 24 Índice 1. Introdução ..................................................................................................................... .................................... 2 2. Intervenção Arqueológica............</text:p>
          </table:table-cell>
          <table:table-cell table:number-columns-repeated="1015"/>
        </table:table-row>
        <table:table-row table:style-name="ro1">
          <table:table-cell office:value-type="string">
            <text:p>086_BRP_MM6_07.pdf</text:p>
          </table:table-cell>
          <table:table-cell office:value-type="string">
            <text:p>.pdf</text:p>
          </table:table-cell>
          <table:table-cell office:value-type="string">
            <text:p>Documento PDF</text:p>
          </table:table-cell>
          <table:table-cell office:value-type="string">
            <text:p>Relatório de projeto / intervenção arqueológica / Lista / inventário de espólio</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1613Z D:20070216105348Z Acrobat Distiller 5.0.5 (Windows) LIDIABAPTISTA PScript5.dll Version 5.2 Microsoft Word - 086 BRP MM6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77/MT79/MT78/MT84/MT69/MT32/MT68/MT79/MT32/MT77/MT65/MT82/MT81/MT85/MT202/MT83/MT32/MT54 /MT77/MT77/MT54/MT46/MT48/MT55 Intervenção Arqueológica em Monte do Marquês 6 – MM6.07 1 de 10 Índice 1. Introdução ..................................................................................................................... .................................... 2 2. Intervenção Arqueológica..............................................................................................</text:p>
          </table:table-cell>
          <table:table-cell table:number-columns-repeated="1015"/>
        </table:table-row>
        <table:table-row table:style-name="ro1">
          <table:table-cell office:value-type="string">
            <text:p>086_BRP_MM6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projecto, intervenção arqueológica, intervencao arqueologica, escavação, escavacao, sondagem, sondagens.</text:p>
          </table:table-cell>
          <table:table-cell office:value-type="string">
            <text:p>relatório, relatorio, projecto, intervenção arqueológica, intervencao arqueologica, escavação, escavacao, sondagem, sondagens</text:p>
          </table:table-cell>
          <table:table-cell office:value-type="string">
            <text:p>Assinatura PDF</text:p>
          </table:table-cell>
          <table:table-cell office:value-type="string">
            <text:p>D:20070201135653Z D:20070201142027Z Acrobat Distiller 5.0.5 (Windows) teresasilva PScript5.dll Version 5.2.2 Microsoft Word - 086 BRP MM6 07_Monte do Marques 6.doc /MT66/MT108/MT111/MT99/MT111/MT32/MT100/MT101/MT32/MT82/MT101/MT103/MT97/MT32/MT100/MT111/MT32/MT80/MT105/MT115/MT227/MT111/MT32/MT45/MT32/MT66/MT108/MT111/MT99/MT111/MT32/MT65 /MT83/MT111/MT110/MT100/MT97/MT103/MT101/MT110/MT115/MT32/MT77/MT101/MT99/MT226/MT110/MT105/MT99/MT97/MT115 /MT77/MT111/MT110/MT116/MT101/MT32/MT100/MT111/MT32/MT77/MT97/MT114/MT113/MT117/MT234/MT115/MT32/MT54 /MT77/MT77/MT54/MT46/MT48/MT55 /MT82/MT101/MT108/MT97/MT116/MT243/MT114/MT105/MT111/MT32/MT80/MT114/MT101/MT108/MT105/MT109/MT105/MT110/MT97/MT114 /MT66/MT101/MT106/MT97 /MT50/MT48/MT48/MT55 Intervenção Arqueológica em Monte do Marquês 6 – MM6.07 1 de 10 Índice 1. Introdução ..................................................................................................................... .................................... 2 2. Intervenção A...</text:p>
          </table:table-cell>
          <table:table-cell table:number-columns-repeated="1015"/>
        </table:table-row>
        <table:table-row table:style-name="ro1">
          <table:table-cell office:value-type="string">
            <text:p>086_BRP_MMV4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1.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70214154342Z D:20070216104315Z Acrobat Distiller 5.0.5 (Windows) anpaulo PScript5.dll Version 5.2.2 086 MMV4 rel.FH10 /MT82/MT69/MT76/MT65/MT84/MT211/MT82/MT73/MT79 /MT66/MT69/MT74/MT65/MT32/MT45/MT32/MT50/MT48/MT48/MT55 /MT83/MT79/MT78/MT68/MT65/MT71/MT69/MT78/MT83/MT32/MT65/MT82/MT81/MT85/MT69/MT79/MT76/MT211/MT71/MT73/MT67/MT65/MT83 /MT66/MT76/MT79/MT67/MT79/MT32/MT68/MT69/MT32/MT82/MT69/MT71/MT65/MT32/MT68/MT79/MT32/MT80/MT73/MT83/MT195/MT79/MT32/MT45/MT32/MT66/MT76/MT79/MT67/MT79/MT32/MT65 /MT77/MT79/MT78/MT84/MT69/MT32/MT77/MT79/MT78/MT86/MT69/MT83/MT84/MT73/MT68/MT79/MT32/MT52/MT32/MT45/MT32/MT77/MT77/MT86/MT52/MT46/MT48/MT55 /MT40/MT83/MT195/MT79/MT32/MT66/MT82/MT73/MT83/MT83/MT79/MT83/MT44/MT32/MT66/MT69/MT74/MT65/MT41 Intervenção Arqueológica no Monte Monvestido 4 – MMV4. 07 1 de 11 Índice 1. Introdução ..................................................................................................................... .................................... 2 2. A Interven...</text:p>
          </table:table-cell>
          <table:table-cell table:number-columns-repeated="1015"/>
        </table:table-row>
        <table:table-row table:style-name="ro1">
          <table:table-cell office:value-type="string">
            <text:p>086_BRP_MM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1729Z D:20070216122402Z Acrobat Distiller 5.0.5 (Windows) LIDIABAPTISTA PScript5.dll Version 5.2 Microsoft Word - 086 BRP MM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77/MT79/MT78/MT84/MT69/MT32/MT68/MT79/MT32/MT77/MT65/MT82/MT81/MT85/MT202/MT83 /MT77/MT77/MT46/MT48/MT55 Intervenção Arqueológica em Monte do Marquês – MM.07 1 de 10 Índice 1. Introdução ..................................................................................................................... .................................... 2 2. Intervenção Arqueológica....................................................................................................... .........</text:p>
          </table:table-cell>
          <table:table-cell table:number-columns-repeated="1015"/>
        </table:table-row>
        <table:table-row table:style-name="ro1">
          <table:table-cell office:value-type="string">
            <text:p>086_BRP_MM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projecto, intervenção arqueológica, intervencao arqueologica, escavação, escavacao, sondagem, sondagens.</text:p>
          </table:table-cell>
          <table:table-cell office:value-type="string">
            <text:p>relatório, relatorio, projecto, intervenção arqueológica, intervencao arqueologica, escavação, escavacao, sondagem, sondagens</text:p>
          </table:table-cell>
          <table:table-cell office:value-type="string">
            <text:p>Assinatura PDF</text:p>
          </table:table-cell>
          <table:table-cell office:value-type="string">
            <text:p>D:20070201135854Z D:20070201142904Z Acrobat Distiller 5.0.5 (Windows) teresasilva PScript5.dll Version 5.2.2 Microsoft Word - 086 BRP MM 07_Monte do Marques.doc /MT66/MT108/MT111/MT99/MT111/MT32/MT100/MT101/MT32/MT82/MT101/MT103/MT97/MT32/MT100/MT111/MT32/MT80/MT105/MT115/MT227/MT111/MT32/MT45/MT32/MT66/MT108/MT111/MT99/MT111/MT32/MT65 /MT83/MT111/MT110/MT100/MT97/MT103/MT101/MT110/MT115/MT32/MT77/MT101/MT99/MT226/MT110/MT105/MT99/MT97/MT115 /MT77/MT111/MT110/MT116/MT101/MT32/MT100/MT111/MT32/MT77/MT97/MT114/MT113/MT117/MT234/MT115 /MT77/MT77/MT46/MT48/MT55 /MT82/MT101/MT108/MT97/MT116/MT243/MT114/MT105/MT111/MT32/MT80/MT114/MT101/MT108/MT105/MT109/MT105/MT110/MT97/MT114 /MT66/MT101/MT106/MT97 /MT50/MT48/MT48/MT55 Intervenção Arqueológica em Monte do Marquês MM.07___________ 1 de 10 Índice 1 Introdução..................................................................................................................... .......................................... 2 2 Intervenção Arqueológi...</text:p>
          </table:table-cell>
          <table:table-cell table:number-columns-repeated="1015"/>
        </table:table-row>
        <table:table-row table:style-name="ro1">
          <table:table-cell office:value-type="string">
            <text:p>086_BRP_RA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29.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2615Z D:20070216122951Z Acrobat Distiller 5.0.5 (Windows) LIDIABAPTISTA PScript5.dll Version 5.2 Microsoft Word - 086 BRP RA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82/MT73/MT66/MT69/MT73/MT82/MT65/MT32/MT68/MT69/MT32/MT193/MT76/MT65/MT77/MT79 /MT82/MT65/MT46/MT48/MT55 Intervenção Arqueológica em Ribeira de Álamo RA.07 1 de 9 Índice 1. Introdução ..................................................................................................................... .................................... 2 2. Intervenção Arqueológica....................................................................................................... ............</text:p>
          </table:table-cell>
          <table:table-cell table:number-columns-repeated="1015"/>
        </table:table-row>
        <table:table-row table:style-name="ro1">
          <table:table-cell office:value-type="string">
            <text:p>086_BRP_RA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projecto, intervenção arqueológica, intervencao arqueologica, escavação, escavacao, sondagem, sondagens.</text:p>
          </table:table-cell>
          <table:table-cell office:value-type="string">
            <text:p>relatório, relatorio, projecto, intervenção arqueológica, intervencao arqueologica, escavação, escavacao, sondagem, sondagens</text:p>
          </table:table-cell>
          <table:table-cell office:value-type="string">
            <text:p>Assinatura PDF</text:p>
          </table:table-cell>
          <table:table-cell office:value-type="string">
            <text:p>D:20070201140248Z D:20070201143314Z Acrobat Distiller 5.0.5 (Windows) teresasilva PScript5.dll Version 5.2.2 Microsoft Word - 086 BRP RA 07_Ribeira de .lamo.doc /MT66/MT108/MT111/MT99/MT111/MT32/MT100/MT101/MT32/MT82/MT101/MT103/MT97/MT32/MT100/MT111/MT32/MT80/MT105/MT115/MT227/MT111/MT32/MT45/MT32/MT66/MT108/MT111/MT99/MT111/MT32/MT65 /MT83/MT111/MT110/MT100/MT97/MT103/MT101/MT110/MT115/MT32/MT77/MT101/MT99/MT226/MT110/MT105/MT99/MT97/MT115 /MT82/MT105/MT98/MT101/MT105/MT114/MT97/MT32/MT100/MT101/MT32/MT193/MT108/MT97/MT109/MT111 /MT82/MT65/MT46/MT48/MT55 /MT82/MT101/MT108/MT97/MT116/MT243/MT114/MT105/MT111/MT32/MT80/MT114/MT101/MT108/MT105/MT109/MT105/MT110/MT97/MT114 /MT66/MT101/MT106/MT97 /MT50/MT48/MT48/MT55 Intervenção Arqueológica em Ribeira de Álamo RA.07___________ 1 de 9 Índice 1. Introdução ..................................................................................................................... .................................... 2 2. Intervenção Arqueológica......</text:p>
          </table:table-cell>
          <table:table-cell table:number-columns-repeated="1015"/>
        </table:table-row>
        <table:table-row table:style-name="ro1">
          <table:table-cell office:value-type="string">
            <text:p>086_BRP_VA3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1529Z D:20070216123129Z Acrobat Distiller 5.0.5 (Windows) LIDIABAPTISTA PScript5.dll Version 5.2 Microsoft Word - 086 BRP VA3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86/MT65/MT76/MT69/MT32/MT68/MT146/MT65/MT82/MT201/MT77/MT32/MT51 /MT86/MT65/MT51/MT46/MT48/MT55 Intervenção Arqueológica em Vale d’Arém 3 VA3.07 1 de 10 Índice 1. Introdução ..................................................................................................................... .................................... 2 2. Intervenção Arqueológica....................................................................................................... .....................</text:p>
          </table:table-cell>
          <table:table-cell table:number-columns-repeated="1015"/>
        </table:table-row>
        <table:table-row table:style-name="ro1">
          <table:table-cell office:value-type="string">
            <text:p>086_BRP_VA3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projecto, intervenção arqueológica, intervencao arqueologica, escavação, escavacao, sondagem, sondagens.</text:p>
          </table:table-cell>
          <table:table-cell office:value-type="string">
            <text:p>relatório, relatorio, projecto, intervenção arqueológica, intervencao arqueologica, escavação, escavacao, sondagem, sondagens</text:p>
          </table:table-cell>
          <table:table-cell office:value-type="string">
            <text:p>Assinatura PDF</text:p>
          </table:table-cell>
          <table:table-cell office:value-type="string">
            <text:p>D:20070201140447Z D:20070201143640Z Acrobat Distiller 5.0.5 (Windows) teresasilva PScript5.dll Version 5.2.2 Microsoft Word - 086 BRP VA3 07_Vale d'.rem 3.doc /MT66/MT108/MT111/MT99/MT111/MT32/MT100/MT101/MT32/MT82/MT101/MT103/MT97/MT32/MT100/MT111/MT32/MT80/MT105/MT115/MT227/MT111/MT32/MT45/MT32/MT66/MT108/MT111/MT99/MT111/MT32/MT65 /MT83/MT111/MT110/MT100/MT97/MT103/MT101/MT110/MT115/MT32/MT77/MT101/MT99/MT226/MT110/MT105/MT99/MT97/MT115 /MT86/MT97/MT108/MT101/MT32/MT100/MT146/MT65/MT114/MT233/MT109/MT32/MT51 /MT86/MT65/MT51/MT46/MT48/MT55 /MT82/MT101/MT108/MT97/MT116/MT243/MT114/MT105/MT111/MT32/MT80/MT114/MT101/MT108/MT105/MT109/MT105/MT110/MT97/MT114 /MT66/MT101/MT106/MT97 /MT50/MT48/MT48/MT55 Intervenção Arqueológica em Vale d’Arém 3 VA3.07___________ 1 de 10 Índice 1. Introdução ..................................................................................................................... .................................... 2 2. Intervenção Arqueológica......................</text:p>
          </table:table-cell>
          <table:table-cell table:number-columns-repeated="1015"/>
        </table:table-row>
        <table:table-row table:style-name="ro1">
          <table:table-cell office:value-type="string">
            <text:p>086_BRP_VFR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2054Z D:20070216130114Z Acrobat Distiller 5.0.5 (Windows) LIDIABAPTISTA PScript5.dll Version 5.2 Microsoft Word - 086 BRP VFR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86/MT65/MT76/MT69/MT32/MT68/MT65/MT32/MT70/MT79/MT78/MT84/MT69/MT32/MT68/MT65/MT32/MT82/MT65/MT84/MT65 /MT86/MT70/MT82/MT46/MT48/MT55 Intervenção Arqueológica em Vale da Fonte da Rata VFR.07 1 de 10 Índice 1. Introdução ..................................................................................................................... .................................... 2 2. Intervenção Arqueológica...............................................................................</text:p>
          </table:table-cell>
          <table:table-cell table:number-columns-repeated="1015"/>
        </table:table-row>
        <table:table-row table:style-name="ro1">
          <table:table-cell office:value-type="string">
            <text:p>086_BRP_VFR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projecto, intervenção arqueológica, intervencao arqueologica, escavação, escavacao, sondagem, sondagens.</text:p>
          </table:table-cell>
          <table:table-cell office:value-type="string">
            <text:p>relatório, relatorio, projecto, intervenção arqueológica, intervencao arqueologica, escavação, escavacao, sondagem, sondagens</text:p>
          </table:table-cell>
          <table:table-cell office:value-type="string">
            <text:p>Assinatura PDF</text:p>
          </table:table-cell>
          <table:table-cell office:value-type="string">
            <text:p>D:20070201140858Z D:20070201144223Z Acrobat Distiller 5.0.5 (Windows) teresasilva PScript5.dll Version 5.2.2 Microsoft Word - 086 BRP VFR 07_Vale da Fonte da Rata.doc /MT66/MT108/MT111/MT99/MT111/MT32/MT100/MT101/MT32/MT82/MT101/MT103/MT97/MT32/MT100/MT111/MT32/MT80/MT105/MT115/MT227/MT111/MT32/MT45/MT32/MT66/MT108/MT111/MT99/MT111/MT32/MT65 /MT83/MT111/MT110/MT100/MT97/MT103/MT101/MT110/MT115/MT32/MT77/MT101/MT99/MT226/MT110/MT105/MT99/MT97/MT115 /MT86/MT97/MT108/MT101/MT32/MT100/MT97/MT32/MT70/MT111/MT110/MT116/MT101/MT32/MT68/MT97/MT32/MT82/MT97/MT116/MT97 /MT86/MT70/MT82/MT46/MT48/MT55 /MT82/MT101/MT108/MT97/MT116/MT243/MT114/MT105/MT111/MT32/MT80/MT114/MT101/MT108/MT105/MT109/MT105/MT110/MT97/MT114 /MT66/MT101/MT106/MT97 /MT50/MT48/MT48/MT55 Intervenção Arqueológica em Vale da Fonte da Rata VFR.07 ___________ 1 de 10 Índice 1. Introdução ..................................................................................................................... ..............................</text:p>
          </table:table-cell>
          <table:table-cell table:number-columns-repeated="1015"/>
        </table:table-row>
        <table:table-row table:style-name="ro1">
          <table:table-cell office:value-type="string">
            <text:p>086_FCH1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16. Pistas usadas: relatório, relatorio, intervenção arqueológica, intervencao arqueologica, sondagens, inventário, inventario, número de inventário, numero de inventario.</text:p>
          </table:table-cell>
          <table:table-cell office:value-type="string">
            <text:p>relatório, relatorio, intervenção arqueológica, intervencao arqueologica, sondagens, inventário, inventario, número de inventário, numero de inventario</text:p>
          </table:table-cell>
          <table:table-cell office:value-type="string">
            <text:p>Assinatura PDF</text:p>
          </table:table-cell>
          <table:table-cell office:value-type="string">
            <text:p>D:20070201155338Z D:20070201160949Z Acrobat Distiller 5.0.5 (Windows) teresasilva PScript5.dll Version 5.2.2 FCH1.07.FH10 /MT83/MT111/MT110/MT100/MT97/MT103/MT101/MT110/MT115/MT32/MT65/MT114/MT113/MT117/MT101/MT111/MT108/MT243/MT103/MT105/MT99/MT97/MT115 /MT66/MT108/MT111/MT99/MT111/MT32/MT100/MT101/MT32/MT82/MT101/MT103/MT97/MT32/MT100/MT111/MT32/MT80/MT105/MT115/MT227/MT111/MT32/MT45/MT32/MT66/MT108/MT111/MT99/MT111/MT32/MT65 /MT70/MT117/MT110/MT99/MT104/MT97/MT105/MT115/MT32/MT49/MT32/MT45/MT32/MT70/MT67/MT72/MT49/MT46/MT48/MT55 /MT40/MT66/MT101/MT114/MT105/MT110/MT103/MT101/MT108/MT44/MT32/MT66/MT101/MT106/MT97/MT41 /MT82/MT101/MT108/MT97/MT116/MT243/MT114/MT105/MT111/MT32/MT80/MT114/MT101/MT108/MT105/MT109/MT105/MT110/MT97/MT114 /MT50/MT48/MT48/MT55 Intervenção Arqueológica em Funchais 1 1 de 12 Índice 1. Funcha is 1 .................................................................................................................. ......................................................</text:p>
          </table:table-cell>
          <table:table-cell table:number-columns-repeated="1015"/>
        </table:table-row>
        <table:table-row table:style-name="ro1">
          <table:table-cell office:value-type="string">
            <text:p>086_IA_BRP_FCH1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70216094848Z D:20070216112638Z Acrobat Distiller 5.0.5 (Windows) gracapereira PScript5.dll Version 5.2.2 MODELO DE FORMATA..O /MT82/MT69/MT76/MT65/MT84/MT211/MT82/MT73/MT79 /MT66/MT69/MT74/MT65/MT32/MT45/MT32/MT50/MT48/MT48/MT55 /MT83/MT79/MT78/MT68/MT65/MT71/MT69/MT78/MT83/MT32/MT65/MT82/MT81/MT85/MT69/MT79/MT76/MT211/MT71/MT73/MT67/MT65/MT83 /MT66/MT76/MT79/MT67/MT79/MT32/MT68/MT69/MT32/MT82/MT69/MT71/MT65/MT32/MT68/MT79/MT32/MT80/MT73/MT83/MT195/MT79/MT32/MT45/MT32/MT66/MT76/MT79/MT67/MT79/MT32/MT65 /MT70/MT85/MT78/MT67/MT72/MT65/MT73/MT83/MT32/MT49/MT32/MT45/MT32/MT70/MT67/MT72/MT49/MT46/MT48/MT55 /MT40/MT66/MT69/MT82/MT73/MT78/MT71/MT69/MT76/MT44/MT32/MT66/MT69/MT74/MT65/MT41 Intervenção Arqueológica em Funchais 1 – FCH1.07 1 de 20 Índice 1. Introdução ..................................................................................................... ............................................. 2 2. A Intervenção Arqueológica ..................................................</text:p>
          </table:table-cell>
          <table:table-cell table:number-columns-repeated="1015"/>
        </table:table-row>
        <table:table-row table:style-name="ro1">
          <table:table-cell office:value-type="string">
            <text:p>086_IA_BRP_MM3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5.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70214155604Z D:20070221152808Z Acrobat Distiller 5.0.5 (Windows) anpaulo PScript5.dll Version 5.2.2 086 MM3 rel.FH10 /MT82/MT69/MT76/MT65/MT84/MT211/MT82/MT73/MT79 /MT66/MT69/MT74/MT65/MT32/MT45/MT32/MT50/MT48/MT48/MT55 /MT83/MT79/MT78/MT68/MT65/MT71/MT69/MT78/MT83/MT32/MT65/MT82/MT81/MT85/MT69/MT79/MT76/MT211/MT71/MT73/MT67/MT65/MT83 /MT66/MT76/MT79/MT67/MT79/MT32/MT68/MT69/MT32/MT82/MT69/MT71/MT65/MT32/MT68/MT79/MT32/MT80/MT73/MT83/MT195/MT79/MT32/MT45/MT32/MT66/MT76/MT79/MT67/MT79/MT32/MT65 /MT77/MT79/MT78/MT84/MT69/MT32/MT68/MT79/MT32/MT77/MT65/MT82/MT81/MT85/MT202/MT83/MT32/MT51/MT32/MT45/MT32/MT77/MT77/MT51/MT46/MT48/MT55 /MT40/MT66/MT69/MT82/MT73/MT78/MT71/MT69/MT76/MT44/MT32/MT66/MT69/MT74/MT65/MT41 Intervenção Arqueológica no Monte do Marquês 3 – MM3.07 1 de 24 Índice 1. Introdução ..................................................................................................................... .................................... 2 2. Intervenção Arqueológica............</text:p>
          </table:table-cell>
          <table:table-cell table:number-columns-repeated="1015"/>
        </table:table-row>
        <table:table-row table:style-name="ro1">
          <table:table-cell office:value-type="string">
            <text:p>086_IA_BRP_MM6_07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1613Z D:20070216105348Z Acrobat Distiller 5.0.5 (Windows) LIDIABAPTISTA PScript5.dll Version 5.2 Microsoft Word - 086 BRP MM6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77/MT79/MT78/MT84/MT69/MT32/MT68/MT79/MT32/MT77/MT65/MT82/MT81/MT85/MT202/MT83/MT32/MT54 /MT77/MT77/MT54/MT46/MT48/MT55 Intervenção Arqueológica em Monte do Marquês 6 – MM6.07 1 de 10 Índice 1. Introdução ..................................................................................................................... .................................... 2 2. Intervenção Arqueológica..............................................................................................</text:p>
          </table:table-cell>
          <table:table-cell table:number-columns-repeated="1015"/>
        </table:table-row>
        <table:table-row table:style-name="ro1">
          <table:table-cell office:value-type="string">
            <text:p>086_IA_BRP_MMV4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1.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70214154342Z D:20070216104315Z Acrobat Distiller 5.0.5 (Windows) anpaulo PScript5.dll Version 5.2.2 086 MMV4 rel.FH10 /MT82/MT69/MT76/MT65/MT84/MT211/MT82/MT73/MT79 /MT66/MT69/MT74/MT65/MT32/MT45/MT32/MT50/MT48/MT48/MT55 /MT83/MT79/MT78/MT68/MT65/MT71/MT69/MT78/MT83/MT32/MT65/MT82/MT81/MT85/MT69/MT79/MT76/MT211/MT71/MT73/MT67/MT65/MT83 /MT66/MT76/MT79/MT67/MT79/MT32/MT68/MT69/MT32/MT82/MT69/MT71/MT65/MT32/MT68/MT79/MT32/MT80/MT73/MT83/MT195/MT79/MT32/MT45/MT32/MT66/MT76/MT79/MT67/MT79/MT32/MT65 /MT77/MT79/MT78/MT84/MT69/MT32/MT77/MT79/MT78/MT86/MT69/MT83/MT84/MT73/MT68/MT79/MT32/MT52/MT32/MT45/MT32/MT77/MT77/MT86/MT52/MT46/MT48/MT55 /MT40/MT83/MT195/MT79/MT32/MT66/MT82/MT73/MT83/MT83/MT79/MT83/MT44/MT32/MT66/MT69/MT74/MT65/MT41 Intervenção Arqueológica no Monte Monvestido 4 – MMV4. 07 1 de 11 Índice 1. Introdução ..................................................................................................................... .................................... 2 2. A Interven...</text:p>
          </table:table-cell>
          <table:table-cell table:number-columns-repeated="1015"/>
        </table:table-row>
        <table:table-row table:style-name="ro1">
          <table:table-cell office:value-type="string">
            <text:p>086_IA_BRP_MM_07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1729Z D:20070216122402Z Acrobat Distiller 5.0.5 (Windows) LIDIABAPTISTA PScript5.dll Version 5.2 Microsoft Word - 086 BRP MM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77/MT79/MT78/MT84/MT69/MT32/MT68/MT79/MT32/MT77/MT65/MT82/MT81/MT85/MT202/MT83 /MT77/MT77/MT46/MT48/MT55 Intervenção Arqueológica em Monte do Marquês – MM.07 1 de 10 Índice 1. Introdução ..................................................................................................................... .................................... 2 2. Intervenção Arqueológica....................................................................................................... .........</text:p>
          </table:table-cell>
          <table:table-cell table:number-columns-repeated="1015"/>
        </table:table-row>
        <table:table-row table:style-name="ro1">
          <table:table-cell office:value-type="string">
            <text:p>086_IA_BRP_RA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29.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2615Z D:20070216122951Z Acrobat Distiller 5.0.5 (Windows) LIDIABAPTISTA PScript5.dll Version 5.2 Microsoft Word - 086 BRP RA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82/MT73/MT66/MT69/MT73/MT82/MT65/MT32/MT68/MT69/MT32/MT193/MT76/MT65/MT77/MT79 /MT82/MT65/MT46/MT48/MT55 Intervenção Arqueológica em Ribeira de Álamo RA.07 1 de 9 Índice 1. Introdução ..................................................................................................................... .................................... 2 2. Intervenção Arqueológica....................................................................................................... ............</text:p>
          </table:table-cell>
          <table:table-cell table:number-columns-repeated="1015"/>
        </table:table-row>
        <table:table-row table:style-name="ro1">
          <table:table-cell office:value-type="string">
            <text:p>086_IA_BRP_VA3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1529Z D:20070216123129Z Acrobat Distiller 5.0.5 (Windows) LIDIABAPTISTA PScript5.dll Version 5.2 Microsoft Word - 086 BRP VA3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86/MT65/MT76/MT69/MT32/MT68/MT146/MT65/MT82/MT201/MT77/MT32/MT51 /MT86/MT65/MT51/MT46/MT48/MT55 Intervenção Arqueológica em Vale d’Arém 3 VA3.07 1 de 10 Índice 1. Introdução ..................................................................................................................... .................................... 2 2. Intervenção Arqueológica....................................................................................................... .....................</text:p>
          </table:table-cell>
          <table:table-cell table:number-columns-repeated="1015"/>
        </table:table-row>
        <table:table-row table:style-name="ro1">
          <table:table-cell office:value-type="string">
            <text:p>086_IA_BRP_VFR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lista / inventário de espólio. Foram analisadas as primeiras 4 página(s) de um total de 30. Pistas usadas: relatório, relatorio, projecto, intervenção arqueológica, intervencao arqueologica, escavação, escavacao, sondagem, sondagens, espólio, espolio, inventário, inventario, fragmento, unidade estratigráfica.</text:p>
          </table:table-cell>
          <table:table-cell office:value-type="string">
            <text:p>relatório, relatorio, projecto, intervenção arqueológica, intervencao arqueologica, escavação, escavacao, sondagem, sondagens, espólio, espolio, inventário, inventario, fragmento, unidade estratigráfica</text:p>
          </table:table-cell>
          <table:table-cell office:value-type="string">
            <text:p>Assinatura PDF</text:p>
          </table:table-cell>
          <table:table-cell office:value-type="string">
            <text:p>D:20070214162054Z D:20070216130114Z Acrobat Distiller 5.0.5 (Windows) LIDIABAPTISTA PScript5.dll Version 5.2 Microsoft Word - 086 BRP VFR 07 REL FINAL.doc /MT82/MT69/MT76/MT65/MT84/MT211/MT82/MT73/MT79 /MT66/MT69/MT74/MT65/MT32/MT45/MT32/MT50/MT48/MT48/MT55 /MT66/MT76/MT79/MT67/MT79/MT32/MT68/MT69/MT32/MT82/MT69/MT71/MT65/MT32/MT68/MT79/MT32/MT80/MT73/MT83/MT195/MT79/MT32/MT45/MT32/MT66/MT76/MT79/MT67/MT79/MT32/MT65 /MT83/MT79/MT78/MT68/MT65/MT71/MT69/MT78/MT83/MT32/MT77/MT69/MT67/MT194/MT78/MT73/MT67/MT65/MT83 /MT86/MT65/MT76/MT69/MT32/MT68/MT65/MT32/MT70/MT79/MT78/MT84/MT69/MT32/MT68/MT65/MT32/MT82/MT65/MT84/MT65 /MT86/MT70/MT82/MT46/MT48/MT55 Intervenção Arqueológica em Vale da Fonte da Rata VFR.07 1 de 10 Índice 1. Introdução ..................................................................................................................... .................................... 2 2. Intervenção Arqueológica...............................................................................</text:p>
          </table:table-cell>
          <table:table-cell table:number-columns-repeated="1015"/>
        </table:table-row>
        <table:table-row table:style-name="ro1">
          <table:table-cell office:value-type="string">
            <text:p>086_MM3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1. Pistas usadas: relatório, relatorio, intervenção arqueológica, intervencao arqueologica, escavação, escavacao, sondagem, sondagens.</text:p>
          </table:table-cell>
          <table:table-cell office:value-type="string">
            <text:p>relatório, relatorio, intervenção arqueológica, intervencao arqueologica, escavação, escavacao, sondagem, sondagens</text:p>
          </table:table-cell>
          <table:table-cell office:value-type="string">
            <text:p>Assinatura PDF</text:p>
          </table:table-cell>
          <table:table-cell office:value-type="string">
            <text:p>D:20070201160326Z D:20070201160518Z Acrobat Distiller 5.0.5 (Windows) teresasilva PScript5.dll Version 5.2.2 MM3.07.FH10 /MT83/MT111/MT110/MT100/MT97/MT103/MT101/MT110/MT115/MT32/MT65/MT114/MT113/MT117/MT101/MT111/MT108/MT243/MT103/MT105/MT99/MT97/MT115 /MT66/MT108/MT111/MT99/MT111/MT32/MT100/MT101/MT32/MT82/MT101/MT103/MT97/MT32/MT100/MT111/MT32/MT80/MT105/MT115/MT227/MT111/MT32/MT45/MT32/MT66/MT108/MT111/MT99/MT111/MT32/MT65 /MT77/MT111/MT110/MT116/MT101/MT32/MT100/MT111/MT32/MT77/MT97/MT114/MT113/MT117/MT234/MT115/MT32/MT51/MT32/MT45/MT32/MT77/MT77/MT51/MT46/MT48/MT55 /MT40/MT66/MT101/MT114/MT105/MT110/MT103/MT101/MT108/MT44/MT32/MT66/MT101/MT106/MT97/MT41 /MT82/MT101/MT108/MT97/MT116/MT243/MT114/MT105/MT111/MT32/MT80/MT114/MT101/MT108/MT105/MT109/MT105/MT110/MT97/MT114 /MT50/MT48/MT48/MT55 Intervenção Arqueológica em Monte do Marquês 3 1 de 17 Índice 1. Monte do Marquês 3.......................................................................................................... ........</text:p>
          </table:table-cell>
          <table:table-cell table:number-columns-repeated="1015"/>
        </table:table-row>
        <table:table-row table:style-name="ro1">
          <table:table-cell office:value-type="string">
            <text:p>086_MMV4_0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lista / inventário de espólio / relatório de projeto / intervenção arqueológica. Foram analisadas as primeiras 4 página(s) de um total de 16. Pistas usadas: inventário, inventario, unidade estratigráfica, unidade estratigrafica, número de inventário, numero de inventario, relatório, relatorio, intervenção arqueológica, intervencao arqueologica, sondagens.</text:p>
          </table:table-cell>
          <table:table-cell office:value-type="string">
            <text:p>inventário, inventario, unidade estratigráfica, unidade estratigrafica, número de inventário, numero de inventario, relatório, relatorio, intervenção arqueológica, intervencao arqueologica, sondagens</text:p>
          </table:table-cell>
          <table:table-cell office:value-type="string">
            <text:p>Assinatura PDF</text:p>
          </table:table-cell>
          <table:table-cell office:value-type="string">
            <text:p>D:20070201155114Z D:20070201160642Z Acrobat Distiller 5.0.5 (Windows) teresasilva PScript5.dll Version 5.2.2 MMV4.07.FH10 /MT83/MT111/MT110/MT100/MT97/MT103/MT101/MT110/MT115/MT32/MT65/MT114/MT113/MT117/MT101/MT111/MT108/MT243/MT103/MT105/MT99/MT97/MT115 /MT66/MT108/MT111/MT99/MT111/MT32/MT100/MT101/MT32/MT82/MT101/MT103/MT97/MT32/MT100/MT111/MT32/MT80/MT105/MT115/MT227/MT111/MT32/MT45/MT32/MT66/MT108/MT111/MT99/MT111/MT32/MT65 /MT77/MT111/MT110/MT116/MT101/MT32/MT77/MT111/MT110/MT118/MT101/MT115/MT116/MT105/MT100/MT111/MT32/MT52/MT32/MT45/MT32/MT77/MT77/MT86/MT52/MT46/MT48/MT55 /MT40/MT83/MT227/MT111/MT32/MT66/MT114/MT105/MT115/MT115/MT111/MT115/MT44/MT32/MT66/MT101/MT106/MT97/MT41 /MT82/MT101/MT108/MT97/MT116/MT243/MT114/MT105/MT111/MT32/MT80/MT114/MT101/MT108/MT105/MT109/MT105/MT110/MT97/MT114 /MT50/MT48/MT48/MT55 Intervenção Arqueológica em Monte Monvestido 4 1 de 12 Índice 1. Monte Vestido ...............................................................................................</text:p>
          </table:table-cell>
          <table:table-cell table:number-columns-repeated="1015"/>
        </table:table-row>
        <table:table-row table:style-name="ro1">
          <table:table-cell office:value-type="string">
            <text:p>087_PP_Guarda.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desenho / planta / cad. Foram analisadas as primeiras 4 página(s) de um total de 32. Pistas usadas: planta, implantação, implantacao.</text:p>
          </table:table-cell>
          <table:table-cell office:value-type="string">
            <text:p>planta, implantação, implantacao</text:p>
          </table:table-cell>
          <table:table-cell office:value-type="string">
            <text:p>Assinatura PDF</text:p>
          </table:table-cell>
          <table:table-cell office:value-type="string">
            <text:p>D:20070115181802Z D:20070215144038Z Acrobat Distiller 5.0.5 (Windows) teresasilva PScript5.dll Version 5.2.2 Microsoft Word - 088 rel 2006 01 18.doc /MT82/MT69/MT76/MT65/MT84/MT211/MT82/MT73/MT79/MT32/MT68/MT69/MT32/MT65/MT86/MT65/MT76/MT73/MT65/MT199/MT195/MT79/MT32/MT65/MT77/MT66/MT73/MT69/MT78/MT84/MT65/MT76/MT32/MT69/MT83/MT84/MT82/MT65/MT84/MT201/MT71/MT73/MT67/MT65 /MT68/MT69/MT83/MT67/MT82/MT73/MT84/MT79/MT82/MT32/MT80/MT65/MT84/MT82/MT73/MT77/MT211/MT78/MT73/MT79/MT32/MT67/MT85/MT76/MT84/MT85/MT82/MT65/MT76 /MT80/MT76/MT65/MT78/MT79/MT32/MT68/MT69/MT32/MT80/MT79/MT82/MT77/MT69/MT78/MT79/MT82/MT32/MT80/MT65/MT82/MT65/MT32/MT65/MT32/MT90/MT79/MT78/MT65/MT32/MT68/MT79/MT32/MT77/MT69/MT82/MT67/MT65/MT68/MT79 /MT77/MT85/MT78/MT73/MT67/MT73/MT80/MT65/MT76/MT32/MT69/MT32/MT68/MT79/MT32/MT67/MT69/MT78/MT84/MT82/MT79/MT32/MT67/MT79/MT79/MT82/MT68/MT69/MT78/MT65/MT68/MT79/MT82/MT32/MT68/MT69/MT32/MT84/MT82/MT65/MT78/MT83/MT80/MT79/MT82/MT84/MT69/MT83 /MT32/MT32/MT32/MT32/MT32/MT32/MT32/M...</text:p>
          </table:table-cell>
          <table:table-cell table:number-columns-repeated="1015"/>
        </table:table-row>
        <table:table-row table:style-name="ro1">
          <table:table-cell office:value-type="string">
            <text:p>088_EIA_GP_amarant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9.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70209163211Z D:20070313180520Z Acrobat Distiller 5.0.5 (Windows) vitorfonseca PScript5.dll Version 5.2.2 Microsoft Word - 088 rel 2006 02 09.doc /MT82/MT69/MT76/MT65/MT84/MT211/MT82/MT73/MT79 /MT65/MT77/MT65/MT82/MT65/MT78/MT84/MT69/MT32/MT45/MT32/MT50/MT48/MT48/MT55 /MT69/MT83/MT84/MT85/MT68/MT79/MT32/MT68/MT69/MT32/MT73/MT77/MT80/MT65/MT67/MT84/MT69/MT32/MT65/MT77/MT66/MT73/MT69/MT78/MT84/MT65/MT76 /MT67/MT69/MT78/MT84/MT82/MT79/MT32/MT67/MT79/MT77/MT69/MT82/MT67/MT73/MT65/MT76/MT32/MT71/MT82/MT65/MT78/MT68/MT32/MT80/MT76/MT65/MT90/MT65/MT32/MT65/MT77/MT65/MT82/MT65/MT78/MT84/MT69 EIA Centro Comercial Grand Plaza Amarante Pág. 1 de 21 ÍNDICE 1. Introdução ..................................................................................................................... .......................... 2 2. Metodologia do Estudo .......................................................................................................... ............... 3 3. Caracterização da Situação de...</text:p>
          </table:table-cell>
          <table:table-cell table:number-columns-repeated="1015"/>
        </table:table-row>
        <table:table-row table:style-name="ro1">
          <table:table-cell office:value-type="string">
            <text:p>089_JP07_IA_JPChav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4. Pistas usadas: relatório, relatorio, relatório final, relatorio final, projeto, projecto, intervenção arqueológica, intervencao arqueologica, acompanhamento arqueológico, acompanhamento arqueologico, sondagens.</text:p>
          </table:table-cell>
          <table:table-cell office:value-type="string">
            <text:p>relatório, relatorio, relatório final, relatorio final, projeto, projecto, intervenção arqueológica, intervencao arqueologica, acompanhamento arqueológico, acompanhamento arqueologico, sondagens</text:p>
          </table:table-cell>
          <table:table-cell office:value-type="string">
            <text:p>Assinatura PDF</text:p>
          </table:table-cell>
          <table:table-cell office:value-type="string">
            <text:p>Writer D:20160830143231+01'00' D:20160830144536+01'00' RTVF RTVF OpenOffice 4.1.2 RELATÓRIO FINAL Intervenção Arqueológica Jardim Público de Chaves Chaves 2007 Copyright © arqueologia e património Matosinhos 2016 JP.07 Intervenção Arqueológica Jardim Público de Chaves FICHA TÉCNICA Ricardo Teixeira &amp; Vítor Fonseca, Arqueologia Lda. PROJECTO 089 Coordenação geral Ricardo Teixeira, arqueólogo, mestre em arqueologia Vítor Fonseca, arqueólogo Coordenação de projeto Jorge Fonseca, arqueólogo TRABALHO DE CAMPO Direção Jorge Fonseca - sondagens arqueológicas João Ribeiro, arqueólogo – acompanhamento arqueológico Antropóloga Maria Luís Carvalho Assistentes de arqueólogo Bebiana Mota Operário de arqueologia Pedro Pinto TRABALHO DE GABINETE Relatório Jorge Fonseca João Ribeiro Estudo paleodemográfico e paleopatológico Maria Luís Carvalho Enquadramento histórico Pedro Maia, técnico superior de gestão de património Desenho gráfico Rui Oliveira, desenhor de arqueologia Tratamento de espólio Anabela...</text:p>
          </table:table-cell>
          <table:table-cell table:number-columns-repeated="1015"/>
        </table:table-row>
        <table:table-row table:style-name="ro1">
          <table:table-cell office:value-type="string">
            <text:p>089_rel_antro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projecto, intervenção arqueológica, intervencao arqueologica, trabalhos arqueológicos, trabalhos arqueologicos.</text:p>
          </table:table-cell>
          <table:table-cell office:value-type="string">
            <text:p>relatório, relatorio, projecto, intervenção arqueológica, intervencao arqueologica, trabalhos arqueológicos, trabalhos arqueologicos</text:p>
          </table:table-cell>
          <table:table-cell office:value-type="string">
            <text:p>Assinatura PDF</text:p>
          </table:table-cell>
          <table:table-cell office:value-type="string">
            <text:p>D:20070928153837+01'00' D:20070928153837+01'00' RELATÓRIO DE ANTROPOLOGIA CHAVES - JUNHO DE 2007 TRABALHOS ARQUEOLÓGICOS NO JARDIM PÚBLICO DE CHAVES Intervenção Arqueológica no Jardim Público de Chaves FICHA TÉCNICA COORDENAÇÃO Ricardo Teixeira, Arqueólogo, Mestre em arqueologia Vítor Fonseca, Arqueólogo COORDENAÇÃO DE PROJECTO Jorge Fonseca Assistente de Arqueólogo Bebiana Mota Antropóloga Maria Luís Vilhena de Carvalho, Antropóloga Laboratório de Paleodemografia e Paleopatologia Departamento de Antropologia Faculdade de Ciências e Tecnologia Universidade de Coimbra DATA 4 de Julho de 2007 Relatório dos Trabalhos Antropológicos Junho de 2007 Página 1 de 16 Intervenção Arqueológica no Jardim Público de Chaves Índice 1.Introdução........................................................................................................................... 4 2.Metodologia .........................................................................................................................4...</text:p>
          </table:table-cell>
          <table:table-cell table:number-columns-repeated="1015"/>
        </table:table-row>
        <table:table-row table:style-name="ro1">
          <table:table-cell office:value-type="string">
            <text:p>090_CTF_ESP.pdf</text:p>
          </table:table-cell>
          <table:table-cell office:value-type="string">
            <text:p>.pdf</text:p>
          </table:table-cell>
          <table:table-cell office:value-type="string">
            <text:p>Documento PDF</text:p>
          </table:table-cell>
          <table:table-cell office:value-type="string">
            <text:p>inventário de espólio</text:p>
          </table:table-cell>
          <table:table-cell office:value-type="string">
            <text:p>Alta</text:p>
          </table:table-cell>
          <table:table-cell office:value-type="string">
            <text:p>Documento PDF; o conteúdo aparenta corresponder a lista / inventário de espólio / relatório de projeto / intervenção arqueológica. Foram analisadas as primeiras 4 página(s) de um total de 140. Pistas usadas: espólio, espolio, inventário, inventario, contexto, relatório, relatorio, projecto, sondagens.</text:p>
          </table:table-cell>
          <table:table-cell office:value-type="string">
            <text:p>espólio, espolio, inventário, inventario, contexto, relatório, relatorio, projecto, sondagens</text:p>
          </table:table-cell>
          <table:table-cell office:value-type="string">
            <text:p>Assinatura PDF</text:p>
          </table:table-cell>
          <table:table-cell office:value-type="string">
            <text:p>D:20070919161828+01'00' D:20070919162128+01'00' INVENTÁRIO DE ESPÓLIO SETEMBRO DE 2007 CENTRAL TERMOELÉCTRICA DO FREIXO - PORTO Central Termoeléctrica do Freixo FICHA TÉCNICA COORDENAÇÃO GERAL Ricardo Teixeira, Arqueólogo, Mestre em arqueologia Vítor Fonseca, Arqueólogo COORDENAÇÃO DE PROJECTO Maria da Luz Sampaio Paulo Pestana de Sousa TRABALHO DE CAMPO Inventário e Recolha Coordenação Maria da Luz Sampaio Paulo Pestana de Sousa Assistentes de arqueólogo Verónica Biscaia Arqueólogo Graça Pereira TRABALHO DE GABINETE Relatório Maria da Luz Sampaio Paulo Pestana de Sousa Desenho Gráfico Paulo Pestana de Sousa Base de Dados Teresa Silva (concepção e desenho) Base de Dados - preenchimento Graça Pereira Maria da Luz Sampaio Paulo Sousa Revisão Teresa Silva DATA 17 de Setembro de 2007 Inventário de Espólio Setembro de 2007 Central Termoeléctrica do Freixo Índice 1.Introdução............................................................................................................ 2 1.1. Co...</text:p>
          </table:table-cell>
          <table:table-cell table:number-columns-repeated="1015"/>
        </table:table-row>
        <table:table-row table:style-name="ro1">
          <table:table-cell office:value-type="string">
            <text:p>090_CTF_rel prel_est_v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 desenho / planta / cad. Foram analisadas as primeiras 4 página(s) de um total de 126. Pistas usadas: relatório, relatorio, planta, levantamento.</text:p>
          </table:table-cell>
          <table:table-cell office:value-type="string">
            <text:p>relatório, relatorio, planta, levantamento</text:p>
          </table:table-cell>
          <table:table-cell office:value-type="string">
            <text:p>Assinatura PDF</text:p>
          </table:table-cell>
          <table:table-cell office:value-type="string">
            <text:p>D:20070913151131+01'00' Paulo Sousa PScript5.dll Version 5.2 Acrobat Distiller 6.0 (Windows) D:20070913151131+01'00' CAPA capa (1) Estudo Histórico – Espacial da Central Termoeléctrica do Freixo Pág. 1 de 2 Relatório Preliminar Junho de 2007 ÍNDICE 1. INTRODUÇÃO 1.1. ENQUADRAMENTO E EVOLUÇÃO DOS MOMENTOS CONSTRUTIVOS 1.2. METODOLOGIA E APRESENTAÇÃO DO TRABALHO 2. REGISTO TIPOLÓGICO DO CONJUNTO 2.1. LOCALIZAÇÃO Planta de localização 2.2. EVOLUÇÃO CARTOGRÁFICA Carta Topográphica da Cidade do Porto – Telles Ferreira – 1892 esc.1:2.000 Fotografia Aérea - 1939 esc.1:2.000 Planta - 1940 esc.1:2.000 Planta - 1960 esc.1:2.000 Planta - 2001 esc.1:2.000 Ortofotomapa - 2001 esc.1:2.000 2.3. EVOLUÇÃO CONSTRUTIVA/LICENÇAS DE OBRAS - 1892-1973 Planta com identificação das Licenças de Obras Relatório Cronológico Geral de Licenças de obras Relatório de licenças de Obras – Edifício 3. REGISTO TIPOLÓGICO / ANÁLISE DO EDIFÍCIO 3.1. ENQUADRAMENTO ARQUITECTÓNICO EDIFÍCIO DA ELECTRA DEL LIMA – RECONSTITUIÇÃ...</text:p>
          </table:table-cell>
          <table:table-cell table:number-columns-repeated="1015"/>
        </table:table-row>
        <table:table-row table:style-name="ro1">
          <table:table-cell office:value-type="string">
            <text:p>090_CTF_rel_prel_v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4. Pistas usadas: relatório, relatorio, acompanhamento arqueológico, acompanhamento arqueologico, sondagem, sondagens.</text:p>
          </table:table-cell>
          <table:table-cell office:value-type="string">
            <text:p>relatório, relatorio, acompanhamento arqueológico, acompanhamento arqueologico, sondagem, sondagens</text:p>
          </table:table-cell>
          <table:table-cell office:value-type="string">
            <text:p>Assinatura PDF</text:p>
          </table:table-cell>
          <table:table-cell office:value-type="string">
            <text:p>D:20070627115307+01'00' Writer OpenOffice.org 2.1 D:20070627171751+01'00' RELATÓRIO PRELIMINAR PORTO - 2007 ESTUDO HISTÓRICO - ESPACIAL DA CENTRAL TERMOELÉCTRICA DO FREIXO - PORTO VOL.I Estudo Histórico – Espacial da Central Termoeléctrica do Freixo Pág. 1 de 63 FICHA TÉCNICA COORDENAÇÃO GERAL Ricardo Teixeira Vítor Fonseca ESTUDO HISTÓRICO Maria da Luz Sampaio (Museu da Indústria) - Coordenação Maria Manuel Branco (Museu da Indústria) Ana Paulo – Ilustração Gráfica REGISTO TIPOLÓGICO Paulo Pestana de Sousa – Coordenação João Paulo Rosa Lélio Oliveira Luís Aguiar Branco - Consultor ACOMPANHAMENTO ARQUEOLÓGICO Graça Pereira - Coordenação Verónica Biscaia REGISTO FOTOGRÁFICO Graça Pereira e Verónica Biscaia Maria da Luz Sampaio Porto, 15 de Junho de 2007 Relatório Preliminar Junho de 2007 Estudo Histórico – Espacial da Central Termoeléctrica do Freixo Pág. 2 de 63 AGRADECIMENTOS Francisco Almeida e Sousa - Engº Horácio Mota e Costa - Professor Doutor José Manuel Castro - Dr. Júlio Guimar...</text:p>
          </table:table-cell>
          <table:table-cell table:number-columns-repeated="1015"/>
        </table:table-row>
        <table:table-row table:style-name="ro1">
          <table:table-cell office:value-type="string">
            <text:p>090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2. Pistas usadas: relatório, relatorio, relatório final, relatorio final, intervenção arqueológica, intervencao arqueologica, escavação, escavacao, sondagem, sondagens.</text:p>
          </table:table-cell>
          <table:table-cell office:value-type="string">
            <text:p>relatório, relatorio, relatório final, relatorio final, intervenção arqueológica, intervencao arqueologica, escavação, escavacao, sondagem, sondagens</text:p>
          </table:table-cell>
          <table:table-cell office:value-type="string">
            <text:p>Assinatura PDF</text:p>
          </table:table-cell>
          <table:table-cell office:value-type="string">
            <text:p>D:20100202143444Z Writer OpenOffice.org 3.1 D:20100203154628Z RELATÓRIO PORTO - 2007 / 2008 INTERVENÇÃO ARQUEOLÓGICA NA CENTRAL TERMOELÉCTRICA DO FREIXO Intervenção Arqueológica na Central Termoeléctrica do Freixo FICHA TÉCNICA COORDENAÇÃO GERAL Ricardo Teixeira, Arqueólogo, Mestre em Arqueologia Vítor Fonseca, Arqueólogo TRABALHO DE CAMPO Direcção Graça Pereira, Arqueóloga Helena Marçal, Arqueóloga Arqueólogo José Gomes Assistente de Arqueólogo Bebiana Mota Marco Pereira Ricardo Mota Desenhadores Nilton Nunes Operários de Arqueologia Alexandre Pinto Francisco Monteiro Pedro Pinto TRABALHO DE GABINETE Relatório Graça Pereira Maria da Luz Sampaio, Historiadora, especialista em Arqueologia Industrial , pós-graduada em Museologia Social Fotografia de espólio Pedro Maia, Técnico Superior de Património Desenho gráfico Ana Paulo, desenhadora de arqueologia Tratamento espólio Anabela Rodrigues, assistente de arqueólogo Teresa Gonçalves, assistente de arqueólogo Revisão de texto, apoio técnico...</text:p>
          </table:table-cell>
          <table:table-cell table:number-columns-repeated="1015"/>
        </table:table-row>
        <table:table-row table:style-name="ro1">
          <table:table-cell office:value-type="string">
            <text:p>090_FREIXO_rel_prel _v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4. Pistas usadas: relatório, relatorio, acompanhamento arqueológico, acompanhamento arqueologico, sondagem, sondagens.</text:p>
          </table:table-cell>
          <table:table-cell office:value-type="string">
            <text:p>relatório, relatorio, acompanhamento arqueológico, acompanhamento arqueologico, sondagem, sondagens</text:p>
          </table:table-cell>
          <table:table-cell office:value-type="string">
            <text:p>Assinatura PDF</text:p>
          </table:table-cell>
          <table:table-cell office:value-type="string">
            <text:p>D:20070627115307+01'00' Writer OpenOffice.org 2.1 D:20070627171751+01'00' RELATÓRIO PRELIMINAR PORTO - 2007 ESTUDO HISTÓRICO - ESPACIAL DA CENTRAL TERMOELÉCTRICA DO FREIXO - PORTO VOL.I Estudo Histórico – Espacial da Central Termoeléctrica do Freixo Pág. 1 de 63 FICHA TÉCNICA COORDENAÇÃO GERAL Ricardo Teixeira Vítor Fonseca ESTUDO HISTÓRICO Maria da Luz Sampaio (Museu da Indústria) - Coordenação Maria Manuel Branco (Museu da Indústria) Ana Paulo – Ilustração Gráfica REGISTO TIPOLÓGICO Paulo Pestana de Sousa – Coordenação João Paulo Rosa Lélio Oliveira Luís Aguiar Branco - Consultor ACOMPANHAMENTO ARQUEOLÓGICO Graça Pereira - Coordenação Verónica Biscaia REGISTO FOTOGRÁFICO Graça Pereira e Verónica Biscaia Maria da Luz Sampaio Porto, 15 de Junho de 2007 Relatório Preliminar Junho de 2007 Estudo Histórico – Espacial da Central Termoeléctrica do Freixo Pág. 2 de 63 AGRADECIMENTOS Francisco Almeida e Sousa - Engº Horácio Mota e Costa - Professor Doutor José Manuel Castro - Dr. Júlio Guimar...</text:p>
          </table:table-cell>
          <table:table-cell table:number-columns-repeated="1015"/>
        </table:table-row>
        <table:table-row table:style-name="ro1">
          <table:table-cell office:value-type="string">
            <text:p>090_REL_Selagem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 Pistas usadas: relatório, relatorio, projecto, intervenção arqueológica, intervencao arqueologica, sondagens.</text:p>
          </table:table-cell>
          <table:table-cell office:value-type="string">
            <text:p>relatório, relatorio, projecto, intervenção arqueológica, intervencao arqueologica, sondagens</text:p>
          </table:table-cell>
          <table:table-cell office:value-type="string">
            <text:p>Assinatura PDF</text:p>
          </table:table-cell>
          <table:table-cell office:value-type="string">
            <text:p>Ricardo Teixeira &amp; Vítor Fonseca - Arqueologia Lda Writer OpenOffice.org 3.1 D:20091102144901Z' Intervenção Arqueológica CTF. 07/08 CENTRAL TERMO-ELÉCTRICA DO FREIXO RELATÓRIO DA SELAGEM DAS SONDAGENS ARQUEOLÓGICAS Relatório 02 de Novembro de 2009 Página 1 de 10 Intervenção Arqueológica CTF. 07/08 Índice 1.INTRODUÇÃO.............................................................................................................. 3 2.METODOLOGIA............................................................................................................ 5 2.1. Fase 1............................................................................................................... 5 2.2. Fase 2............................................................................................................... 6 2.3. Fase 3............................................................................................................... 8 3.CONCLUSÃO..............................................................</text:p>
          </table:table-cell>
          <table:table-cell table:number-columns-repeated="1015"/>
        </table:table-row>
        <table:table-row table:style-name="ro1" table:visibility="collapse">
          <table:table-cell office:value-type="string">
            <text:p>090_RTip.pdf</text:p>
          </table:table-cell>
          <table:table-cell office:value-type="string">
            <text:p>.pdf</text:p>
          </table:table-cell>
          <table:table-cell office:value-type="string">
            <text:p>Documento PDF</text:p>
          </table:table-cell>
          <table:table-cell office:value-type="string">
            <text:p>Relatório de projeto / intervenção arqueológica / Desenho / planta / CAD</text:p>
          </table:table-cell>
          <table:table-cell office:value-type="string">
            <text:p>Média</text:p>
          </table:table-cell>
          <table:table-cell office:value-type="string">
            <text:p>Documento PDF; o conteúdo aparenta corresponder a relatório de projeto / intervenção arqueológica / desenho / planta / cad. Foram analisadas as primeiras 4 página(s) de um total de 126. Pistas usadas: relatório, relatorio, planta, levantamento.</text:p>
          </table:table-cell>
          <table:table-cell office:value-type="string">
            <text:p>relatório, relatorio, planta, levantamento</text:p>
          </table:table-cell>
          <table:table-cell office:value-type="string">
            <text:p>Assinatura PDF</text:p>
          </table:table-cell>
          <table:table-cell office:value-type="string">
            <text:p>D:20100525164236+01'00' Paulo Sousa PScript5.dll Version 5.2 Acrobat Distiller 6.0 (Windows) D:20100525164236+01'00' CAPA capa (1) Estudo Histórico – Espacial da Central Termoeléctrica do Freixo Pág. 1 de 2 Relatório Preliminar Junho de 2007 ÍNDICE 1. INTRODUÇÃO 1.1. ENQUADRAMENTO E EVOLUÇÃO DOS MOMENTOS CONSTRUTIVOS 1.2. METODOLOGIA E APRESENTAÇÃO DO TRABALHO 2. REGISTO TIPOLÓGICO DO CONJUNTO 2.1. LOCALIZAÇÃO Planta de localização 2.2. EVOLUÇÃO CARTOGRÁFICA Carta Topográphica da Cidade do Porto – Telles Ferreira – 1892 esc.1:2.000 Fotografia Aérea - 1939 esc.1:2.000 Planta - 1940 esc.1:2.000 Planta - 1960 esc.1:2.000 Planta - 2001 esc.1:2.000 Ortofotomapa - 2001 esc.1:2.000 2.3. EVOLUÇÃO CONSTRUTIVA/LICENÇAS DE OBRAS - 1892-1973 Planta com identificação das Licenças de Obras Relatório Cronológico Geral de Licenças de obras Relatório de licenças de Obras – Edifício 3. REGISTO TIPOLÓGICO / ANÁLISE DO EDIFÍCIO 3.1. ENQUADRAMENTO ARQUITECTÓNICO EDIFÍCIO DA ELECTRA DEL LIMA – RECONSTITUIÇÃ...</text:p>
          </table:table-cell>
          <table:table-cell table:number-columns-repeated="1015"/>
        </table:table-row>
        <table:table-row table:style-name="ro1">
          <table:table-cell office:value-type="string">
            <text:p>091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092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093_IA_QFR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6.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Sérgio Gomes D:20101208190616Z Adobe Acrobat Pro Extended 9.2.0 D:20101208190616Z Adobe Acrobat Pro Extended 9.2.0 Relatório Final Porto 2010 Intervenção Arqueológica em Quinta dos Frades, Porto – QFR 07 Intervenção Arqueológica em Quinta dos Frades, Porto – QFR 07 FICHA TÉCNICA COORDENAÇÃO GERAL Ricardo Teixeira, Arqueólogo, Mestre em arqueologia Vítor Fonseca, Arqueólogo TRABALHO DE CAMPO Direcção Lídia Baptista Arqueólogos José Gomes Assistentes de arqueólogo Francisco Barros Jorge Oliveira Marco Pereira Nelson Vale TRABALHO DE GABINETE Relatório Lídia Baptista Desenho gráfico Rodry Mendonça Lídia Baptista Tratamento de espólio Verónica Biscaia Conservação e restauro Anabela Hipólito, Técnica Superior de Conservação e Restauro Fotografia de espólio Verónica Biscaia Lídia Baptista Apoio técnico e revisão de texto Lídia Baptista Sérgio Gomes DATA 26 de Novembro de 2010 Relatório Final Novembro de 2010 Página 3 de Intervenção Arqueológica em Quinta dos Frades, Porto – QFR 07 Índice 1.I...</text:p>
          </table:table-cell>
          <table:table-cell table:number-columns-repeated="1015"/>
        </table:table-row>
        <table:table-row table:style-name="ro1">
          <table:table-cell office:value-type="string">
            <text:p>093_I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70518134813Z D:20070518144932+01'00' Acrobat Distiller 5.0.5 (Windows) LIDIABAPTISTA PScript5.dll Version 5.2 Microsoft Word - 093 Rel Prel.doc /MT82/MT69/MT76/MT65/MT84/MT211/MT82/MT73/MT79 /MT80/MT82/MT69/MT76/MT73/MT77/MT73/MT78/MT65/MT82 /MT80/MT111/MT114/MT116/MT111/MT32/MT45/MT32/MT50/MT48/MT48/MT55 /MT84/MT82/MT65/MT66/MT65/MT76/MT72/MT79/MT83/MT32/MT65/MT82/MT81/MT85/MT69/MT79/MT76/MT211/MT71/MT73/MT67/MT79/MT83 /MT81/MT85/MT73/MT78/MT84/MT65/MT32/MT68/MT79/MT83/MT32/MT70/MT82/MT65/MT68/MT69/MT83/MT32/MT45/MT32/MT81/MT70/MT82/MT46/MT48/MT55 /MT82/MT85/MT65/MT32/MT68/MT69/MT32/MT83/MT69/MT82/MT82/MT65/MT76/MT86/MT69/MT83 Intervenção Arqueológica em Quinta dos Frades, Porto – QFR.07 1 de 10 Índice: 1. Introdução ..................................................................................................................... .................................... 2 1.1. Situação de Referência......................................................................................</text:p>
          </table:table-cell>
          <table:table-cell table:number-columns-repeated="1015"/>
        </table:table-row>
        <table:table-row table:style-name="ro1">
          <table:table-cell office:value-type="string">
            <text:p>094_IA_RCP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3. Pistas usadas: relatório, relatorio, relatório final, relatorio final, projecto, intervenção arqueológica, intervencao arqueologica, sondagens, trabalhos arqueológicos, trabalhos arqueologicos.</text:p>
          </table:table-cell>
          <table:table-cell office:value-type="string">
            <text:p>relatório, relatorio, relatório final, relatorio final, projecto, intervenção arqueológica, intervencao arqueologica, sondagens, trabalhos arqueológicos, trabalhos arqueologicos</text:p>
          </table:table-cell>
          <table:table-cell office:value-type="string">
            <text:p>Assinatura PDF</text:p>
          </table:table-cell>
          <table:table-cell office:value-type="string">
            <text:p>D:20080702142950+01'00' Writer OpenOffice.org 2.1 D:20080702150817+01'00' RELATÓRIO V.N. GAIA - 2008 INTERVENÇÃO ARQUEOLÓGICA RUA CASINO DA PONTE SANTA MARINHA RCP.08 Intervenção Arqueológica - Rua Casino da Ponte – RCP. 08 FICHA TÉCNICA COORDENAÇÃO GERAL Ricardo Teixeira Vítor Fonseca COORDENAÇÃO DE PROJECTO Jorge Fonseca TRABALHO DE CAMPO Direcção Graça Pereira Arqueólogos José Gomes Assistentes de arqueólogo Bebiana Mota Ricardo Mota Operários de arqueologia Alexandre Pinto Francisco Monteiro Pedro Pinto TRABALHO DE GABINETE Pesquisa Teresa Silva Introdução Histórica Jorge Fonseca Teresa Silva Relatório Final Jorge Fonseca Revisão Teresa Silva Tratamento de Espólio Teresa Gonçalves Fotografia de Espólio Jorge Fonseca DATA 02 de Julho de 2008 Relatório Final Junho de 2008 Página 1 de 23 Intervenção Arqueológica - Rua Casino da Ponte – RCP. 08 Índice 1.Introdução............................................................................................................ 3 1.1. Contexto...</text:p>
          </table:table-cell>
          <table:table-cell table:number-columns-repeated="1015"/>
        </table:table-row>
        <table:table-row table:style-name="ro1">
          <table:table-cell office:value-type="string">
            <text:p>095_EIA_LISBOA_IC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3. Pistas usadas: relatório, relatorio, projecto, escavação, escavacao, sondagens, prospecção, prospeccao.</text:p>
          </table:table-cell>
          <table:table-cell office:value-type="string">
            <text:p>relatório, relatorio, projecto, escavação, escavacao, sondagens, prospecção, prospeccao</text:p>
          </table:table-cell>
          <table:table-cell office:value-type="string">
            <text:p>Assinatura PDF</text:p>
          </table:table-cell>
          <table:table-cell office:value-type="string">
            <text:p>D:20070626141110+01'00' D:20070626141110+01'00' RELATÓRIO LISBOA - 2007 ESTUDO DE IMPACTE AMBIENTAL DESCRITOR PATRIMÓNIO CULTURAL IC17 - CRIL SUBLANÇO BURACA / PONTINHA PROJECTO BASE Estudo de Impacte Ambiental Descritor Património Cultural - IC17 - CRIL. Sublanço Buraca /Pontinha EQUIPA TÉCNICA COORDENAÇÃO GERAL Ricardo Teixeira, arqueólogo, Mestre em Arqueologia Vítor Fonseca, arqueólogo COORDENAÇÃO DE PROJECTO Teresa Silva, arqueóloga, pós-graduada em museologia Pesquisa Bibliográfica e Documental Josina Almeida, historiadora de Arte Análise da Documentação recebida relativa ao projecto e processo de AIA Teresa Silva e Vítor Fonseca TRABALHO DE CAMPO Prospecção arqueológica Teresa Silva Vítor Fonseca Caracterização dos Elementos com Interesse Patrimonial Josina Almeida e Teresa Silva Fotografia Josina Almeida e Teresa Silva Localização em planta e carta militar Teresa Silva RELATÓRIO Coordenação, revisão, identificação de impactes, proposta de medidas de minimização e calendarização...</text:p>
          </table:table-cell>
          <table:table-cell table:number-columns-repeated="1015"/>
        </table:table-row>
        <table:table-row table:style-name="ro1">
          <table:table-cell office:value-type="string">
            <text:p>096_CER_80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5.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Sérgio Gomes D:20110107123440Z Adobe Acrobat Pro Extended 9.2.0 D:20110107123440Z Adobe Acrobat Pro Extended 9.2.0 Relatório Final Porto 2011 Intervenção Arqueológica na Rua da Cerca, n.º 80 Porto – CER80.07 Intervenção Arqueológica na Rua da Cerca, n.º 80 – Porto – CER80.07 FICHA TÉCNICA COORDENAÇÃO GERAL Ricardo Teixeira, Arqueólogo, Mestre em arqueologia Vítor Fonseca, Arqueólogo COORDENAÇÃO DE PROJECTO Lídia Baptista TRABALHO DE CAMPO Direcção Lídia Baptista Arqueólogos José Gomes Assistentes de arqueólogo Marco Pereira Nilton Nunes Operário de arqueologia Alexandre Pinto TRABALHO DE GABINETE Relatório Lídia Baptista Desenho gráfico Rodry Mendonça Lídia Baptista Tratamento de espólio Teresa Gonçalves Conservação e restauro Anabela Hipólito, Técnica Superior de Conservação e Restauro Fotografia de espólio Teresa Gonçalves Apoio técnico e revisão de texto Lídia Baptista Sérgio Gomes DATA 05 de Janeiro de 2011 Relatório Final Janeiro de 2011 Página 3 de Intervenção Arqueológica na Rua...</text:p>
          </table:table-cell>
          <table:table-cell table:number-columns-repeated="1015"/>
        </table:table-row>
        <table:table-row table:style-name="ro1">
          <table:table-cell office:value-type="string">
            <text:p>096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 Pistas usadas: relatório, relatorio, projecto, intervenção arqueológica, intervencao arqueologica, sondagens, plano de trabalhos, trabalhos arqueológicos, trabalhos arqueologicos.</text:p>
          </table:table-cell>
          <table:table-cell office:value-type="string">
            <text:p>relatório, relatorio, projecto, intervenção arqueológica, intervencao arqueologica, sondagens, plano de trabalhos, trabalhos arqueológicos, trabalhos arqueologicos</text:p>
          </table:table-cell>
          <table:table-cell office:value-type="string">
            <text:p>Assinatura PDF</text:p>
          </table:table-cell>
          <table:table-cell office:value-type="string">
            <text:p>D:20070611104717Z D:20070611115800+01'00' Acrobat Distiller 5.0.5 (Windows) Vitorfonseca PScript5.dll Version 5.2.2 Microsoft Word - 096 Rel Prel.doc /MT82/MT69/MT76/MT65/MT84/MT211/MT82/MT73/MT79 /MT80/MT79/MT82/MT84/MT79/MT32/MT45/MT32/MT50/MT48/MT48/MT55 /MT83/MT79/MT78/MT68/MT65/MT71/MT69/MT78/MT83/MT32/MT65/MT82/MT81/MT85/MT69/MT79/MT76/MT211/MT71/MT73/MT67/MT65/MT83 /MT82/MT85/MT65/MT32/MT68/MT65/MT32/MT67/MT69/MT82/MT67/MT65/MT44/MT32/MT78/MT46/MT186/MT32/MT56/MT48 /MT67/MT69/MT82/MT32/MT56/MT48/MT46/MT48/MT55 /MT80/MT79/MT82/MT84/MT79 Intervenção Arqueológica na Rua da Cerca, n.º 80, Porto – CER 80.07 1 de 11 Índice: 1. Introdução ..................................................................................................................... .................................... 2 1.1. Situação de Referência......................................................................................................... ....................... 2 1.2. Localização........................</text:p>
          </table:table-cell>
          <table:table-cell table:number-columns-repeated="1015"/>
        </table:table-row>
        <table:table-row table:style-name="ro1">
          <table:table-cell office:value-type="string">
            <text:p>097_EIA_Braga_Outlet.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aparenta corresponder a relatório de projeto / intervenção arqueológica. Foram analisadas as primeiras 4 página(s) de um total de 41. Pistas usadas: projecto.</text:p>
          </table:table-cell>
          <table:table-cell office:value-type="string">
            <text:p>projecto</text:p>
          </table:table-cell>
          <table:table-cell office:value-type="string">
            <text:p>Assinatura PDF</text:p>
          </table:table-cell>
          <table:table-cell office:value-type="string">
            <text:p>D:20070604140745Z lilianabarbosa PScript5.dll Version 5.2 Acrobat Distiller 5.0.5 (Windows) D:20070628114709+01'00' Microsoft Word - 097 rel 2007 06 04.doc /MT82/MT69/MT76/MT65/MT84/MT211/MT82/MT73/MT79 /MT66/MT82/MT65/MT71/MT65/MT32/MT45/MT32/MT50/MT48/MT48/MT55 /MT69/MT83/MT84/MT85/MT68/MT79/MT32/MT68/MT69/MT32/MT73/MT77/MT80/MT65/MT67/MT84/MT69/MT32/MT65/MT77/MT66/MT73/MT69/MT78/MT84/MT65/MT76 /MT68/MT69/MT83/MT67/MT82/MT73/MT84/MT79/MT82/MT32/MT80/MT65/MT84/MT82/MT73/MT77/MT211/MT78/MT73/MT79/MT32/MT67/MT85/MT76/MT84/MT85/MT82/MT65/MT76 /MT67/MT79/MT78/MT74/MT85/MT78/MT84/MT79/MT32/MT67/MT79/MT77/MT69/MT82/MT67/MT73/MT65/MT76/MT32/MT66/MT82/MT65/MT71/MT65/MT32/MT79/MT85/MT84/MT76/MT69/MT84 EIA Conjunto Comercial Braga Outlet Pág. 1 de 25 ÍNDICE 1. Introdução ..................................................................................................................... .......................... 2 1.1. Localização e Área de Incidência do Projecto .................................</text:p>
          </table:table-cell>
          <table:table-cell table:number-columns-repeated="1015"/>
        </table:table-row>
        <table:table-row table:style-name="ro1">
          <table:table-cell office:value-type="string">
            <text:p>098_EIA_Famalicao_Shop.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Média</text:p>
          </table:table-cell>
          <table:table-cell office:value-type="string">
            <text:p>Documento PDF; o conteúdo aparenta corresponder a desenho / planta / cad. Foram analisadas as primeiras 4 página(s) de um total de 28. Pistas usadas: planta, perfil, levantamento, topografia.</text:p>
          </table:table-cell>
          <table:table-cell office:value-type="string">
            <text:p>planta, perfil, levantamento, topografia</text:p>
          </table:table-cell>
          <table:table-cell office:value-type="string">
            <text:p>Assinatura PDF</text:p>
          </table:table-cell>
          <table:table-cell office:value-type="string">
            <text:p>D:20070516143402Z D:20070604144207+01'00' Acrobat Distiller 5.0.5 (Windows) rodry PScript5.dll Version 5.2 CAPA RELAT.RIO FAMALICAO final.FH10 /MT82/MT69/MT76/MT65/MT84/MT211/MT82/MT73/MT79 /MT69/MT83/MT84/MT85/MT68/MT79/MT32/MT68/MT69/MT32/MT73/MT77/MT80/MT65/MT67/MT84/MT69/MT32/MT65/MT77/MT66/MT73/MT69/MT78/MT84/MT65/MT76 /MT68/MT69/MT83/MT67/MT82/MT73/MT84/MT79/MT82/MT32/MT80/MT65/MT84/MT82/MT73/MT77/MT211/MT78/MT73/MT79/MT32/MT65/MT82/MT81/MT85/MT73/MT84/MT69/MT67/MT84/MT211/MT78/MT73/MT67/MT79/MT32/MT69/MT32/MT65/MT82/MT81/MT85/MT69/MT79/MT76/MT211/MT71/MT73/MT67/MT79 /MT67/MT79/MT78/MT74/MT85/MT78/MT84/MT79/MT32/MT67/MT79/MT77/MT69/MT82/MT67/MT73/MT65/MT76/MT32/MT70/MT65/MT77/MT65/MT76/MT73/MT67/MT195/MT79/MT32/MT83/MT72/MT79/MT80/MT80/MT73/MT78/MT71 /MT50/MT48/MT48/MT55 EIA Conjunto Comercial Famalicão Shopping Pág. 1 de 19 ÍNDICE 1. Introdução ..................................................................................................................... .....................</text:p>
          </table:table-cell>
          <table:table-cell table:number-columns-repeated="1015"/>
        </table:table-row>
        <table:table-row table:style-name="ro1">
          <table:table-cell office:value-type="string">
            <text:p>099_casas_castelo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projecto, intervenção arqueológica, intervencao arqueologica, trabalhos arqueológicos, trabalhos arqueologicos.</text:p>
          </table:table-cell>
          <table:table-cell office:value-type="string">
            <text:p>relatório, relatorio, projecto, intervenção arqueológica, intervencao arqueologica, trabalhos arqueológicos, trabalhos arqueologicos</text:p>
          </table:table-cell>
          <table:table-cell office:value-type="string">
            <text:p>Assinatura PDF</text:p>
          </table:table-cell>
          <table:table-cell office:value-type="string">
            <text:p>D:20080414112700+01'00' joanaborges PScript5.dll Version 5.2 Acrobat Distiller 8.1.0 (Windows) D:20080414112801+01'00' 099 rel prel 2008 01 24 RELATÓRIO PRELIMINAR Matosinhos - 2007 INTERVENÇÃO ARQUEOLÓGICA NA RUA DO MATINHO E RUA DA ALEGRIA LEÇA DA PALMEIRA MALP. 07 Intervenção Arqueológica - Rua do Matinho e Rua da Alegria – MALP. 07 FICHA TÉCNICA COORDENAÇÃO GERAL Ricardo Teixeira Vítor Fonseca COORDENAÇÃO DE PROJECTO Jorge Fonseca TRABALHO DE CAMPO Direcção César Guedes Jorge Fonseca Arqueólogos Ana Maria Oliveira José Gomes Assistentes de arqueólogo Bebiana Mota Ricardo Mota Operários de arqueologia Francisco Monteiro Pedro Pinto Francisco Monteiro TRABALHO DE GABINETE Relatório Preliminar Jorge Fonseca DATA 26 de Março de 2008 Relatório Preliminar Março de 2008 Página 1 de 14 Intervenção Arqueológica - Rua do Matinho e Rua da Alegria – MALP. 07 Índice 1.Introdução..............................................................................................................3 2.Obje...</text:p>
          </table:table-cell>
          <table:table-cell table:number-columns-repeated="1015"/>
        </table:table-row>
        <table:table-row table:style-name="ro1">
          <table:table-cell office:value-type="string">
            <text:p>099_IA_MALP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8. Pistas usadas: relatório, relatorio, relatório final, relatorio final, projecto, intervenção arqueológica, intervencao arqueologica, acompanhamento arqueológico, acompanhamento arqueologico, escavação, escavacao, trabalhos arqueológicos.</text:p>
          </table:table-cell>
          <table:table-cell office:value-type="string">
            <text:p>relatório, relatorio, relatório final, relatorio final, projecto, intervenção arqueológica, intervencao arqueologica, acompanhamento arqueológico, acompanhamento arqueologico, escavação, escavacao, trabalhos arqueológicos</text:p>
          </table:table-cell>
          <table:table-cell office:value-type="string">
            <text:p>Assinatura PDF</text:p>
          </table:table-cell>
          <table:table-cell office:value-type="string">
            <text:p>D:20091126165425Z D:20091127123216Z RELATÓRIO MATOSINHOS - 2007 INTERVENÇÃO ARQUEOLÓGICA NA RUA DO MATINHO E RUA DA ALEGRIA - - LEÇA DA PALMEIRA Intervenção Arqueológica na Rua do Matinho e Rua da Alegria – Leça da Palmeira - MALP.07 FICHA TÉCNICA COORDENAÇÃO GERAL Ricardo Teixeira, Arqueólogo, Mestre em arqueologia Vítor Fonseca, Arqueólogo COORDENAÇÃO DE PROJECTO Jorge Fonseca, Arqueólogo TRABALHO DE CAMPO Direcção César Guedes, Arqueólogo Jorge Fonseca Acompanhamento/escavação arqueológica Ana Maria Oliveira, Arqueóloga José Gomes, Arqueólogo Bebiana Mota, Assistente de Arqueólogo Ricardo Mota, Assistente de Arqueólogo Pedro Pinto, Operário de Arqueologia TRABALHO DE GABINETE Pesquisa bibliográfica e enquadramento histórico Pedro Maia, Técnico de Património Cultural Relatório Jorge Fonseca Desenho gráfico Ana Paulo, desenhadora de arqueologia Tratamento de espólio Anabela Rodrigues, Assistente de Arqueólogo Paula Alves, Operária de Arqueologia Teresa Gonçalves, Assistente de Arqueól...</text:p>
          </table:table-cell>
          <table:table-cell table:number-columns-repeated="1015"/>
        </table:table-row>
        <table:table-row table:style-name="ro1">
          <table:table-cell office:value-type="string">
            <text:p>100_IA_M_GB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cto, intervenção arqueológica, intervencao arqueologica, acompanhamento arqueológico, acompanhamento arqueologico, sondagem, sondagens, plano de trabalhos.</text:p>
          </table:table-cell>
          <table:table-cell office:value-type="string">
            <text:p>relatório, relatorio, relatório final, relatorio final, projecto, intervenção arqueológica, intervencao arqueologica, acompanhamento arqueológico, acompanhamento arqueologico, sondagem, sondagens, plano de trabalhos</text:p>
          </table:table-cell>
          <table:table-cell office:value-type="string">
            <text:p>Assinatura PDF</text:p>
          </table:table-cell>
          <table:table-cell office:value-type="string">
            <text:p>D:20071204150216Z Writer OpenOffice.org 2.1 D:20071204164655Z RELATÓRIO MATOSINHOS - 2007 INTERVENÇÃO ARQUEOLÓGICA NO QUARTEIRÃO DA “GIST-BROCADES” Intervenção Arqueológica no Quarteirão da “Gist-Brocades” FICHA TÉCNICA COORDENAÇÃO GERAL Ricardo Teixeira, Arqueólogo, Mestre em arqueologia Vítor Fonseca, Arqueólogo COORDENAÇÃO DE PROJECTO Vítor Fonseca TRABALHO DE CAMPO Direcção Joana Alves Ferreira, Arqueóloga Arqueólogos Susana Mesquita, Arqueóloga Ângela Moura, Arqueóloga Desenhadores Joana Alves Ferreira Susana Mesquita TRABALHO DE GABINETE Relatório Joana Alves Ferreira Susana Mesquita Desenho Gráfico Ana Paulo Fotografia de Espólio Revisão Teresa Silva DATA 4 de Dezembro de 2007 Relatório Final Dezembro de 2007 Página 1 de 31 Intervenção Arqueológica no Quarteirão da “Gist-Brocades” Índice 1.Introdução........................................................................................................................... 3 1.1.Localização............................................</text:p>
          </table:table-cell>
          <table:table-cell table:number-columns-repeated="1015"/>
        </table:table-row>
        <table:table-row table:style-name="ro1">
          <table:table-cell office:value-type="string">
            <text:p>101_IA_FRS_15_0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100412123439+01'00' teresasilva PScript5.dll Version 5.2 Acrobat Distiller 8.1.0 (Windows) D:20100412124350+01'00' 101 REL 2010 03 29 althelena Relatório Final Porto 2010 ACOMPANHAMENTO ARQUEOLÓGICO NA RUA FRANCISCO DA ROCHA SOARES nº 15 Acompanhamento Arqueológico na Rua Francisco da Rocha Soares nº 15 FICHA TÉCNICA COORDENAÇÃO GERAL Ricardo Teixeira, Arqueólogo, Mestre em arqueologia Vítor Fonseca, Arqueólogo COORDENAÇÃO DE PROJECTO Jorge Fonseca, Arqueólogo TRABALHO DE CAMPO Direcção Helena Marçal, Arqueóloga TRABALHO DE GABINETE Relatório Helena Marçal Desenho gráfico Rodry Mendonça Tratamento de espólio Teresa Gonçalves, Assistente de Arqueóloga; Anabela Rodrigues, Assistente de Arqueóloga Conservação e restauro Anabela Hipólito, Técnica Superior de Conservação e Restauro Helena Vaz, Técnica Superior de Conservação e Restauro Fotografia de espólio Pedro Maia, Técnico Superior de Património Cultural Apoio técnico e revisão de texto Teresa Silva, Arqueóloga, pós-graduada em Muse...</text:p>
          </table:table-cell>
          <table:table-cell table:number-columns-repeated="1015"/>
        </table:table-row>
        <table:table-row table:style-name="ro1">
          <table:table-cell office:value-type="string">
            <text:p>102_general_torres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relatório final, relatorio final, projecto, intervenção arqueológica, intervencao arqueologica, sondagens, plano de trabalhos, trabalhos arqueológicos, trabalhos arqueologicos.</text:p>
          </table:table-cell>
          <table:table-cell office:value-type="string">
            <text:p>relatório, relatorio, relatório final, relatorio final, projecto, intervenção arqueológica, intervencao arqueologica, sondagens, plano de trabalhos, trabalhos arqueológicos, trabalhos arqueologicos</text:p>
          </table:table-cell>
          <table:table-cell office:value-type="string">
            <text:p>Assinatura PDF</text:p>
          </table:table-cell>
          <table:table-cell office:value-type="string">
            <text:p>D:20070928153751+01'00' D:20070928153751+01'00' RELATÓRIO PRELIMINAR V. N. GAIA - 2007 SONDAGENS ARQUEOLÓGICAS NO EDIFÍCIO NA RUA GENERAL TORRES, Nº11/23 Intervenção Arqueológica na Rua General Torres, nº 11/23 – Vila Nova de Gaia FICHA TÉCNICA COORDENAÇÃO GERAL Ricardo Teixeira, Arqueólogo, Mestre em arqueologia Vítor Fonseca, Arqueólogo COORDENAÇÃO DE PROJECTO Jorge Fonseca, Arqueólogo TRABALHO DE CAMPO Direcção Helena Marçal, Arqueóloga Arqueólogo José Gomes Assistente de arqueólogo Rodry Mendonça Desenhadores Rodry Mendonça, Assistente de arqueólogo Nilton Nunes, Desenhador TRABALHO DE GABINETE Relatório Helena Marçal Desenho Gráfico Ana Paulo, Desenhadora de arqueologia Revisão Teresa Silva, Arqueóloga, Pós-graduada em Museologia DATA 4 de Julho de 2007 Relatório Preliminar Julho de 2007 Página 1 de 10 Intervenção Arqueológica na Rua General Torres, nº 11/23 – Vila Nova de Gaia Índice 1.Introdução........................................................................................</text:p>
          </table:table-cell>
          <table:table-cell table:number-columns-repeated="1015"/>
        </table:table-row>
        <table:table-row table:style-name="ro1">
          <table:table-cell office:value-type="string">
            <text:p>102_IA_GT_11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929160649+01'00' pedromaia PScript5.dll Version 5.2 Acrobat Distiller 8.2.3 (Windows) D:20100929172603+01'00' 102 relatorio 2010 09 29 Relatório Final Porto 2010 Intervenção Arqueológica na Rua General Torres nº 11/23 Vila Nova de Gaia Intervenção Arqueológica na Rua General Torres nº11/23 FICHA TÉCNICA COORDENAÇÃO GERAL Ricardo Teixeira, Arqueólogo, Mestre em Arqueologia Vítor Fonseca, Arqueólogo COORDENAÇÃO DE PROJECTO Jorge Fonseca, Arqueólogo TRABALHO DE CAMPO Direcção Helena Marçal, Arqueóloga Arqueólogos Jorge Fonseca José Gomes Assistentes de arqueólogo Nilton Nunes Rodry Mendonça TRABALHO DE GABINETE Relatório Helena Marçal Desenho gráfico Rodry Mendonça Tratamento de espólio Anabela Rodrigues, Assistente de Arqueóloga Teresa Gonçalves, Assistente de Arqueóloga Conservação e restauro Anabela Hipólito, Técnica Superior de Conservação e Restauro Helena Vaz, Técnica Superior de Conservação e Restauro Fotografia de espólio Pedro Maia, Técnico Superior de Património Cultural...</text:p>
          </table:table-cell>
          <table:table-cell table:number-columns-repeated="1015"/>
        </table:table-row>
        <table:table-row table:style-name="ro1">
          <table:table-cell office:value-type="string">
            <text:p>103_IA_MPS_P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0. Pistas usadas: relatório, relatorio, relatório final, relatorio final, projecto, intervenção arqueológica, intervencao arqueologica, sondagem, sondagens, trabalhos arqueológicos, trabalhos arqueologicos.</text:p>
          </table:table-cell>
          <table:table-cell office:value-type="string">
            <text:p>relatório, relatorio, relatório final, relatorio final, projecto, intervenção arqueológica, intervencao arqueologica, sondagem, sondagens, trabalhos arqueológicos, trabalhos arqueologicos</text:p>
          </table:table-cell>
          <table:table-cell office:value-type="string">
            <text:p>Assinatura PDF</text:p>
          </table:table-cell>
          <table:table-cell office:value-type="string">
            <text:p>D:20080903161331+01'00' Writer OpenOffice.org 2.1 D:20080916173704+01'00' RELATÓRIO PENAFIEL - 2008 INTERVENÇÃO ARQUEOLÓGICA MOSTEIRO DE PAÇO DE SOUSA MPS P.07 Intervenção Arqueológica no Mosteiro de Paço de Sousa/Ponte de Gamuz – MPS P 07 FICHA TÉCNICA COORDENAÇÃO GERAL Ricardo Teixeira Vítor Fonseca Maria José Santos COORDENAÇÃO DE PROJECTO Jorge Fonseca TRABALHO DE CAMPO Direcção Jorge Fonseca Arqueólogo Helena Bernardo Assistente de arqueólogo Rodry Mendonça Registo Gráfico da Ponte - Coordenação Jorge Fonseca Teresa Silva Registo Gráfico da Ponte – Desenho e Fotografia Rodry Mendonça Helena Bernardo Operários de arqueologia Alexandre Pinto Francisco Monteiro TRABALHO DE GABINETE Pesquisa Bibliográfica Jorge Fonseca Introdução Histórica Jorge Fonseca Relatório da Intervenção Jorge Fonseca Tratamento de Espólio Anabela Hipólito Sónia Santos Teresa Gonçalves Fotografia de Espólio Jorge Fonseca Desenho Gráfico Ana Paulo Rodry Mendonça Revisão Teresa Silva DATA 26 de Agosto de 2008 Rel...</text:p>
          </table:table-cell>
          <table:table-cell table:number-columns-repeated="1015"/>
        </table:table-row>
        <table:table-row table:style-name="ro1">
          <table:table-cell office:value-type="string">
            <text:p>103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9.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70822162057+01'00' D:20070822163451+01'00' RELATÓRIO PRELIMINAR PAÇO DE SOUSA - 2007 INTERVENÇÃO ARQUEOLÓGICA MOSTEIRO DE PAÇO DE SOUSA Intervenção Arqueológica no Mosteiro de Paço de Sousa MPS P. 07 FICHA TÉCNICA COORDENAÇÃO GERAL Ricardo Teixeira, Arqueólogo Vítor Fonseca, Arqueólogo Maria José Santos, Arqueóloga COORDENAÇÃO DE PROJECTO Jorge Fonseca, arqueólogo TRABALHO DE CAMPO Direcção Jorge Fonseca Arqueólogos Helena Bernardo, Arqueóloga Assistentes de arqueólogo Rodry Mendonça Registo Gráfico da Ponte - Coordenação Jorge Fonseca Teresa Silva, Arqueóloga Registo Gráfico da Ponte - Desenho Rodry Mendonça Operários de arqueologia Alexandre Pinto Francisco Monteiro TRABALHO DE GABINETE Relatório Jorge Fonseca Revisão Teresa Silva DATA 21 de Agosto de 2007 Relatório Preliminar Agosto de 2007 Página 1 de 18 Intervenção Arqueológica no Mosteiro de Paço de Sousa MPS P. 07 Índice 1.Introdução...............................................................................................</text:p>
          </table:table-cell>
          <table:table-cell table:number-columns-repeated="1015"/>
        </table:table-row>
        <table:table-row table:style-name="ro1">
          <table:table-cell office:value-type="string">
            <text:p>104_Cad_Encargos_final.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Alta</text:p>
          </table:table-cell>
          <table:table-cell office:value-type="string">
            <text:p>Documento PDF; o conteúdo aparenta corresponder a tabela / base de dados / relatório de projeto / intervenção arqueológica. Foram analisadas as primeiras 4 página(s) de um total de 39. Pistas usadas: registo, descrição, descricao, valor, estado, relatório, relatorio, relatório final, relatorio final.</text:p>
          </table:table-cell>
          <table:table-cell office:value-type="string">
            <text:p>registo, descrição, descricao, valor, estado, relatório, relatorio, relatório final, relatorio final</text:p>
          </table:table-cell>
          <table:table-cell office:value-type="string">
            <text:p>Assinatura PDF</text:p>
          </table:table-cell>
          <table:table-cell office:value-type="string">
            <text:p>D:20071018123717+01'00' joanaborges PScript5.dll Version 5.2 Acrobat Distiller 8.0.0 (Windows) D:20071018144227+01'00' 104 Cad Encargos vERSÃO fINAL LINHA DO MINHO ESTAÇÃO DE PORTO S.BENTO MONITORIZAÇÃO E IDENTIFICAÇÃO DAS PATOLOGIAS DOS PAINÉIS DE AZULEJOS ESTADO DE CONSERVAÇÃO E PROPOSTA DE INTERVENÇÃO DE CONSERVAÇÃO E RESTAURO PORTO OUTUBRO 2007 ÍNDICE 1. DESCRIÇÃO DO CONJUNTO 2. ESTADO DE CONSERVAÇÃO 3. CONSERVAÇÃO E RESTAURO DOS PAINÉIS DE AZULEJO 3.1. GENERALIDADES 4. ACTIVIDADES DE CONSERVAÇÃO E RESTAURO 5. CARACTERIZAÇÃO DAS ACTIVIDADES DE CONSERVAÇÃO E RESTAURO 5.1. DOCUMENTAÇÃO 5.1.1.Registo fotográfico 5.1.2.Registo gráfico 5.1.3.Relatório Final 5.2.INTERVENÇÃO 5.2.1.Limpeza primária 5.2.2.Faceamento 5.2.3.Etiquetagem e numeração 5.2.4.Remoção de argamassa 5.2.5.Levantamento 5.2.6.Limpeza de vidrado 5.2.7.Colagem 5.2.8.Assentamento 5.2.9.Consolidação do interface entre os azulejos e o suporte 5.3.INTERVENÇÕES ESPECÍFICAS 5.3.1.Protecção dos azulejos com placas de esferovite...</text:p>
          </table:table-cell>
          <table:table-cell table:number-columns-repeated="1015"/>
        </table:table-row>
        <table:table-row table:style-name="ro1">
          <table:table-cell office:value-type="string">
            <text:p>105_IA_PDG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50323103237Z RTVF RTVF Writer LibreOffice 4.3 D:20150323111302Z RELATÓRIO FINAL Intervenção Arqueológica Ponte de D. Goimill Matosinhos 2007 Copyright © arqueologia e património Matosinhos 2015 PDG.07 Intervenção Arqueológica Ponte de D. Goimil FICHA TÉCNICA Ricardo Teixeira &amp; Vítor Fonseca, Arqueologia Lda. PROJECTO 105 Coordenação geral Ricardo Teixeira, arqueólogo, mestre em arqueologia Vítor Fonseca, arqueólogo Coordenação de projecto Jorge Fonseca, arqueólogo TRABALHO DE CAMPO Direcção Jorge Fonseca Arqueólogos César Guedes José Gomes Liliana Barbosa Assistentes de arqueólogo Bebiana Mota Ricardo Mota Rodry Mendonça Operários de arqueologia Alexandre Pinto Francisco Monteiro Pedro Pinto Identificação de espécies infestantes biológicas e levantamento do estado de conservação da estrutura Anabela Hipólito, técnica superior de conservação e restauro Joana Marques, bióloga Registo de edificado Teresa Silva, arqueóloga, pós-graduada em museologia (fotografia) Bebiana Mota (desenho...</text:p>
          </table:table-cell>
          <table:table-cell table:number-columns-repeated="1015"/>
        </table:table-row>
        <table:table-row table:style-name="ro1">
          <table:table-cell office:value-type="string">
            <text:p>106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71112120910Z D:20071112120910Z RELATÓRIO PRELIMINAR PORTO - 2007 TRABALHOS ARQUEOLÓGICOS NO CASTRO DE VALADARES VILA NOVA DE GAIA Intervenção Arqueológica no Castro de Valadares – Vila Nova de Gaia FICHA TÉCNICA COORDENAÇÃO GERAL Ricardo Teixeira Vítor Fonseca COORDENAÇÃO DE PROJECTO Jorge Fonseca/ Lídia Baptista TRABALHO DE CAMPO Direcção José Gomes Arqueólogos Cesar Guedes Assistentes de arqueólogo Ricardo Mota Bebiana Mota Operários de Arquelogia Pedro Pinto Alexandre Pinto TRABALHO DE GABINETE Relatório José Gomes Fotografia de Espólio Verónica Biscaia Revisão Teresa Silva DATA Porto, 09 de Novembro de 2007 Relatório Preliminar Novembro de 2007 Página 1 de 17 Intervenção Arqueológica no Castro de Valadares – Vila Nova de Gaia Índice 1. Introdução.............................................................................................................3 1.1.Localização......................................................................................................4 2.Obj...</text:p>
          </table:table-cell>
          <table:table-cell table:number-columns-repeated="1015"/>
        </table:table-row>
        <table:table-row table:style-name="ro1">
          <table:table-cell office:value-type="string">
            <text:p>107_BRP 07_HPN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4017+01'00' Writer OpenOffice.org 2.1 D:20070919150527+01'00' RELATÓRIO PRELIMINAR BEJA - 2007 TRABALHOS ARQUEOLÓGICOS NO ÂMBITO DO BLOCO DE REGA DO PISÃO HORTA DE PANÉQUE Intervenção Arqueológica em Horta de Panéque HPN.07 FICHA TÉCNICA COORDENAÇÃO GERAL Ricardo Teixeira, Arqueólogo, Mestre em arqueologia Vítor Fonseca, Arqueólogo COORDENAÇÃO DE PROJECTO Lídia Baptista TRABALHO DE CAMPO Direcção Lurdes Cunha Arqueólogos Barbara Carvalho Sara Luz Vera Aldeias Assistentes de arqueólogo Rodry Mendonça Nelson Vale Desenhadores Operários indiferenciados Pedro Maurício Marco Maurício Pedro Guia André Guia TRABALHO DE GABINETE Relatório Lurdes Cunha Cartografia CL Topografia, Lda Carlos Louzeiro Revisão Teresa Silva Relatório do Estudo Antropológico Nicolás Márquez-Grant DATA 17 de Setembro 2007 Relatório Preliminar Setembro de 2007 Página 1 de 16 Intervenção Arqueológica em Horta de Panéque HPN.07 Índice 1.Introdução..................................................................</text:p>
          </table:table-cell>
          <table:table-cell table:number-columns-repeated="1015"/>
        </table:table-row>
        <table:table-row table:style-name="ro1">
          <table:table-cell office:value-type="string">
            <text:p>107_BRP 07_TRG8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4820+01'00' Writer OpenOffice.org 2.1 D:20070919150910+01'00' RELATÓRIO PRELIMINAR BEJA - 2007 TRABALHOS ARQUEOLÓGICOS NO ÂMBITO DO BLOCO DE REGA DO PISÃO TRIGACHES 8 Intervenção Arqueológica em Trigaches 8 - TRG 8.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9 Intervenção Arqueológica em Trigaches 8 - TRG 8.07 Índice 1.Introdução............................................................................................................ 3 2.Intervençã...</text:p>
          </table:table-cell>
          <table:table-cell table:number-columns-repeated="1015"/>
        </table:table-row>
        <table:table-row table:style-name="ro1">
          <table:table-cell office:value-type="string">
            <text:p>107_BRP_07_MB1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8192505+01'00' D:20070918192505+01'00' RELATÓRIO PRELIMINAR BEJA - 2007 TRABALHOS ARQUEOLÓGICOS NO ÂMBITO DO BLOCO DE REGA DO PISÃO MONTE DE BAIXO 1 Intervenção Arqueológica em Monte de Baixo 1 - MB1.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9 Intervenção Arqueológica em Monte de Baixo 1 - MB1.07 Índice 1.Introdução............................................................................................................ 3 2.Intervenção Arqueológica....</text:p>
          </table:table-cell>
          <table:table-cell table:number-columns-repeated="1015"/>
        </table:table-row>
        <table:table-row table:style-name="ro1">
          <table:table-cell office:value-type="string">
            <text:p>107_BRP_07_MB3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4431+01'00' Writer OpenOffice.org 2.1 D:20070919150556+01'00' RELATÓRIO PRELIMINAR BEJA - 2007 TRABALHOS ARQUEOLÓGICOS NO ÂMBITO DO BLOCO DE REGA DO PISÃO MONTE DE BAIXO 3 Intervenção Arqueológica em Monte de Baixo 3 MB3.07 FICHA TÉCNICA COORDENAÇÃO GERAL Ricardo Teixeira, Arqueólogo, Mestre em arqueologia Vítor Fonseca, Arqueólogo COORDENAÇÃO DE PROJECTO Lídia Baptista TRABALHO DE CAMPO Direcção Lurdes Cunha Arqueólogos Barbara Carvalho Sara Luz Vera Aldeias Assistentes de arqueólogo Rodry Mendonça Nelson Vale Desenhadores Operários indiferenciados Pedro Maurício Marco Maurício Pedro Guia André Guia TRABALHO DE GABINETE Relatório Lurdes Cunha Cartografia CL Topografia, Lda Carlos Louzeiro Revisão Teresa Silva DATA 17 de Setembro 2007 Relatório Preliminar Setembro de 2007 Página 1 de 10 Intervenção Arqueológica em Monte de Baixo 3 MB3.07 Índice 1.Introdução............................................................................................................ 3 2.Interv...</text:p>
          </table:table-cell>
          <table:table-cell table:number-columns-repeated="1015"/>
        </table:table-row>
        <table:table-row table:style-name="ro1">
          <table:table-cell office:value-type="string">
            <text:p>107_BRP_07_MB4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8192633+01'00' D:20070918192633+01'00' RELATÓRIO PRELIMINAR BEJA - 2007 TRABALHOS ARQUEOLÓGICOS NO ÂMBITO DO BLOCO DE REGA DO PISÃO MONTE DE BAIXO 4 Intervenção Arqueológica em Monte de Baixo 4 - MB4.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8 Intervenção Arqueológica em Monte de Baixo 4 - MB4.07 Índice 1.Introdução............................................................................................................ 3 2.Intervenção Arqueológica....</text:p>
          </table:table-cell>
          <table:table-cell table:number-columns-repeated="1015"/>
        </table:table-row>
        <table:table-row table:style-name="ro1">
          <table:table-cell office:value-type="string">
            <text:p>107_BRP_07_MB5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4.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4608+01'00' Writer OpenOffice.org 2.1 D:20070919150752+01'00' RELATÓRIO PRELIMINAR BEJA - 2007 TRABALHOS ARQUEOLÓGICOS NO ÂMBITO DO BLOCO DE REGA DO PISÃO MONTE DE BAIXO 5 Intervenção Arqueológica em Monte de Baixo 5 MB5.07 FICHA TÉCNICA COORDENAÇÃO GERAL Ricardo Teixeira, Arqueólogo, Mestre em arqueologia Vítor Fonseca, Arqueólogo COORDENAÇÃO DE PROJECTO Lídia Baptista TRABALHO DE CAMPO Direcção Lurdes Cunha Arqueólogos Barbara Carvalho Sara Luz Vera Aldeias Assistentes de arqueólogo Rodry Mendonça Nelson Vale Desenhadores Operários indiferenciados Pedro Maurício Marco Maurício Pedro Guia André Guia TRABALHO DE GABINETE Relatório Lurdes Cunha Cartografia CL Topografia, Lda Carlos Louzeiro Revisão Teresa Silva DATA 17 de Setembro 2007 Relatório Preliminar Setembro de 2007 Página 1 de 13 Intervenção Arqueológica em Monte de Baixo 5 MB5.07 Índice 1.Introdução............................................................................................................ 3 2.Interv...</text:p>
          </table:table-cell>
          <table:table-cell table:number-columns-repeated="1015"/>
        </table:table-row>
        <table:table-row table:style-name="ro1">
          <table:table-cell office:value-type="string">
            <text:p>107_BRP_07_TRG9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5039+01'00' Writer OpenOffice.org 2.1 D:20070919151011+01'00' RELATÓRIO PRELIMINAR BEJA - 2007 TRABALHOS ARQUEOLÓGICOS NO ÂMBITO DO BLOCO DE REGA DO PISÃO TRIGACHES 9 Intervenção Arqueológica em Trigaches 9 - TRG 9.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11 Intervenção Arqueológica em Trigaches 9 - TRG 9.07 Índice 1.Introdução............................................................................................................ 3 2.Intervenç...</text:p>
          </table:table-cell>
          <table:table-cell table:number-columns-repeated="1015"/>
        </table:table-row>
        <table:table-row table:style-name="ro1">
          <table:table-cell office:value-type="string">
            <text:p>107_BRP_07_VA7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5205+01'00' Writer OpenOffice.org 2.1 D:20070919151105+01'00' RELATÓRIO PRELIMINAR BEJA - 2007 TRABALHOS ARQUEOLÓGICOS NO ÂMBITO DO BLOCO DE REGA DO PISÃO VALE D’ARÉM 7 Intervenção Arqueológica em Vale d’Arém 7 - VA 7 .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10 Intervenção Arqueológica em Vale d’Arém 7 - VA 7 .07 Índice 1.Introdução............................................................................................................ 3 2.Int...</text:p>
          </table:table-cell>
          <table:table-cell table:number-columns-repeated="1015"/>
        </table:table-row>
        <table:table-row table:style-name="ro1">
          <table:table-cell office:value-type="string">
            <text:p>107_BRP_07_VFR4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 Pistas usadas: 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relatório, relatorio, projecto, intervenção arqueológica, intervencao arqueologica, acompanhamento arqueológico, acompanhamento arqueologico, escavação, escavacao, sondagens, trabalhos arqueológicos, trabalhos arqueologicos</text:p>
          </table:table-cell>
          <table:table-cell office:value-type="string">
            <text:p>Assinatura PDF</text:p>
          </table:table-cell>
          <table:table-cell office:value-type="string">
            <text:p>D:20070919135349+01'00' Writer OpenOffice.org 2.1 D:20070919151141+01'00' RELATÓRIO PRELIMINAR BEJA - 2007 TRABALHOS ARQUEOLÓGICOS NO ÂMBITO DO BLOCO DE REGA DO PISÃO VALE FONTE DA RATA 4 Intervenção Arqueológica em Vale Fonte da Rata 4 - VFR 4.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11 Intervenção Arqueológica em Vale Fonte da Rata 4 - VFR 4.07 Índice 1.Introdução..................................................................................................</text:p>
          </table:table-cell>
          <table:table-cell table:number-columns-repeated="1015"/>
        </table:table-row>
        <table:table-row table:style-name="ro1">
          <table:table-cell office:value-type="string">
            <text:p>107_IA_BRP_07_HP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090209123635Z Writer OpenOffice.org 3.0 D:20090213162554Z RELATÓRIO FINAL BEJA - 2007 TRABALHOS ARQUEOLÓGICOS NO ÂMBITO DO BLOCO DE REGA DO PISÃO HORTA DE PANÉQUE - - BRP.07 HPN Intervenção Arqueológica em Horta de Panéque FICHA TÉCNICA COORDENAÇÃO GERAL Ricardo Teixeira, Arqueólogo, Mestre em arqueologia Vítor Fonseca, Arqueólogo COORDENAÇÃO DE PROJECTO Lídia Baptista, Mestre em Arqueologia TRABALHO DE CAMPO Direcção Lurdes Cunha, Mestre em Arqueologia Arqueólogos Barbara Carvalho Sara Luz Vera Aldeias Assistentes de arqueólogo Rodry Mendonça Nelson Vale Trabalhadores Indiferenciados Pedro Maurício Marco Maurício Pedro Guia André Guia Trabalho de Topografia CL Topografia, Lda Carlos Louzeiro TRABALHO DE GABINETE Relatório Lurdes Cunha Lídia Baptista Desenho Gráfico Rodry Mendonça Tratamento de Espólio Francisco Barros Fotografia de Espólio Francisco Barros Revisão Lídia Baptista DATA 30 de Janeiro de 2009 Relatório Final Janeiro de 2009 Página 1 de 23 Intervenção Arqueológica em H...</text:p>
          </table:table-cell>
          <table:table-cell table:number-columns-repeated="1015"/>
        </table:table-row>
        <table:table-row table:style-name="ro1">
          <table:table-cell office:value-type="string">
            <text:p>107_IA_BRP_07_MB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090209135539Z Writer OpenOffice.org 3.0 D:20090213162738Z RELATÓRIO FINAL BEJA - 2007 TRABALHOS ARQUEOLÓGICOS NO ÂMBITO DO BLOCO DE REGA DO PISÃO MONTE DE BAIXO 1 - - BRP.07 MB1 Intervenção Arqueológica em Monte de Baixo 1 FICHA TÉCNICA COORDENAÇÃO GERAL Ricardo Teixeira, Arqueólogo, Mestre em arqueologia Vítor Fonseca, Arqueólogo COORDENAÇÃO DE PROJECTO Lídia Baptista, Mestre em Arqueologia TRABALHO DE CAMPO Direcção Lídia Baptista Arqueólogos Barbara Carvalho Lurdes Cunha, Mestre em Arqueologia Sara Luz Vera Aldeias Assistentes de arqueólogo Rodry Mendonça Nelson Vale Trabalhadores Indiferenciados Pedro Maurício Marco Maurício Pedro Guia André Guia Trabalho de Topografia CL Topografia, Lda Carlos Louzeiro TRABALHO DE GABINETE Relatório Lurdes Cunha Lídia Baptista Desenho Gráfico Rodry Mendonça Tratamento de Espólio Francisco Barros Fotografia de Espólio Francisco Barros Pedro Maia Revisão Lídia Baptista DATA 30 de Janeiro de 2009 Relatório Final Janeiro de 2009 Página 1 de 19 Int...</text:p>
          </table:table-cell>
          <table:table-cell table:number-columns-repeated="1015"/>
        </table:table-row>
        <table:table-row table:style-name="ro1">
          <table:table-cell office:value-type="string">
            <text:p>107_IA_BRP_07_MB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1.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090206103046Z Writer OpenOffice.org 2.1 D:20090213162851Z RELATÓRIO FINAL BEJA - 2007 TRABALHOS ARQUEOLÓGICOS NO ÂMBITO DO BLOCO DE REGA DO PISÃO MONTE DE BAIXO 3 - - BRP.07 MB3 Intervenção Arqueológica em Monte de Baixo 3 FICHA TÉCNICA COORDENAÇÃO GERAL Ricardo Teixeira, Arqueólogo, Mestre em arqueologia Vítor Fonseca, Arqueólogo COORDENAÇÃO DE PROJECTO Lídia Baptista, Mestre em Arqueologia TRABALHO DE CAMPO Direcção Lurdes Cunha, Mestre em Arqueologia Arqueólogos Bárbara Carvalho Sara Luz Vera Aldeias Assistentes de arqueólogo Rodry Mendonça Nelson Vale Trabalhadores Indiferenciados Pedro Maurício Marco Maurício Pedro Guia André Guia Trabalho de Topografia CL Topografia, Lda Carlos Louzeiro TRABALHO DE GABINETE Relatório Lurdes Cunha Lídia Baptista Desenho Gráfico Rodry Mendonça Tratamento de Espólio Francisco Barros Fotografia de Espólio Francisco Barros Pedro Maia Revisão Lídia Baptista DATA 30 de Janeiro de 2009 Relatório Final Janeiro de 2009 Página 1 de 14 Intervenção Arqueo...</text:p>
          </table:table-cell>
          <table:table-cell table:number-columns-repeated="1015"/>
        </table:table-row>
        <table:table-row table:style-name="ro1">
          <table:table-cell office:value-type="string">
            <text:p>107_IA_BRP_07_MB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7. Pistas usadas: relatório, relatorio, relatório final, relatorio final, projecto, intervenção arqueológica, intervencao arqueologica, sondagens, trabalhos arqueológicos, trabalhos arqueologicos.</text:p>
          </table:table-cell>
          <table:table-cell office:value-type="string">
            <text:p>relatório, relatorio, relatório final, relatorio final, projecto, intervenção arqueológica, intervencao arqueologica, sondagens, trabalhos arqueológicos, trabalhos arqueologicos</text:p>
          </table:table-cell>
          <table:table-cell office:value-type="string">
            <text:p>Assinatura PDF</text:p>
          </table:table-cell>
          <table:table-cell office:value-type="string">
            <text:p>D:20090209152135Z Writer OpenOffice.org 3.0 D:20090213163512Z RELATÓRIO FINAL BEJA - 2007 TRABALHOS ARQUEOLÓGICOS NO ÂMBITO DO BLOCO DE REGA DO PISÃO MONTE DE BAIXO 5 - - BRP.07 MB5 Intervenção Arqueológica em Monte de Baixo 5 FICHA TÉCNICA COORDENAÇÃO GERAL Ricardo Teixeira, Arqueólogo, Mestre em arqueologia Vítor Fonseca, Arqueólogo COORDENAÇÃO DE PROJECTO Lídia Baptista, Mestre em Arqueologia TRABALHO DE CAMPO Direcção Lurdes Cunha, Mestre em Arqueologia Arqueólogos Barbara Carvalho Lídia Baptista Sara Luz Vera Aldeias Assistentes de arqueólogo Rodry Mendonça Nelson Vale Trabalhadores Indiferenciados Pedro Maurício Marco Maurício Pedro Guia André Guia Trabalho de Topografia CL Topografia, Lda Carlos Louzeiro TRABALHO DE GABINETE Relatório Lurdes Cunha Lídia Baptista Desenho Gráfico Rodry Mendonça Tratamento de Espólio Francisco Barros Fotografia de Espólio Francisco Barros Pedro Maia Revisão Lídia Baptista Data 30 de Janeiro de 2009 Relatório Final Janeiro de 2009 Página 1 de 35 Int...</text:p>
          </table:table-cell>
          <table:table-cell table:number-columns-repeated="1015"/>
        </table:table-row>
        <table:table-row table:style-name="ro1">
          <table:table-cell office:value-type="string">
            <text:p>107_IA_BRP_07_MB_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206104602Z Writer OpenOffice.org 2.1 D:20090213163001Z RELATÓRIO FINAL BEJA - 2007 TRABALHOS ARQUEOLÓGICOS NO ÂMBITO DO BLOCO DE REGA DO PISÃO MONTE DE BAIXO 4 - - BRP.07 MB4 Intervenção Arqueológica em Monte de Baixo 4 FICHA TÉCNICA COORDENAÇÃO GERAL Ricardo Teixeira, Arqueólogo, Mestre em arqueologia Vítor Fonseca, Arqueólogo COORDENAÇÃO DE PROJECTO Lídia Baptista, Mestre em Arqueologia TRABALHO DE CAMPO Direcção Lídia Baptista Arqueólogos Barbara Carvalho Lurdes Cunha, Mestre em Arqueologia Sara Luz Vera Aldeias Assistentes de arqueólogo Rodry Mendonça Nelson Vale Trabalhadores Indiferenciados Pedro Maurício Marco Maurício Pedro Guia André Guia Trabalho de Topografia CL Topografia, Lda Carlos Louzeiro TRABALHO DE GABINETE Relatório Lídia Baptista Lurdes Cunha Desenho Gráfico Rodry Mendonça Tratamento de Espólio Francisco Barros Fotografia de Espólio Francisco Barros Revisão Lídia Baptista DATA 30 de Janeiro de 2009 Relatório Final Janeiro de 2009 Página 1 de 12 Intervenção Ar...</text:p>
          </table:table-cell>
          <table:table-cell table:number-columns-repeated="1015"/>
        </table:table-row>
        <table:table-row table:style-name="ro1">
          <table:table-cell office:value-type="string">
            <text:p>107_IA_BRP_07_TRG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090209153712Z Writer OpenOffice.org 3.0 D:20090213164049Z RELATÓRIO FINAL BEJA - 2007 TRABALHOS ARQUEOLÓGICOS NO ÂMBITO DO BLOCO DE REGA DO PISÃO TRIGACHES 8 - - BRP.07 TRG8 Intervenção Arqueológica em Trigaches 8 FICHA TÉCNICA COORDENAÇÃO GERAL Ricardo Teixeira, Arqueólogo, Mestre em arqueologia Vítor Fonseca, Arqueólogo COORDENAÇÃO DE PROJECTO Lídia Baptista, Mestre em Arqueologia TRABALHO DE CAMPO Direcção Lídia Baptista Arqueólogos Barbara Carvalho Lurdes Cunha, Mestre em Arqueologia Sara Luz Vera Aldeias Assistentes de arqueólogo Rodry Mendonça Nelson Vale Trabalhadores Indiferenciados Pedro Maurício Marco Maurício Pedro Guia André Guia Trabalho de Topografia CL Topografia, Lda Carlos Louzeiro TRABALHO DE GABINETE Relatório Lídia Baptista Lurdes Cunha Desenho Gráfico Rodry Mendonça Tratamento de Espólio Francisco Barros Fotografia de Espólio Francisco Barros Pedro Maia Revisão Lídia Baptista DATA 30 de Janeiro de 2009 Relatório Final Janeiro de 2009 Página 1 de 11 Intervenção...</text:p>
          </table:table-cell>
          <table:table-cell table:number-columns-repeated="1015"/>
        </table:table-row>
        <table:table-row table:style-name="ro1">
          <table:table-cell office:value-type="string">
            <text:p>107_IA_BRP_07_TRG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4.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209160824Z Writer OpenOffice.org 3.0 D:20090216154404Z RELATÓRIO FINAL BEJA - 2007 TRABALHOS ARQUEOLÓGICOS NO ÂMBITO DO BLOCO DE REGA DO PISÃO TRIGACHES 9 - - BRP.07 TRG9 Intervenção Arqueológica em Trigaches 9 FICHA TÉCNICA COORDENAÇÃO GERAL Ricardo Teixeira, Arqueólogo, Mestre em arqueologia Vítor Fonseca, Arqueólogo COORDENAÇÃO DE PROJECTO Lídia Baptista, Mestre em Arqueologia TRABALHO DE CAMPO Direcção Lídia Baptista Arqueólogos Bárbara Carvalho Lurdes Cunha, Mestre em Arqueologia Sara Luz Vera Aldeias Assistentes de arqueólogo Rodry Mendonça Nelson Vale Trabalhadores Indiferenciados Pedro Maurício Marco Maurício Pedro Guia André Guia Trabalho de Topografia CL Topografia, Lda Carlos Louzeiro TRABALHO DE GABINETE Relatório Lídia Baptista Lurdes Cunha Bárbara Carvalho Desenho Gráfico Rodry Mendonça Tratamento de Espólio Francisco Barros Fotografia de Espólio Francisco Barros Revisão Lídia Baptista DATA 30 de Janeiro de 2009 Relatório Final Janeiro de 2009 Página 1 de 25 Interv...</text:p>
          </table:table-cell>
          <table:table-cell table:number-columns-repeated="1015"/>
        </table:table-row>
        <table:table-row table:style-name="ro1">
          <table:table-cell office:value-type="string">
            <text:p>107_IA_BRP_07_VA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209173846Z Writer OpenOffice.org 3.0 D:20090213165049Z RELATÓRIO FINAL BEJA - 2007 TRABALHOS ARQUEOLÓGICOS NO ÂMBITO DO BLOCO DE REGA DO PISÃO VALE D’ARÉM 7 - - BRP.07 VA7 Intervenção Arqueológica em Vale d'Arém 7 FICHA TÉCNICA COORDENAÇÃO GERAL Ricardo Teixeira, Arqueólogo, Mestre em arqueologia Vítor Fonseca, Arqueólogo COORDENAÇÃO DE PROJECTO Lídia Baptista, Mestre em Arqueologia TRABALHO DE CAMPO Direcção Lídia Baptista Arqueólogos Barbara Carvalho Lurdes Cunha, Mestre em Arqueologia Sara Luz Vera Aldeias Assistentes de arqueólogo Rodry Mendonça Nelson Vale Trabalhadores Indiferenciados Pedro Maurício Marco Maurício Pedro Guia André Guia CL Topografia, Lda Carlos Louzeiro TRABALHO DE GABINETE Relatório Lídia Baptista Lurdes Cunha Desenho Gráfico Rodry Mendonça Tratamento de Espólio Francisco Barros Fotografia de Espólio Francisco Barros Revisão Lídia Baptista DATA 30 de Janeiro de 2009 Relatório Final Janeiro de 2009 Página 1 de 13 Intervenção Arqueológica em Vale d'Arém 7 Í...</text:p>
          </table:table-cell>
          <table:table-cell table:number-columns-repeated="1015"/>
        </table:table-row>
        <table:table-row table:style-name="ro1">
          <table:table-cell office:value-type="string">
            <text:p>107_IA_BRP_07_VFR4 (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209175119Z Writer OpenOffice.org 3.0 D:20090213165219Z RELATÓRIO FINAL BEJA - 2007 TRABALHOS ARQUEOLÓGICOS NO ÂMBITO DO BLOCO DE REGA DO PISÃO VALE FONTE DA RATA 4 - - BRP.07 VFR4 Intervenção Arqueológica em Vale Fonte da Rata 4 FICHA TÉCNICA COORDENAÇÃO GERAL Ricardo Teixeira, Arqueólogo, Mestre em arqueologia Vítor Fonseca, Arqueólogo COORDENAÇÃO DE PROJECTO Lídia Baptista, Mestre em Arqueologia TRABALHO DE CAMPO Direcção Lídia Baptista Arqueólogos Barbara Carvalho Lurdes Cunha, Mestre em Arqueologia Sara Luz Vera Aldeias Assistentes de arqueólogo Rodry Mendonça Nelson Vale Trabalhadores Indiferenciados Pedro Maurício Marco Maurício Pedro Guia André Guia Trabalho de Topografia CL Topografia, Lda Carlos Louzeiro TRABALHO DE GABINETE Relatório Lídia Baptista Lurdes Cunha Bárbara Carvalho Desenho Gráfico Rodry Mendonça Tratamento de Espólio Francisco Barros Fotografia de Espólio Francisco Barros Revisão Lídia Baptista DATA 30 de Janeiro de 2009 Relatório Final Janeiro de 2009 Pág...</text:p>
          </table:table-cell>
          <table:table-cell table:number-columns-repeated="1015"/>
        </table:table-row>
        <table:table-row table:style-name="ro1">
          <table:table-cell office:value-type="string">
            <text:p>107_IA_BRP_07_VFR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090209175119Z Writer OpenOffice.org 3.0 D:20101220155726Z RELATÓRIO FINAL BEJA - 2007 TRABALHOS ARQUEOLÓGICOS NO ÂMBITO DO BLOCO DE REGA DO PISÃO VALE FONTE DA RATA 4 - - BRP.07 VFR4 Intervenção Arqueológica em Vale Fonte da Rata 4 FICHA TÉCNICA COORDENAÇÃO GERAL Ricardo Teixeira, Arqueólogo, Mestre em arqueologia Vítor Fonseca, Arqueólogo COORDENAÇÃO DE PROJECTO Lídia Baptista, Mestre em Arqueologia TRABALHO DE CAMPO Direcção Lídia Baptista Arqueólogos Barbara Carvalho Lurdes Cunha, Mestre em Arqueologia Sara Luz Vera Aldeias Assistentes de arqueólogo Rodry Mendonça Nelson Vale Trabalhadores Indiferenciados Pedro Maurício Marco Maurício Pedro Guia André Guia Trabalho de Topografia CL Topografia, Lda Carlos Louzeiro TRABALHO DE GABINETE Relatório Lídia Baptista Lurdes Cunha Bárbara Carvalho Desenho Gráfico Rodry Mendonça Tratamento de Espólio Francisco Barros Fotografia de Espólio Francisco Barros Revisão Lídia Baptista DATA 30 de Janeiro de 2009 Relatório Final Janeiro de 2009 Pág...</text:p>
          </table:table-cell>
          <table:table-cell table:number-columns-repeated="1015"/>
        </table:table-row>
        <table:table-row table:style-name="ro1">
          <table:table-cell office:value-type="string">
            <text:p>108_IA_CS_15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2. Pistas usadas: relatório, relatorio, relatório final, relatorio final, projecto, acompanhamento arqueológico, acompanhamento arqueologico, escavação, escavacao, plano de trabalhos, trabalhos arqueológicos, trabalhos arqueologicos.</text:p>
          </table:table-cell>
          <table:table-cell office:value-type="string">
            <text:p>relatório, relatorio, relatório final, relatorio final, projecto, acompanhamento arqueológico, acompanhamento arqueologico, escavação, escavacao, plano de trabalhos, trabalhos arqueológicos, trabalhos arqueologicos</text:p>
          </table:table-cell>
          <table:table-cell office:value-type="string">
            <text:p>Assinatura PDF</text:p>
          </table:table-cell>
          <table:table-cell office:value-type="string">
            <text:p>D:20080812145726+01'00' teresasilva PScript5.dll Version 5.2.2 Acrobat Distiller 8.1.0 (Windows) D:20080923121430+01'00' 108 REL 2008 08 06REVISTO RELATÓRIO PORTO - 2008 ACOMPANHAMENTO ARQUEOLÓGICO NA RUA CASAL DO PEDRO, Nº15 Acompanhamento Arqueológico na Rua Casal do Pedro, nº 15 Porto FICHA TÉCNICA COORDENAÇÃO GERAL Ricardo Teixeira, Mestre em Arqueologia Vítor Fonseca, Arqueólogo TRABALHO DE CAMPO Direcção César Guedes, Arqueólogo TRABALHO DE GABINETE Relatório César Guedes Desenho Gráfico Ana Paulo Fotografia de Espólio Verónica Biscaia Revisão Teresa Silva, Arqueóloga, Pós-graduada em Museologia DATA 12 de Agosto de 2008 Relatório Final Agosto de 2008 Página 1 de 32 Acompanhamento Arqueológico na Rua Casal do Pedro, nº 15 Porto Índice 1.Introdução..............................................................................................................3 1.1.Localização......................................................................................................4 1.2.In...</text:p>
          </table:table-cell>
          <table:table-cell table:number-columns-repeated="1015"/>
        </table:table-row>
        <table:table-row table:style-name="ro1">
          <table:table-cell office:value-type="string">
            <text:p>109_CAP_07_VC5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4. Pistas usadas: relatório, relatorio, projecto, intervenção arqueológica, intervencao arqueologica, acompanhamento arqueológico, acompanhamento arqueologico, escavação, escavacao, trabalhos arqueológicos, trabalhos arqueologicos.</text:p>
          </table:table-cell>
          <table:table-cell office:value-type="string">
            <text:p>relatório, relatorio, projecto, intervenção arqueológica, intervencao arqueologica, acompanhamento arqueológico, acompanhamento arqueologico, escavação, escavacao, trabalhos arqueológicos, trabalhos arqueologicos</text:p>
          </table:table-cell>
          <table:table-cell office:value-type="string">
            <text:p>Assinatura PDF</text:p>
          </table:table-cell>
          <table:table-cell office:value-type="string">
            <text:p>D:20070918194823+01'00' D:20070918194943+01'00' RELATÓRIO PRELIMINAR BEJA - 2007 TRABALHOS ARQUEOLÓGICOS NO ÂMBITO DO CANAL ALVITO PISÃO VINHA DAS CALIÇAS 5 Intervenção Arqueológica em Vinha das Caliças 5 - VC 5.07 FICHA TÉCNICA COORDENAÇÃO GERAL Ricardo Teixeira, Arqueólogo, Mestre em arqueologia Vítor Fonseca, Arqueólogo COORDENAÇÃO DE PROJECTO Lídia Baptista TRABALHO DE CAMPO Direcção Lídia Baptista Arqueólogos Barbara Carvalho Sara Luz Vera Aldeias Assistentes de arqueólogo Rodry Mendonça Nelson Vale Desenhadores Operários indiferenciados Pedro Maurício Marco Maurício Pedro Guia André Guia TRABALHO DE GABINETE Relatório Lídia Baptista Cartografia CL Topografia, Lda Carlos Louzeiro Revisão Teresa Silva DATA 17 de Setembro 2007 Relatório Preliminar Setembro de 2007 Página 1 de 13 Intervenção Arqueológica em Vinha das Caliças 5 - VC 5.07 Índice 1.Introdução............................................................................................................ 3 2.Intervenção Arque...</text:p>
          </table:table-cell>
          <table:table-cell table:number-columns-repeated="1015"/>
        </table:table-row>
        <table:table-row table:style-name="ro1">
          <table:table-cell office:value-type="string">
            <text:p>110_IA_FSA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4. Pistas usadas: relatório, relatorio, relatório final, relatorio final, projeto, projecto, intervenção arqueológica, intervencao arqueologica, sondagens.</text:p>
          </table:table-cell>
          <table:table-cell office:value-type="string">
            <text:p>relatório, relatorio, relatório final, relatorio final, projeto, projecto, intervenção arqueológica, intervencao arqueologica, sondagens</text:p>
          </table:table-cell>
          <table:table-cell office:value-type="string">
            <text:p>Assinatura PDF</text:p>
          </table:table-cell>
          <table:table-cell office:value-type="string">
            <text:p>D:20130527152223+01'00' pedromaia PScript5.dll Version 5.2.2 Acrobat Distiller 8.1.0 (Windows) D:20130527171503+01'00' 110 REL 2013 01 22 RELATÓRIO FINAL Intervenção Arqueológica Fábrica de Cerâmica do Senhor d' Além Vila Nova de Gaia 2008 Copyright © arqueologia e património Matosinhos 2013 FSA.08 Intervenção Arqueológica na Fábrica de Cerâmica do Senhor d' Além FICHA TÉCNICA Ricardo Teixeira &amp; Vítor Fonseca, Arqueologia Lda. PROJECTO - 110 Coordenação geral Ricardo Teixeira, arqueólogo, mestre em arqueologia Vítor Fonseca, arqueólogo Coordenação de projeto Teresa Silva, arqueóloga, pós-graduada em museologia Trabalho de Campo Registo de edificado e coordenação dos trabalhos de acompanhamento Teresa Silva Sondagens arqueológicas Graça Pereira, arqueóloga (Direcção) Arqueólogos Liliana Barbosa Rui Pinheiro Teresa Silva Assistentes de arqueólogo André Saraiva Bebiana Mota Lisdália Mota Nelson Vale Ricardo Mota Operários de arqueologia Alexandre Pinto Francisco Monteiro Pedro Pinto Traba...</text:p>
          </table:table-cell>
          <table:table-cell table:number-columns-repeated="1015"/>
        </table:table-row>
        <table:table-row table:style-name="ro1">
          <table:table-cell office:value-type="string">
            <text:p>111_BRP_07_FCH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211185319Z Sérgio Gomes Writer OpenOffice.org 3.1 D:20100223104017Z Relatório Final Beja 2010 BLOCO DE REGA DO PISÃO Intervenção Arqueológica em Funchais 5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Lídia Baptista, Mestre em arqueologia Lurdes Cunha, Mestre em arqueologia Assistentes de arqueólogo André Saraiva Francisco Barros TRABALHO DE GABINETE Relatório Lídia Baptista, Mestre em arqueologia Lurdes Cunha, Mestre em arqueologia Sérgio Gomes, Mestre em arqueologia Desenho gráfico Rodry Mendonça Tratamento de espólio Francisco Barros Conservação e restauro Anabela Hipólito, Técnica Superior de Conservação e Restauro Fotografia de espólio Francisco Barros Apoio técnico e revisão de texto Lídia Baptista, Mestre em arqueologia Lurdes Cunha, Me...</text:p>
          </table:table-cell>
          <table:table-cell table:number-columns-repeated="1015"/>
        </table:table-row>
        <table:table-row table:style-name="ro1">
          <table:table-cell office:value-type="string">
            <text:p>111_BRP_07_PTRG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5. Pistas usadas: relatório, relatorio, relatório final, relatorio final, projecto, intervenção arqueológica, intervencao arqueologica, sondagens.</text:p>
          </table:table-cell>
          <table:table-cell office:value-type="string">
            <text:p>relatório, relatorio, relatório final, relatorio final, projecto, intervenção arqueológica, intervencao arqueologica, sondagens</text:p>
          </table:table-cell>
          <table:table-cell office:value-type="string">
            <text:p>Assinatura PDF</text:p>
          </table:table-cell>
          <table:table-cell office:value-type="string">
            <text:p>D:20100211175327Z Writer OpenOffice.org 3.1 D:20100309153515Z Relatório Final Beja 2010 Bloco de Rega do Pisão Intervenção Arqueológica em Pedreira de Trigaches 2 FICHA TÉCNICA COORDENAÇÃO GERAL Ricardo Teixeira, Arqueólogo, Mestre em arqueologia Vítor Fonseca, Arqueólogo COORDENAÇÃO DE PROJECTO Lídia Baptista, Mestre em arqueologia TRABALHO DE CAMPO Direcção Lídia Baptista, Mestre em Arqueologia Arqueólogos Barbara Carvalho, Pós-graduada em Património e Projectos Culturais Lídia Baptista, Mestre em Arqueologia Lurdes Cunha, Mestre em Arqueologia Sara Luz Assistentes de arqueólogo André Saraiva Nelson Vale Rodry Mendonça TRABALHO DE GABINETE Relatório Lídia Baptista, Mestre em Arqueologia Lurdes Cunha, Mestre em Arqueologia Sérgio Gomes, Mestre em Arqueologia Desenho gráfico Rodry Mendonça Tratamento de espólio Francisco Barros Nelson Vale Conservação e restauro Anabela Hipólito, Técnica Superior de Conservação e Restauro Fotografia de espólio Francisco Barros Apoio técnico e revisão d...</text:p>
          </table:table-cell>
          <table:table-cell table:number-columns-repeated="1015"/>
        </table:table-row>
        <table:table-row table:style-name="ro1">
          <table:table-cell office:value-type="string">
            <text:p>111_BRP_07_PTRG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211173240Z Writer OpenOffice.org 3.1 D:20100223104619Z Relatório Final Beja 2010 Bloco de Rega do Pisão Intervenção Arqueológica em Pedreira de Trigaches 3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Lurdes Cunha, Mestre em Arqueologia Assistentes de arqueólogo Eduardo Falcão Nelson Vale Francisco Barros TRABALHO DE GABINETE Relatório Lídia Baptista, Mestre em Arqueologia Lurdes Cunha, Mestre em Arqueologia Sérgio Gomes, Mestre em Arqueologia Desenho gráfico Rodry Mendonça Tratamento de espólio Francisco Barros Conservação e restauro Anabela Hipólito, Técnica Superior de Conservação e Restauro Fotografia de espólio Francisco Barros Apoio técnico e revisão de texto Lídia Baptista, Mestre em Arqueologia Lurdes Cunha, Mestre em Arqueologia DATA...</text:p>
          </table:table-cell>
          <table:table-cell table:number-columns-repeated="1015"/>
        </table:table-row>
        <table:table-row table:style-name="ro1">
          <table:table-cell office:value-type="string">
            <text:p>111_BRP_07_TRG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212190527Z Writer OpenOffice.org 3.1 D:20100223105030Z Relatório Final BEJA 2010 Bloco de Rega do Pisão Intervenção Arqueológica em Trigaches 10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Pós-graduada em Património e Projectos Culturais Lurdes Cunha, Mestre em arqueologia Assistentes de arqueólogo Nelson Vale TRABALHO DE GABINETE Relatório Lídia Baptista, Mestre em Arqueologia Lurdes Cunha, Mestre em Arqueologia Sérgio Gomes, Mestre em Arqueologia Desenho gráfico Rodry Mendonça Apoio técnico e revisão Lídia Baptista, Mestre em Arqueologia Lurdes Cunha, Mestre em Arqueologia DATA 8 de Fevereiro de 2010 Intervenção Arqueológica em Trigaches 10 ÍNDICE 1.Introdução...................................................................</text:p>
          </table:table-cell>
          <table:table-cell table:number-columns-repeated="1015"/>
        </table:table-row>
        <table:table-row table:style-name="ro1">
          <table:table-cell office:value-type="string">
            <text:p>111_BRP_07_TRG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211173439Z Writer OpenOffice.org 3.1 D:20100223105313Z Relatório Final Beja 2010 Bloco de Rega do Pisão Intervenção Arqueológica em Trigaches 11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TRABALHO DE GABINETE Relatório Lídia Baptista , Mestre em Arqueologia Lurdes Cunha, Mestre em Arqueologia Sérgio Gomes, Mestre em Arqueologia Desenho gráfico Rodry Mendonça Apoio técnico e revisão de texto Lídia Baptista , Mestre em Arqueologia Lurdes Cunha, Mestre em Arqueologia DATA 8 de Fevereiro de 2010 Intervenção Arqueológica em Trigaches 11 ÍNDICE 1.Introdução.................................................................................................................................5 2.Situação de referência.........................</text:p>
          </table:table-cell>
          <table:table-cell table:number-columns-repeated="1015"/>
        </table:table-row>
        <table:table-row table:style-name="ro1">
          <table:table-cell office:value-type="string">
            <text:p>111_BRP_07_VC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0.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309135102Z Writer OpenOffice.org 3.1 D:20100309155328Z Relatório Final Beja 2010 Bloco de Rega do Pisão Intervenção Arqueológica em Vinha das Caliças 4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Pós-graduda em Património e Projectos Culturais Lídia Baptista, Mestre em Arqueologia Lurdes Cunha, Mestre em Arqueologia Sara Luz Assistentes de arqueólogo Ana Marta André Saraiva Francisco Barros Nelson Vale Rodry Mendonça TRABALHO DE GABINETE Relatório Lídia Baptista, Mestre em Arqueologia Lurdes Cunha, Mestre em Arqueologia Sérgio Gomes, Mestre em Arqueologia Desenho gráfico Rodry Mendonça, Tratamento de espólio Francisco Barros Conservação e restauro Anabela Hipólito, Técnica Superior de Conservação e Restauro Fotografia de esp...</text:p>
          </table:table-cell>
          <table:table-cell table:number-columns-repeated="1015"/>
        </table:table-row>
        <table:table-row table:style-name="ro1">
          <table:table-cell office:value-type="string">
            <text:p>112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114_Harmoni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projecto, intervenção arqueológica, intervencao arqueologica, acompanhamento arqueológico, acompanhamento arqueologico, escavação, escavacao, sondagem, sondagens, trabalhos arqueológicos.</text:p>
          </table:table-cell>
          <table:table-cell office:value-type="string">
            <text:p>relatório, relatorio, projecto, intervenção arqueológica, intervencao arqueologica, acompanhamento arqueológico, acompanhamento arqueologico, escavação, escavacao, sondagem, sondagens, trabalhos arqueológicos</text:p>
          </table:table-cell>
          <table:table-cell office:value-type="string">
            <text:p>Assinatura PDF</text:p>
          </table:table-cell>
          <table:table-cell office:value-type="string">
            <text:p>D:20071205145007Z D:20071205145007Z RELATÓRIO PRELIMINAR PORTO - 2007 INTERVENÇÃO ARQUEOLÓGICA NA FÁBRICA COMPANHIA DE MOAGENS HARMONIA - MHP.07 Intervenção Arqueológica na Fábrica Companhia de Moagens Harmonia – MHP. 07 FICHA TÉCNICA COORDENAÇÃO GERAL Ricardo Teixeira Vítor Fonseca COORDENAÇÃO DE PROJECTO Jorge Fonseca TRABALHO DE CAMPO Direcção Jorge Fonseca Arqueólogos José Gomes Assistentes de arqueólogo Bebiana Mota Ricardo Mota Operários de arqueologia Pedro Pinto Francisco Monteiro TRABALHO DE GABINETE Relatório Jorge Fonseca José Gomes Síntese Interpretativa Maria da Luz Sampaio Revisão Teresa Silva DATA 04 - 12 - 2007 Relatório Preliminar Dezembro de 2007 Página 1 de 23 Intervenção Arqueológica na Fábrica Companhia de Moagens Harmonia – MHP. 07 Índice 1. Introdução........................................................................................................... 3 2. Metodologia...............................................................................................</text:p>
          </table:table-cell>
          <table:table-cell table:number-columns-repeated="1015"/>
        </table:table-row>
        <table:table-row table:style-name="ro1">
          <table:table-cell office:value-type="string">
            <text:p>114_MHP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7.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20312170121Z RTVF RTVF Writer OpenOffice.org 3.2 D:20120313100207Z Copyright © arqueologia e património Matosinhos 2011 Intervenção Arqueológica Companhia de Moagens Harmonia e Palácio do Freixo FICHA TÉCNICA Ricardo Teixeira &amp; Vítor Fonseca, Arqueologia Lda. PROJECTO 114 Coordenação geral Ricardo Teixeira, arqueólogo, mestre em arqueologia Vítor Fonseca, arqueólogo Consultadoria científica Maria da Luz Sampaio, historiadora, especialista em arqueologia industrial; mestre em estudos locais e regionais Coordenação de projeto Jorge Fonseca, arqueólogo TRABALHO DE CAMPO Direção Jorge Fonseca Arqueólogos Graça Pereira Helena Marçal José Gomes Bárbara Carvalho César Guedes Assistentes de arqueólogo Rodry Mendonça Bebiana Mota Ricardo Mota Nélson Vale Operários de arqueologia Alexandre Pinto Pedro Pinto Francisco Monteiro TRABALHO DE GABINETE Relatório Jorge Fonseca Maria da Luz Sampaio (enquadramento histórico) Desenho gráfico Rui Oliveira Rodry Mendonça Tratamento de espólio Anabela R...</text:p>
          </table:table-cell>
          <table:table-cell table:number-columns-repeated="1015"/>
        </table:table-row>
        <table:table-row table:style-name="ro1">
          <table:table-cell office:value-type="string">
            <text:p>115_IA_MONTE_DO_MARQUES_20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23095443+01'00' sergiogomes Adobe Acrobat 8.2 Combine Files Adobe Acrobat 8.2 D:20100823095746+01'00' 115 BRP07 MM13 REL FINALL Relatório Final Beja 2010 Bloco de Rega do Pisão Intervenção Arqueológica em Monte do Marquês 13 Bloco de Rega do Pisão Intervenção Arqueológica em Monte do Marquês 13 FICHA TÉCNICA COORDENAÇÃO GERAL Ricardo Teixeira, Arqueólogo, Mestre em arqueologia Vítor Fonseca, Arqueólogo COORDENAÇÃO DE PROJECTO Lídia Baptista, Mestre em arqueologia TRABALHO DE CAMPO Direcção Lídia Baptista, Mestre em arqueologia Assistentes de arqueólogo Francisco Barros TRABALHO DE GABINETE Relatório Lídia Baptista, Mestre em Arqueologia Sérgio Gomes, Mestre em Arqueologia Desenho gráfico Rodry Mendonça Tratamento de espólio Francisco Barros Nelson Vale Conservação e restauro Anabela Hipólito, Técnica Superior de Conservação e Restauro Fotografia de espólio Francisco Barros Apoio técnico e revisão de texto Lídia Baptista, Mestre em Arqueologia DATA 20 de Agosto de 2010 Relatório...</text:p>
          </table:table-cell>
          <table:table-cell table:number-columns-repeated="1015"/>
        </table:table-row>
        <table:table-row table:style-name="ro1">
          <table:table-cell office:value-type="string">
            <text:p>115_IA_RIBEIRA_DO_PISAO_20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9.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23100736+01'00' sergiogomes Adobe Acrobat 8.2 Combine Files Adobe Acrobat 8.2 D:20100823101101+01'00' 115 BRP07 RP5 REL FINALL Relatório Final Beja 2010 Bloco de Rega do Pisão Intervenção Arqueológica em Ribeira do Pisão 5 Bloco de Rega do Pisão Intervenção Arqueológica em Ribeira do Pisão 5 FICHA TÉCNICA COORDENAÇÃO GERAL Ricardo Teixeira, Arqueólogo, Mestre em arqueologia Vítor Fonseca, Arqueólogo COORDENAÇÃO DE PROJECTO Lídia Baptista, Mestre em arqueologia TRABALHO DE CAMPO Direcção Lídia Baptista, Mestre em arqueologia Arqueólogos Tiago Fontes Raquel Santos José Gomes Assistentes de arqueólogo André Saraiva Marta Sales Elísio Adviges Aguiar Tiago Correia Francisco Barros Nelson Vale TRABALHO DE GABINETE Relatório Lídia Baptista, Mestre em Arqueologia Sérgio Gomes, Mestre em Arqueologia Desenho gráfico Rodry Mendonça Lídia Baptista Tratamento de espólio Francisco Barros Nelson Vale Cláudio Jorge João Molha Conservação e restauro Anabela Hipólito, Técnica Superior de Conserv...</text:p>
          </table:table-cell>
          <table:table-cell table:number-columns-repeated="1015"/>
        </table:table-row>
        <table:table-row table:style-name="ro1">
          <table:table-cell office:value-type="string">
            <text:p>116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119_Monte_Marques_15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 Pistas usadas: relatório, relatorio, projecto, intervenção arqueológica, intervencao arqueologica, acompanhamento arqueológico, acompanhamento arqueologico, escavação, escavacao, trabalhos arqueológicos, trabalhos arqueologicos.</text:p>
          </table:table-cell>
          <table:table-cell office:value-type="string">
            <text:p>relatório, relatorio, projecto, intervenção arqueológica, intervencao arqueologica, acompanhamento arqueológico, acompanhamento arqueologico, escavação, escavacao, trabalhos arqueológicos, trabalhos arqueologicos</text:p>
          </table:table-cell>
          <table:table-cell office:value-type="string">
            <text:p>Assinatura PDF</text:p>
          </table:table-cell>
          <table:table-cell office:value-type="string">
            <text:p>D:20090129180318Z Writer OpenOffice.org 2.1 D:20090129180457Z RELATÓRIO PRELIMINAR BEJA - 2009 TRABALHOS ARQUEOLÓGICOS NO ÂMBITO DO BLOCO DE REGA DO PISÃO MONTE MARQUÊS 15 Intervenção Arqueológica em Monte do Marquês 15 FICHA TÉCNICA COORDENAÇÃO GERAL Ricardo Teixeira, Arqueólogo, Mestre em arqueologia Vítor Fonseca, Arqueólogo COORDENAÇÃO DE PROJECTO Lídia Baptista, Mestre em arqueologia TRABALHO DE CAMPO Direcção Lídia Baptista Lurdes Cunha, Mestre em arqueologia Arqueólogos Lídia Baptista Lurdes Cunha Bárbara Carvalho Assistentes de arqueólogo Ana Marta André Saraiva Francisco Barros Nelson Vale Rodry Mendonça TRABALHO DE GABINETE Relatório Lídia Baptista Lurdes Cunha Desenho Gráfico Fotografia de Espólio Francisco Barros Revisão Lídia Baptista DATA 19 de Janeiro de 2009 Relatório Preliminar Janeiro de 2009 Página 1 de 17 Intervenção Arqueológica em Monte do Marquês 15 Índice 1.Introdução...................................................................................................</text:p>
          </table:table-cell>
          <table:table-cell table:number-columns-repeated="1015"/>
        </table:table-row>
        <table:table-row table:style-name="ro1">
          <table:table-cell office:value-type="string">
            <text:p>120_BRCO_0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2.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00607100133+01'00' sergiogomes Adobe Acrobat 8.1 Combine Files Adobe Acrobat 8.1 D:20100607100425+01'00' BRCO 07 MO8 REL FIN Relatório Final Beja 2010 Bloco de Rega de Cuba Oeste Intervenção em Monte do Outeiro 8 Bloco de Rega de Cuba Oeste – Intervenção em Monte do Outeiro 8 FICHA TÉCNICA COORDENAÇÃO GERAL Ricardo Teixeira, Arqueólogo, Mestre em Arqueologia Vítor Fonseca, Arqueólogo COORDENAÇÃO DE PROJECTO Lídia Baptista, Mestre em Arqueologia TRABALHO DE CAMPO Direcção Lídia Baptista,Mestre em Arqueologia Bárbara Carvalho Assistentes de arqueólogo Rodry Mendonça TRABALHO DE GABINETE Relatório Bárbara Carvalho Lídia Baptista Lurdes Cunha Sérgio Gomes Desenho gráfico Lídia Baptista Apoio técnico e revisão de texto Lídia Baptista, Mestre em arqueologia DATA 08 Junho de 2010 Relatório Final Junho de 2010 Página 3 de 13</text:p>
          </table:table-cell>
          <table:table-cell table:number-columns-repeated="1015"/>
        </table:table-row>
        <table:table-row table:style-name="ro1">
          <table:table-cell office:value-type="string">
            <text:p>120_BRCO_07_rel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2.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00607100133+01'00' sergiogomes Adobe Acrobat 8.1 Combine Files Adobe Acrobat 8.1 D:20100607100425+01'00' BRCO 07 MO8 REL FIN Relatório Final Beja 2010 Bloco de Rega de Cuba Oeste Intervenção em Monte do Outeiro 8 Bloco de Rega de Cuba Oeste – Intervenção em Monte do Outeiro 8 FICHA TÉCNICA COORDENAÇÃO GERAL Ricardo Teixeira, Arqueólogo, Mestre em Arqueologia Vítor Fonseca, Arqueólogo COORDENAÇÃO DE PROJECTO Lídia Baptista, Mestre em Arqueologia TRABALHO DE CAMPO Direcção Lídia Baptista,Mestre em Arqueologia Bárbara Carvalho Assistentes de arqueólogo Rodry Mendonça TRABALHO DE GABINETE Relatório Bárbara Carvalho Lídia Baptista Lurdes Cunha Sérgio Gomes Desenho gráfico Lídia Baptista Apoio técnico e revisão de texto Lídia Baptista, Mestre em arqueologia DATA 08 Junho de 2010 Relatório Final Junho de 2010 Página 3 de 13</text:p>
          </table:table-cell>
          <table:table-cell table:number-columns-repeated="1015"/>
        </table:table-row>
        <table:table-row table:style-name="ro1">
          <table:table-cell office:value-type="string">
            <text:p>120_BRP_08_VLC2 (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1.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Sérgio Gomes D:20100607220751+01'00' Adobe Acrobat Pro Extended 9.0.0 D:20100607222001+01'00' Adobe Acrobat Pro Extended 9.0.0 Relatório Final Beja 2010 Bloco de Rega do Pisão Intervenção em Vale de Coutos 2 Bloco de Rega do Pisão – Intervenção em Vale de Coutos 2 FICHA TÉCNICA COORDENAÇÃO GERAL Ricardo Teixeira, Arqueólogo, Mestre em Arqueologia Vítor Fonseca, Arqueólogo COORDENAÇÃO DE PROJECTO Lídia Baptista, Mestre em Arqueologia TRABALHO DE CAMPO Direcção Lídia Baptista,Mestre em Arqueologia Bárbara Carvalho Assistentes de arqueólogo André Saraiva Nelson Vale TRABALHO DE GABINETE Relatório Bárbara Carvalho Lídia Baptista Lurdes Cunha Sérgio Gomes Desenho gráfico Rodry Mendonça Lídia Baptista Tratamento de espólio Bárbara Carvalho Conservação e restauro Anabela Hipólito, Técnica Superior de Conservação e Restauro Fotografia de espólio Bárbara Carvalho Apoio técnico e revisão de texto Lídia Baptista, Mestre em arqueologia DATA 08 de Junho de 2010 Relatório 1ª Fase Dezembro de 2009 Pá...</text:p>
          </table:table-cell>
          <table:table-cell table:number-columns-repeated="1015"/>
        </table:table-row>
        <table:table-row table:style-name="ro1">
          <table:table-cell office:value-type="string">
            <text:p>120_BRP_08_VLC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1.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Sérgio Gomes D:20100607220751+01'00' Adobe Acrobat Pro Extended 9.0.0 D:20100607222001+01'00' Adobe Acrobat Pro Extended 9.0.0 Relatório Final Beja 2010 Bloco de Rega do Pisão Intervenção em Vale de Coutos 2 Bloco de Rega do Pisão – Intervenção em Vale de Coutos 2 FICHA TÉCNICA COORDENAÇÃO GERAL Ricardo Teixeira, Arqueólogo, Mestre em Arqueologia Vítor Fonseca, Arqueólogo COORDENAÇÃO DE PROJECTO Lídia Baptista, Mestre em Arqueologia TRABALHO DE CAMPO Direcção Lídia Baptista,Mestre em Arqueologia Bárbara Carvalho Assistentes de arqueólogo André Saraiva Nelson Vale TRABALHO DE GABINETE Relatório Bárbara Carvalho Lídia Baptista Lurdes Cunha Sérgio Gomes Desenho gráfico Rodry Mendonça Lídia Baptista Tratamento de espólio Bárbara Carvalho Conservação e restauro Anabela Hipólito, Técnica Superior de Conservação e Restauro Fotografia de espólio Bárbara Carvalho Apoio técnico e revisão de texto Lídia Baptista, Mestre em arqueologia DATA 08 de Junho de 2010 Relatório 1ª Fase Dezembro de 2009 Pá...</text:p>
          </table:table-cell>
          <table:table-cell table:number-columns-repeated="1015"/>
        </table:table-row>
        <table:table-row table:style-name="ro1">
          <table:table-cell office:value-type="string">
            <text:p>121_IA_ABO_08_MB.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D:20080627154110+01'00' Writer OpenOffice.org 2.1 D:20080711093706+01'00' RELATÓRIO ALVITO - 2008 TRABALHOS ARQUEOLÓGICOS DE MINIMIZAÇÃO DE IMPACTES DO CIRCUITO HIDRÁULICO DE ADUÇÃO À BARRAGEM DE ODIVELAS MONTE S. BARTOLOMEU Intervenção Arqueológica em Monte de S. Bartolomeu FICHA TÉCNICA COORDENAÇÃO GERAL Ricardo Teixeira, Arqueólogo, Mestre em Arqueologia Vítor Fonseca, Arqueólogo COORDENAÇÃO DE PROJECTO Lídia Baptista, Mestre em Arqueologia TRABALHO DE CAMPO Direcção Lídia Baptista Arqueólogos José Gomes Raquel Santos Tiago Fontes Lurdes Oliveira Bárbara Carvalho Assistentes de arqueólogo Edviges Aguiar Elísio Neves Tiago Correia Desenhadores TRABALHO DE GABINETE Relatório Lídia Baptista Desenho Gráfico Rodry Mendonça Fotografia de Espólio Francisco Barros Revisão Teresa Silva Lídia Baptista DATA 20 de Junho de 2008 Relatório Final Junho de 2008 Página 1 de 19 Intervenção Arqueológica em Monte de S. Bartolomeu Índice 1.Introdução.........................................................</text:p>
          </table:table-cell>
          <table:table-cell table:number-columns-repeated="1015"/>
        </table:table-row>
        <table:table-row table:style-name="ro1">
          <table:table-cell office:value-type="string">
            <text:p>122_IA_R_ROS_74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5. Pistas usadas: relatório, relatorio, relatório final, relatorio final, projecto, intervenção arqueológica, intervencao arqueologica, acompanhamento arqueológico, acompanhamento arqueologico, trabalhos arqueológicos, trabalhos arqueologicos.</text:p>
          </table:table-cell>
          <table:table-cell office:value-type="string">
            <text:p>relatório, relatorio, relatório final, relatorio final, projecto, intervenção arqueológica, intervencao arqueologica, acompanhamento arqueológico, acompanhamento arqueologico, trabalhos arqueológicos, trabalhos arqueologicos</text:p>
          </table:table-cell>
          <table:table-cell office:value-type="string">
            <text:p>Assinatura PDF</text:p>
          </table:table-cell>
          <table:table-cell office:value-type="string">
            <text:p>D:20090416160711+01'00' D:20090417100146+01'00' RELATÓRIO PORTO - 2009 INTERVENÇÃO ARQUEOLÓGICA NA RUA DO ROSÁRIO, 74-76 Intervenção Arqueológica na Rua do Rosário 74-76, Porto FICHA TÉCNICA COORDENAÇÃO GERAL Ricardo Teixeira Vítor Fonseca COORDENAÇÃO DE PROJECTO Jorge Fonseca TRABALHO DE CAMPO Direcção Graça Pereira TRABALHO DE GABINETE Introdução Histórica Graça Pereira Descrição e interpretação da intervenção arqueológica Graça Pereira Fotografia de espólio Pedro Maia Tratamento de espólio Teresa Gonçalves Desenho gráfico Ana Paulo Rodry Mendonça Revisão de texto DATA Liliana Barbosa 17 de Abril de 2009 Relatório Final Abril de 2009 Página 1 de 24 Intervenção Arqueológica na Rua do Rosário 74-76, Porto Índice 1.Introdução................................................................................................................. 3 1.1.Contexto e Objectivos............................................................................................. 3 1.2.Localização.................</text:p>
          </table:table-cell>
          <table:table-cell table:number-columns-repeated="1015"/>
        </table:table-row>
        <table:table-row table:style-name="ro1">
          <table:table-cell office:value-type="string">
            <text:p>123_EIA_Decathlon_Mat.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7.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080211181706Z D:20080211182049Z RELATÓRIO MATOSINHOS - 2008 ESTUDO DE IMPACTE AMBIENTAL DESCRITOR PATRIMÓNIO LOJA DECATHLON MATOSINHOS Estudo de Impacte Ambiental – Descritor Património - Loja Decathlon Matosinhos FICHA TÉCNICA COORDENAÇÃO GERAL Ricardo Teixeira, Arqueólogo, Mestre em arqueologia Vítor Fonseca, Arqueólogo TRABALHO DE CAMPO Teresa Silva Vítor Fonseca TRABALHO DE GABINETE Relatório Teresa Silva Desenho Gráfico Ana Paulo Rodry Mendonça DATA 11 de Fevereiro de 2008 Relatório Final Fevereiro de 2008 Página 1 de 13 Estudo de Impacte Ambiental – Descritor Património - Loja Decathlon Matosinhos ÍNDICE 1.Introdução............................................................................................................ 3 2.Metodologia do Estudo.............................................................................................. 5 3.Caracterização da Situação de Referência e Avaliação Patrimonial......................................... 6 3.1.Condições de Execução...</text:p>
          </table:table-cell>
          <table:table-cell table:number-columns-repeated="1015"/>
        </table:table-row>
        <table:table-row table:style-name="ro1">
          <table:table-cell office:value-type="string">
            <text:p>124_adenda_2012_01_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 Pistas usadas: relatório, relatorio, relatório final, relatorio final, projecto, intervenção arqueológica, intervencao arqueologica, sondagem, sondagens, trabalhos arqueológicos, trabalhos arqueologicos.</text:p>
          </table:table-cell>
          <table:table-cell office:value-type="string">
            <text:p>relatório, relatorio, relatório final, relatorio final, projecto, intervenção arqueológica, intervencao arqueologica, sondagem, sondagens, trabalhos arqueológicos, trabalhos arqueologicos</text:p>
          </table:table-cell>
          <table:table-cell office:value-type="string">
            <text:p>Assinatura PDF</text:p>
          </table:table-cell>
          <table:table-cell office:value-type="string">
            <text:p>D:20120119165103Z pedromaia PScript5.dll Version 5.2 Acrobat Distiller 8.1.0 (Windows) D:20120119165103Z 124 adenda 2012 01 18 ADENDA ao RELATÓRIO Intervenção Arqueológica Projecto Plaza Oeste, Gaeiras, Óbidos Copyright © arqueologia e património Matosinhos 2011 Intervenção Arqueológica Projecto Plaza Oeste, Gaeiras, Óbidos Adenda ao relatório final da intervenção arqueológica realizada no âmbito do Projecto Plaza Oeste em Óbidos, em resposta ao ofício do IGESPAR, datado de 2011-10-17 e com a referência 2004/1 (569): a) Relativamente ao pedido de esclarecimento sobre a cronologia das cerâmicas de paredes espessas e menos espessas (não paredes finas): Esclarecemos que, tal como foi escrito no Relatório Final, a cerâmica comum foi dividida em dois grupos: um que contabiliza as cerâmicas de paredes mais espessas, representando assim formas que se destinavam ao armazenamento de alimentos, líquidos e outros produtos (caso de talhas, ânforas, dolia, etc.); e outro de cerâmicas de paredes men...</text:p>
          </table:table-cell>
          <table:table-cell table:number-columns-repeated="1015"/>
        </table:table-row>
        <table:table-row table:style-name="ro1">
          <table:table-cell office:value-type="string">
            <text:p>124_IA_CR_08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3.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10427154029+01'00' pedromaia PScript5.dll Version 5.2 Acrobat Distiller 8.1.0 (Windows) D:20110427160920+01'00' 124 rel rev 2011 03 01 Relatório Final INTERVENÇÃO ARQUEOLÓGICA PROJECTO PLAZA OESTE GAEIRAS – ÓBIDOS 2008 Matosinhos 2011 Intervenção Arqueológica Gaeiras Óbidos FICHA TÉCNICA Projecto nº: 124 COORDENAÇÃO GERAL Ricardo Teixeira, Arqueólogo, Mestre em arqueologia Vítor Fonseca, Arqueólogo TRABALHO DE CAMPO Direcção Ana Maria Oliveira, Arqueóloga César Guedes, Arqueólogo Arqueólogos Assistentes de arqueólogo Rui Pinheiro Lisdália Mota Angela Pinto Bruno Santos Operários de arqueologia Alexandre Pinto Pedro Pinto Topógrafo Pedro Gustavo, TP – Topografia, Lda. TRABALHO DE GABINETE Relatório Ana Maria Oliveira César Guedes Estudo de Espólio Ana Maria Oliveira Desenho gráfico Rodry Mendonça Tratamento de espólio Anabela Rodrigues Teresa Gonçalves Conservação e restauro Anabela Hipólito, Técnica Superior de Conservação e Restauro Fotografia de espólio Pedro Maia Apoio técnico...</text:p>
          </table:table-cell>
          <table:table-cell table:number-columns-repeated="1015"/>
        </table:table-row>
        <table:table-row table:style-name="ro1">
          <table:table-cell office:value-type="string">
            <text:p>124_Obidos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projecto, intervenção arqueológica, intervencao arqueologica, sondagens, trabalhos arqueológicos, trabalhos arqueologicos.</text:p>
          </table:table-cell>
          <table:table-cell office:value-type="string">
            <text:p>relatório, relatorio, projecto, intervenção arqueológica, intervencao arqueologica, sondagens, trabalhos arqueológicos, trabalhos arqueologicos</text:p>
          </table:table-cell>
          <table:table-cell office:value-type="string">
            <text:p>Assinatura PDF</text:p>
          </table:table-cell>
          <table:table-cell office:value-type="string">
            <text:p>D:20080423142221+01'00' Writer OpenOffice.org 2.0 D:20080423143543+01'00' RELATÓRIO PRELIMINAR ÓBIDOS - 2008 INTERVENÇÃO ARQUEOLÓGICA GAEIRAS - ÓBIDOS PROJECTO PLAZA OESTE Intervenção arqueológica nas Gaeiras- Óbidos. Plano de Pormenor Arnóia. Projecto Plaza Oeste TRABALHOS ARQUEOLÓGICOS NAS GAEIRAS - ÓBIDOS. PLANO DE PORMENOR ARNÓIA – PROJECTO PLAZA OESTE RELATÓRIO PRELIMINAR Relatório Preliminar Abril de 2008 Página 1 de 38 Intervenção arqueológica nas Gaeiras- Óbidos. Plano de Pormenor Arnóia. Projecto Plaza Oeste FICHA TÉCNICA COORDENAÇÃO GERAL Ricardo Teixeira, Arqueólogo, Mestre em arqueologia Vítor Fonseca, Arqueólogo TRABALHO DE CAMPO Direcção Ana Maria Oliveira, Arqueóloga César Guedes, Arqueólogo Assistentes de arqueólogo Rui Pinheiro Lisdália Mota Angela Pinto Bruno Santos TRABALHO DE GABINETE Relatório Ana Maria Oliveira César Guedes Desenho Gráfico Rodry Mendonça Fotografia de Espólio Ana Maria Oliveira DATA 23 de Abril de 2008 Relatório Preliminar Abril de 2008 Página 2 d...</text:p>
          </table:table-cell>
          <table:table-cell table:number-columns-repeated="1015"/>
        </table:table-row>
        <table:table-row table:style-name="ro1">
          <table:table-cell office:value-type="string">
            <text:p>125_d_pedro_V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 Pistas usadas: relatório, relatorio, projecto, intervenção arqueológica, intervencao arqueologica, sondagem, sondagens, trabalhos arqueológicos, trabalhos arqueologicos.</text:p>
          </table:table-cell>
          <table:table-cell office:value-type="string">
            <text:p>relatório, relatorio, projecto, intervenção arqueológica, intervencao arqueologica, sondagem, sondagens, trabalhos arqueológicos, trabalhos arqueologicos</text:p>
          </table:table-cell>
          <table:table-cell office:value-type="string">
            <text:p>Assinatura PDF</text:p>
          </table:table-cell>
          <table:table-cell office:value-type="string">
            <text:p>D:20080410122109+01'00' joanaborges PScript5.dll Version 5.2 Acrobat Distiller 8.1.0 (Windows) D:20080423152906+01'00' rel prel 125 rev 2008 04 10 final RELATÓRIO PRELIMINAR MASSARELOS - 2008 SONDAGENS ARQUEOLÓGICAS NA RUA D. PEDRO V MASSARELOS - PORTO Intervenção Arqueológica na Rua D. Pedro V, Massarelos, Porto FICHA TÉCNICA COORDENAÇÃO GERAL Ricardo Teixeira Vítor Fonseca COORDENAÇÃO DE PROJECTO Jorge Fonseca/ Lídia Baptista TRABALHO DE CAMPO Direcção José Gomes DATA Porto, 09 de Abril de 2008 Relatório Preliminar Abril de 2008 Página 1 de 14 Intervenção Arqueológica na Rua D. Pedro V, Massarelos, Porto Índice 1. Introdução.............................................................................................................3 1.1.Localização......................................................................................................5 2.Objectivos e Metodologia............................................................................................7 3.Intervenção Ar...</text:p>
          </table:table-cell>
          <table:table-cell table:number-columns-repeated="1015"/>
        </table:table-row>
        <table:table-row table:style-name="ro1">
          <table:table-cell office:value-type="string">
            <text:p>125_IA_DPV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3.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1008105802+01'00' teresasilva PScript5.dll Version 5.2 Acrobat Distiller 8.2.3 (Windows) D:20101008135503+01'00' 1_ 125 rel fin 2010 10 06 Relatório Final Porto 2010 Intervenção Arqueológica Rua D. Pedro V DPV. 08 Intervenção Arqueológica Rua D. Pedro V – DPV. 08 FICHA TÉCNICA Número de Projecto: 125 COORDENAÇÃO GERAL Ricardo Teixeira, Arqueólogo, Mestre em arqueologia Vítor Fonseca, Arqueólogo COORDENAÇÃO DE PROJECTO Jorge Fonseca, Arqueólogo TRABALHO DE CAMPO Direcção José Gomes, Arqueólogo Arqueóloga Graça Pereira Assistentes de arqueólogo Bebiana Mota Carlos Barbosa Lisdália Mota Operários de arqueologia Alexandre Pinto Pedro Pinto TRABALHO DE GABINETE Pesquisa bibliográfica e enquadramento histórico César Guedes Jorge Fonseca Relatório Jorge Fonseca Desenho gráfico Rui Oliveira, desenhador Tratamento de espólio Anabela Rodrigues, Assistente de Arqueólogo Paula Alves Teresa Gonçalves, Assistente de Arqueólogo Fotografia de espólio Pedro Maia, Técnico Superior de Património Cu...</text:p>
          </table:table-cell>
          <table:table-cell table:number-columns-repeated="1015"/>
        </table:table-row>
        <table:table-row table:style-name="ro1">
          <table:table-cell office:value-type="string">
            <text:p>126_IA_R1D_79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cto, intervenção arqueológica, intervencao arqueologica, acompanhamento arqueológico, acompanhamento arqueologico, sondagens, trabalhos arqueológicos, trabalhos arqueologicos.</text:p>
          </table:table-cell>
          <table:table-cell office:value-type="string">
            <text:p>relatório, relatorio, relatório final, relatorio final, projec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office:value-type="string">
            <text:p>D:20080826153942+01'00' Writer OpenOffice.org 2.1 D:20080826160626+01'00' RELATÓRIO MONCORVO - 2008 INTERVENÇÃO ARQUEOLÓGICA RUA 1º DEZEMBRO, Nº79 TORRE DE MONCORVO R1D 79.08 Intervenção Arqueológica - Rua 1º de Dezembro, nº 79, Torre de Moncorvo FICHA TÉCNICA COORDENAÇÃO GERAL Ricardo Teixeira Vítor Fonseca COORDENAÇÃO DE PROJECTO Jorge Fonseca TRABALHO DE CAMPO Direcção Jorge Fonseca Assistente de arqueólogo Rodry Mendonça Operário de arqueologia Pedro Pinto TRABALHO DE GABINETE Introdução Histórica César Guedes Descrição e interpretação da intervenção arqueológica Jorge Fonseca Fotografia de espólio Jorge Fonseca Pedro Maia Tratamento de espólio Anabela Hipólito Sónia Santos Teresa Gonçalves Desenho gráfico Ana Paulo Rodry Mendonça Revisão Teresa Silva DATA 25 de Agosto de 2008 Relatório Final Setembro de 2008 Página 1 de 29 Intervenção Arqueológica - Rua 1º de Dezembro, nº 79, Torre de Moncorvo Índice 1.Introdução........................................................................</text:p>
          </table:table-cell>
          <table:table-cell table:number-columns-repeated="1015"/>
        </table:table-row>
        <table:table-row table:style-name="ro1">
          <table:table-cell office:value-type="string">
            <text:p>126_inf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 Pistas usadas: projecto, intervenção arqueológica, intervencao arqueologica, acompanhamento arqueológico, acompanhamento arqueologico, sondagem, sondagens, trabalhos arqueológicos, trabalhos arqueologicos.</text:p>
          </table:table-cell>
          <table:table-cell office:value-type="string">
            <text:p>projecto, intervenção arqueológica, intervencao arqueologica, acompanhamento arqueológico, acompanhamento arqueologico, sondagem, sondagens, trabalhos arqueológicos, trabalhos arqueologicos</text:p>
          </table:table-cell>
          <table:table-cell office:value-type="string">
            <text:p>Assinatura PDF</text:p>
          </table:table-cell>
          <table:table-cell office:value-type="string">
            <text:p>Writer OpenOffice.org 2.1 D:20080702113400+01'00' TRABALHOS ARQUEOLÓGICOS NA RUA 1º DE DEZEMBRO, Nº 79, CONCELHO DE TORRE DE MONCORVO INFORMAÇÃO PRELIMINAR Nesta informação preliminar apresentam-se os resultados da intervenção arqueológica efectuada no âmbito do projecto de reconstrução de uma habitação na Rua 1º de Dezembro, nº 79, em Torre de Moncorvo, promovido pela Câmara Municipal de Torre de Moncorvo. A intervenção arqueológica consistiu na realização de sondagens e acompanhamento arqueológico no âmbito da aplicação das medidas minimizadoras do impacte da obra. SONDAGENS ARQUEOLÓGICAS Os trabalhos arqueológicos decorreram entre 25 de Fevereiro e 4 de Março de 2008. Tendo em conta o projecto de reconstrução do edifício foram realizadas cinco sondagens arqueológicas nos locais de afectação directa no subsolo, nomeadamente os relacionados com a construção de sapatas de pilar e de uma parede a construir, que irá substituir a parede Oeste da sala Norte do edifício que se encontrava pa...</text:p>
          </table:table-cell>
          <table:table-cell table:number-columns-repeated="1015"/>
        </table:table-row>
        <table:table-row table:style-name="ro1">
          <table:table-cell office:value-type="string">
            <text:p>127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128_IA_EDIA_TRG1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cto, intervenção arqueológica, intervencao arqueologica, acompanhamento arqueológico, acompanhamento arqueologico, escavação, escavacao, sondagem.</text:p>
          </table:table-cell>
          <table:table-cell office:value-type="string">
            <text:p>relatório, relatorio, relatório final, relatorio final, projecto, intervenção arqueológica, intervencao arqueologica, acompanhamento arqueológico, acompanhamento arqueologico, escavação, escavacao, sondagem</text:p>
          </table:table-cell>
          <table:table-cell office:value-type="string">
            <text:p>Assinatura PDF</text:p>
          </table:table-cell>
          <table:table-cell office:value-type="string">
            <text:p>D:20100304130439Z Writer OpenOffice.org 3.1 D:20100304150925Z Relatório Final Beja 2010 Bloco de Rega do Pisão Intervenção Arqueológica em Trigaches 14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Pós-graduada em Património e Projectos Culturais Assistentes de arqueólogo André Saraiva Francisco Barros Nelson Vale Óperários de arqueologia TRABALHO DE GABINETE Relatório Lídia Baptista, Mestre em arqueologia Lurdes Cunha, Mestre em arqueologia Sérgio Gomes, Mestre em arqueologia Desenho gráfico Rodry Mendonça, Assistente de arqueólogo Tratamento de espólio Anabela Rodrigues, Assistente de arqueólogo Fotografia de espólio Teresa Gonçalves, Assistente de arqueólogo Revisão de conteúdos Lídia Baptista DATA 03 de Março de 2010 Intervenção...</text:p>
          </table:table-cell>
          <table:table-cell table:number-columns-repeated="1015"/>
        </table:table-row>
        <table:table-row table:style-name="ro1">
          <table:table-cell office:value-type="string">
            <text:p>129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131_IA_BRP_08_HJ.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4.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412131538+01'00' Writer OpenOffice.org 3.1 D:20100420165025+01'00' Relatório Final Beja 2010 Bloco de Rega do Pisão Intervenção Arqueológica em Horta do Jacinto FICHA TÉCNICA COORDENAÇÃO GERAL Ricardo Teixeira, Mestre em arqueologia Vítor Fonseca, Arqueólogo COORDENAÇÃO DE PROJECTO Lídia Baptista, Mestre em arqueologia TRABALHO DE CAMPO Direcção Lídia Baptista, Mestre em Arqueologia Arqueólogos Bárbara Carvalho, Pós-graduada em Património e Projectos Culturais Lídia Baptista, Mestre em Arqueologia Lurdes Cunha, Mestre em Arqueologia Assistentes de arqueólogo André Saraiva Nelson Vale Francisco Barros TRABALHO DE GABINETE Relatório Lídia Baptista, Mestre em Arqueologia Lurdes Cunha, Mestre em Arqueologia Sérgio Gomes, Mestre em Arqueologia Desenho gráfico Rodry Mendonça Tratamento de espólio Francisco Barros Nelson Vale Conservação e restauro Anabela Hipólito, Técnica Superior de Conservação e Restauro Fotografia de espólio Francisco Barros Apoio técnico e revisão de texto Lídia...</text:p>
          </table:table-cell>
          <table:table-cell table:number-columns-repeated="1015"/>
        </table:table-row>
        <table:table-row table:style-name="ro1">
          <table:table-cell office:value-type="string">
            <text:p>132_CCC08_Relatorio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GPL Ghostscript 9.14 D:20210907171944+01'00' D:20210907171944+01'00' Igespar PDF24 Creator FichaSitio RELATÓRIO FINAL INTERVENÇÃO ARQUEOLÓGICA CONVENTO CORPUS CHRISTI VILA NOVA DE GAIA 2008 Copyright © arqueologia e património Matosinhos 2021 CCC.08 Intervenção Arqueológica Convento Corpus Christi – CCC.08 FICHA TÉCNICA Ricardo Teixeira &amp; Vítor Fonseca, Arqueologia Lda. PROJECTO 132 Coordenação geral Ricardo Teixeira, arqueólogo, mestre em arqueologia Vítor Fonseca, arqueólogo Coordenação de projeto Jorge Fonseca, arqueólogo Trabalho de campo Direção Ana Maria Oliveira, arqueóloga Helena Marçal, arqueóloga Jorge Fonseca Arqueólogos Rui Pinheiro, arqueólogo Assistentes de arqueólogo André Saraiva Lisdália Mota Nelson Vale Operários de arqueologia Francisco Monteiro Pedro Pinto Trabalho de gabinete Relatório Ana Maria Oliveira Helena Marçal Desenho gráfico Rui Oliveira Tratamento de espólio Anabela Rodrigues, assistente de arqueólogo Teresa Gonçalves, assistente de arqueólogo Conservação...</text:p>
          </table:table-cell>
          <table:table-cell table:number-columns-repeated="1015"/>
        </table:table-row>
        <table:table-row table:style-name="ro1">
          <table:table-cell office:value-type="string">
            <text:p>134_IA_HAP_08_FZ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081210162335Z D:20090209121655Z RELATÓRIO BEJA - 2008 TRABALHOS ARQUEOLÓGICOS NO ÂMBITO DA REDE DE APROVEITAMENTO HIDROAGRÍCOLA ALVITO/PISÃO FUZEIRA 3 S. MATIAS Intervenção Arqueológica em Fuzeira 3 FICHA TÉCNICA COORDENAÇÃO GERAL Ricardo Teixeira, Arqueólogo, Mestre em Arqueologia Vítor Fonseca, Arqueólogo COORDENAÇÃO DE PROJECTO Lídia Baptista, Mestre em Arqueologia TRABALHO DE CAMPO Direcção Lídia Baptista Arqueólogos Lurdes Oliveira Bárbara Carvalho Assistentes de arqueólogo Nelson Vale André Saraiva Francisco Barros TRABALHO DE GABINETE Relatório Lídia Baptista Bárbara Carvalho Desenho Gráfico Rodry Mendonça Revisão de conteúdos Lídia Baptista Revisão de texto e formatação Teresa Silva DATA 8 de Setembro de 2008 Relatório Final Setembro de 2008 Página 1 de 11 Intervenção Arqueológica em Fuzeira 3 Índice 1. Introdução.......................................................................................................................... 3 2. Situação de referência................</text:p>
          </table:table-cell>
          <table:table-cell table:number-columns-repeated="1015"/>
        </table:table-row>
        <table:table-row table:style-name="ro1">
          <table:table-cell office:value-type="string">
            <text:p>134_IA_HAP_08_MBT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081210162629Z D:20090209113845Z RELATÓRIO BEJA - 2008 TRABALHOS ARQUEOLÓGICOS NO ÂMBITO DA REDE DE APROVEITAMENTO HIDROAGRÍCOLA ALVITO/PISÃO MONTE DA BOTELHA 1 VIDIGUEIRA Intervenção Arqueológica em Monte da Botelha 1 FICHA TÉCNICA COORDENAÇÃO GERAL Ricardo Teixeira, Arqueólogo, Mestre em Arqueologia Vítor Fonseca, Arqueólogo COORDENAÇÃO DE PROJECTO Lídia Baptista, Mestre em Arqueologia TRABALHO DE CAMPO Direcção Lídia Baptista Arqueólogos Lurdes Oliveira Bárbara Carvalho Assistentes de arqueólogo Nelson Vale André Saraiva Francisco Barros TRABALHO DE GABINETE Relatório Lídia Baptista Bárbara Carvalho Desenho Gráfico Rodry Mendonça Fotografia de Espólio Francisco Barros Revisão de conteúdos Lídia Baptista Revisão de texto e formatação Teresa Silva DATA 8 de Setembro de 2008 Relatório Final Setembro de 2008 Página 1 de 12 Intervenção Arqueológica em Monte da Botelha 1 Índice 1. Introdução...................................................................................................</text:p>
          </table:table-cell>
          <table:table-cell table:number-columns-repeated="1015"/>
        </table:table-row>
        <table:table-row table:style-name="ro1">
          <table:table-cell office:value-type="string">
            <text:p>135_IA_POC.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5.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10216120001Z teresasilva PScript5.dll Version 5.2 Acrobat Distiller 8.1.0 (Windows) D:20110216180945Z 135 rel revisto 2010 02 15b Relatório Final Intervenção Arqueológica Requalificação da Orla Costeira de Matosinhos Matosinhos 2011 Intervenção Arqueológica - Requalificação da Orla Costeira de Matosinhos FICHA TÉCNICA Projecto nº 135 COORDENAÇÃO GERAL Ricardo Teixeira, Arqueólogo, Mestre em arqueologia Vítor Fonseca, Arqueólogo COORDENAÇÃO DE PROJECTO Jorge Fonseca TRABALHO DE CAMPO Direcção Marta Piedade – Arqueóloga; José Manuel Varela – Mestre em Arqueologia; Conceição Pires – Arqueóloga; Vítor Fonseca – Arqueólogo; Jorge Fonseca – Arqueólogo; Arqueólogos Lídia Baptista Assistentes de arqueólogo André Saraiva, Bebiana Mota, Eduardo Falcão, Nelson Vale, Ricardo Mota, Desenhador Rui Oliveira Registo fotográfico do piso Rodry Mendoça CONSERVAÇÃO E RESTAURO Anabela Hipólito, Mestre em Conservação e Restauro (coordenação), Francisco Barros, Sónia Santos LEVANTAMENTO TOPOGRÁFICO Luís...</text:p>
          </table:table-cell>
          <table:table-cell table:number-columns-repeated="1015"/>
        </table:table-row>
        <table:table-row table:style-name="ro1">
          <table:table-cell office:value-type="string">
            <text:p>136_IA_SCF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cto, intervenção arqueológica, intervencao arqueologica, sondagem.</text:p>
          </table:table-cell>
          <table:table-cell office:value-type="string">
            <text:p>relatório, relatorio, relatório final, relatorio final, projecto, intervenção arqueológica, intervencao arqueologica, sondagem</text:p>
          </table:table-cell>
          <table:table-cell office:value-type="string">
            <text:p>Assinatura PDF</text:p>
          </table:table-cell>
          <table:table-cell office:value-type="string">
            <text:p>D:20091216163709Z D:20091216170404Z RELATÓRIO S. MARIA DA FEIRA - 2009 INTERVENÇÃO ARQUEOLÓGICA NO CASTELO DA FEIRA SCF.08 Intervenção Arqueológica - Castelo de Santa Maria da Feira – SCF. 08 FICHA TÉCNICA COORDENAÇÃO GERAL Ricardo Teixeira, arqueólogo, mestre em arqueologia Vítor Fonseca, arqueólogo COORDENAÇÃO DE PROJECTO Jorge Fonseca, arqueólogo TRABALHO DE CAMPO Direcção Jorge Fonseca Arqueólogos Barbara Carvalho, arqueóloga Liliana Barbosa, arqueóloga Rui Pinheiro, arqueólogo Óperários de arqueologia Alexandre Pinto TRABALHO DE GABINETE Pesquisa Bibliográfica Márcia Barros, historiadora de Arte Introdução Histórica Márcia Barros Ricardo Teixeira Relatório Jorge Fonseca Desenho gráfico Ana Paulo, desenhadora de arqueologia Tratamento de espólio Teresa Gonçalves, assistente de arqueólogo Fotografia de espólio Pedro Maia, técnico superior de património cultural Apoio técnico e revisão de texto Teresa Silva, arqueóloga, pós-graduada em Museologia DATA 14 de Dezembro de 2009 Relatório...</text:p>
          </table:table-cell>
          <table:table-cell table:number-columns-repeated="1015"/>
        </table:table-row>
        <table:table-row table:style-name="ro1">
          <table:table-cell office:value-type="string">
            <text:p>138_IA_LRO_69_0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1008144526+01'00' teresasilva PScript5.dll Version 5.2 Acrobat Distiller 8.2.3 (Windows) D:20101008150225+01'00' 1_ 138 2010 10 06 Relatório Final Porto 2010 Intervenção Arqueológica na Rua do Loureiro nº 69-73 Intervenção Arqueológica na Rua do Loureiro, nº 69-73 FICHA TÉCNICA Projecto nº: 138 COORDENAÇÃO GERAL Ricardo Teixeira, Arqueólogo, Mestre em arqueologia Vítor Fonseca, Arqueólogo COORDENAÇÃO DE PROJECTO Jorge Fonseca, Arqueólogo TRABALHO DE CAMPO Direcção Helena Marçal, Arqueóloga Assistentes de arqueólogo Bebiana Mota, Assistente de Arqueólogo Ricardo Mota, Assistente de Arqueólogo Operários de arqueologia Alexandre Pinto Francisco Monteiro TRABALHO DE GABINETE Relatório Helena Marçal Desenho gráfico Rodry Mendonça Tratamento de espólio Teresa Gonçalves Fotografia de espólio Pedro Maia, Técnico Superior de Património Cultural Apoio técnico e revisão de texto Teresa Silva, Arqueóloga, pós-graduada em Museologia DATA 8 de Outubro de 2010 Relatório Final Outubro de 2010 Pá...</text:p>
          </table:table-cell>
          <table:table-cell table:number-columns-repeated="1015"/>
        </table:table-row>
        <table:table-row table:style-name="ro1">
          <table:table-cell office:value-type="string">
            <text:p>138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 Pistas usadas: relatório, relatorio, relatório final, relatorio final, projecto, intervenção arqueológica, intervencao arqueologica, acompanhamento arqueológico, acompanhamento arqueologico, sondagens, trabalhos arqueológicos, trabalhos arqueologicos.</text:p>
          </table:table-cell>
          <table:table-cell office:value-type="string">
            <text:p>relatório, relatorio, relatório final, relatorio final, projec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office:value-type="string">
            <text:p>D:20080630113455+01'00' D:20080630113455+01'00' RELATÓRIO PRELIMINAR PORTO - 2008 INTERVENÇÃO ARQUEOLÓGICA NA RUA DO LOUREIRO 69-73 Intervenção Arqueológica na Rua do Loureiro nº 69-73 FICHA TÉCNICA COORDENAÇÃO GERAL Ricardo Teixeira, Arqueólogo, Mestre em arqueologia Vítor Fonseca, Arqueólogo COORDENAÇÃO DE PROJECTO Jorge Fonseca, arqueólogo TRABALHO DE CAMPO Direcção Helena Marçal, arqueóloga Desenhadores Bebiana Mota, assistente de arqueólogo Ricardo Mota, assistente de arqueólogo Operários de Arqueologia Alexandre Pinto Francisco Monteiro TRABALHO DE GABINETE Relatório Helena Marçal Desenho Gráfico Ana Paulo Fotografia de Espólio Jorge Fonseca Revisão Teresa Silva DATA 26 de Junho de 2008 Relatório Preliminar Junho de 2008 Página 1 de 12 Intervenção Arqueológica na Rua do Loureiro nº 69-73 Índice 1.Introdução............................................................................................................ 3 2.Intervenção arqueológica..........................................</text:p>
          </table:table-cell>
          <table:table-cell table:number-columns-repeated="1015"/>
        </table:table-row>
        <table:table-row table:style-name="ro1">
          <table:table-cell office:value-type="string">
            <text:p>139_EIA_Braga_leroy_Merlin.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Alta</text:p>
          </table:table-cell>
          <table:table-cell office:value-type="string">
            <text:p>Documento PDF; o conteúdo aparenta corresponder a desenho / planta / cad / relatório de projeto / intervenção arqueológica. Foram analisadas as primeiras 4 página(s) de um total de 34. Pistas usadas: planta, desenho, implantação, implantacao, relatório, relatorio, projecto.</text:p>
          </table:table-cell>
          <table:table-cell office:value-type="string">
            <text:p>planta, desenho, implantação, implantacao, relatório, relatorio, projecto</text:p>
          </table:table-cell>
          <table:table-cell office:value-type="string">
            <text:p>Assinatura PDF</text:p>
          </table:table-cell>
          <table:table-cell office:value-type="string">
            <text:p>D:20080613154418+01'00' Adobe Acrobat 8.1 Combine Files Adobe Acrobat 8.1 D:20080613154628+01'00' RELATÓRIO BRAGA - 2008 ESTUDO DE IMPACTE AMBIENTAL DESCRITOR PATRIMÓNIO CULTURAL LEROY MERLIN EIA Leroy Merlin - Descritor Património Cultural Índice 1.Introdução............................................................................................................ 3 2.Metodologia do Estudo.............................................................................................. 6 3.Caracterização da Situação de Referência e Avaliação Patrimonial......................................... 7 3.1. Introdução Histórica......................................................................................... 7 3.2.Condições de Execução do Trabalho de Campo........................................................... 9 3.3.Caracterização da Situação de Referência............................................................... 11 3.3.1.Área Envolvente.............................................</text:p>
          </table:table-cell>
          <table:table-cell table:number-columns-repeated="1015"/>
        </table:table-row>
        <table:table-row table:style-name="ro1">
          <table:table-cell office:value-type="string">
            <text:p>140_BCE_08_MC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02153252Z Writer OpenOffice.org 3.1 D:20100303092924Z Relatório Final Porto 2010 Aproveitamento Hidroagrícola de Alvito – Pisão Bloco de Cuba Este - Monte das Covas 2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Arqueóloga, Pós-graduada em Património e Projectos Culturais Assistentes de arqueólogo André Saraiva Nelson Vale Operários de arqueologia Alexandre Pinto Pedro Pinto TRABALHO DE GABINETE Relatório Lídia Baptista, Mestre em Arqueologia Lurdes Cunha, Mestre em Arqueologia Desenho gráfico Rodry Mendonça Revisão e informatização do registo de campo Bárbara Carvalho Lurdes Cunha Tratamento de espólio Anabela Rodrigues Teresa Gonçalves Conservação e restauro Anabela Hipólito, Técnica Superior de Conservação e Restauro Foto...</text:p>
          </table:table-cell>
          <table:table-cell table:number-columns-repeated="1015"/>
        </table:table-row>
        <table:table-row table:style-name="ro1">
          <table:table-cell office:value-type="string">
            <text:p>140_BCO_08_HC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3.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02181357Z Writer OpenOffice.org 3.1 D:20100303092648Z Relatório Final Porto 2010 Aproveitamento Hidroagrícola de Alvito–Pisão Bloco de Cuba Oeste - Hortas das Canas 9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Arqueóloga, Pós-graduada em Património e Projectos Culturais Assistentes de arqueólogo André Saraiva Nelson Vale Óperários de arqueologia Alexandre Pinto Pedro Pinto TRABALHO DE GABINETE Relatório Lídia Baptista, Mestre em Arqueologia Lurdes Cunha, Mestre em Arqueologia Desenho gráfico Rodry Mendonça Revisão e informatização do registo de campo Bárbara Carvalho, Arqueóloga, Pós-graduada em Património e Projectos Culturais Lurdes Cunha, Mestre em Arqueologia Tratamento de espólio Anabela Rodrigues Teresa Gonçalves Con...</text:p>
          </table:table-cell>
          <table:table-cell table:number-columns-repeated="1015"/>
        </table:table-row>
        <table:table-row table:style-name="ro1">
          <table:table-cell office:value-type="string">
            <text:p>140_BV_08_QP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9.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02152653Z Writer OpenOffice.org 3.1 D:20100303093105Z Relatório Final Porto 2010 Aproveitamento Hidroagrícola de Alvito – Pisão Bloco da Vidigueira - Quinta do Pimentel 2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Bárbara Carvalho, Pós-graduada em Património e Projectos Culturais Assistentes de arqueólogo André Saraiva Nelson Vale Operários de arqueologia Alexandre Pinto Pedro Pinto TRABALHO DE GABINETE Relatório Lídia Baptista, Mestre em Arqueologia Lurdes Cunha, Mestre em Arqueologia Desenho gráfico Rodry Mendonça Revisão e informatização do registo de campo Bárbara Carvalho Lurdes Cunha Tratamento de espólio Anabela Rodrigues Teresa Gonçalves Conservação e restauro Anabela Hipólito, Técnica Superior de Conservação e Restauro Fotografia d...</text:p>
          </table:table-cell>
          <table:table-cell table:number-columns-repeated="1015"/>
        </table:table-row>
        <table:table-row table:style-name="ro1">
          <table:table-cell office:value-type="string">
            <text:p>140_HC9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projecto, intervenção arqueológica, intervencao arqueologica, escavação, escavacao, sondagem, sondagens, trabalhos arqueológicos, trabalhos arqueologicos.</text:p>
          </table:table-cell>
          <table:table-cell office:value-type="string">
            <text:p>relatório, relatorio, projecto, intervenção arqueológica, intervencao arqueologica, escavação, escavacao, sondagem, sondagens, trabalhos arqueológicos, trabalhos arqueologicos</text:p>
          </table:table-cell>
          <table:table-cell office:value-type="string">
            <text:p>Assinatura PDF</text:p>
          </table:table-cell>
          <table:table-cell office:value-type="string">
            <text:p>D:20080711174955+01'00' D:20080711174955+01'00' RELATÓRIO PRELIMINAR CUBA - 2008 TRABALHOS ARQUEOLÓGICOS APROVEITAMENTO HIDROAGRÍCOLA DE ALVITO-PISÃO (SUB-BLOCO DE CUBA OESTE) HORTA DE CANAS 9 Intervenção Arqueológica em Horta das Canas9 FICHA TÉCNICA COORDENAÇÃO GERAL Ricardo Teixeira, Arqueólogo, Mestre em arqueologia Vítor Fonseca, Arqueólogo COORDENAÇÃO DE PROJECTO Lídia Baptista, Mestre em arqueologia TRABALHO DE CAMPO Direcção Lídia Baptista Lurdes Cunha, Mestre em arqueologia Arqueólogos Bárbara Carvalho Assistentes de arqueólogo André Saraiva Nelson Vale Desenhadores Operários de arqueologia Alexandre Pinto Pedro Pinto TRABALHO DE GABINETE Relatório Lídia Baptista Lurdes Cunha Desenho Gráfico Rodry Mendonça Fotografia de Espólio Revisão Lídia Baptista Revisão de texto Teresa Silva DATA 10 de Julho 2008 Relatório Preliminar Julho de 2008 Página 1 de 16 Intervenção Arqueológica em Horta das Canas9 Índice 1.Introdução...................................................................</text:p>
          </table:table-cell>
          <table:table-cell table:number-columns-repeated="1015"/>
        </table:table-row>
        <table:table-row table:style-name="ro1">
          <table:table-cell office:value-type="string">
            <text:p>140_MC2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 Pistas usadas: relatório, relatorio, projecto, intervenção arqueológica, intervencao arqueologica, escavação, escavacao, sondagem, trabalhos arqueológicos, trabalhos arqueologicos.</text:p>
          </table:table-cell>
          <table:table-cell office:value-type="string">
            <text:p>relatório, relatorio, projecto, intervenção arqueológica, intervencao arqueologica, escavação, escavacao, sondagem, trabalhos arqueológicos, trabalhos arqueologicos</text:p>
          </table:table-cell>
          <table:table-cell office:value-type="string">
            <text:p>Assinatura PDF</text:p>
          </table:table-cell>
          <table:table-cell office:value-type="string">
            <text:p>D:20080711174854+01'00' D:20080711174854+01'00' RELATÓRIO PRELIMINAR CUBA - 2008 TRABALHOS ARQUEOLÓGICOS APROVEITAMENTO HIDROAGRÍCOLA DE ALVITO-PISÃO (SUB-BLOCO DE CUBA ESTE) MONTE DAS COVAS 2 Intervenção Arqueológica em Monte das Covas 2 FICHA TÉCNICA COORDENAÇÃO GERAL Ricardo Teixeira, Arqueólogo, Mestre em arqueologia Vítor Fonseca, Arqueólogo COORDENAÇÃO DE PROJECTO Lídia Baptista, Mestre em arqueologia TRABALHO DE CAMPO Direcção Lídia Baptista Lurdes Cunha, Mestre em arqueologia Arqueólogos Bárbara Carvalho Assistentes de arqueólogo André Saraiva Nelson Vale Operários de Arqueologia Alexandre Pinto Pedro Pinto TRABALHO DE GABINETE Relatório Lídia Baptista Lurdes Cunha Desenho Gráfico Rodry Mendonça Fotografia de Espólio Revisão Lídia Baptista Revisão de texto Teresa Silva DATA 10 de Julho 2008 Relatório Preliminar Julho de 2008 Página 1 de 11 Intervenção Arqueológica em Monte das Covas 2 Índice 1.Introdução..............................................................................</text:p>
          </table:table-cell>
          <table:table-cell table:number-columns-repeated="1015"/>
        </table:table-row>
        <table:table-row table:style-name="ro1">
          <table:table-cell office:value-type="string">
            <text:p>140_QP2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projecto, intervenção arqueológica, intervencao arqueologica, escavação, escavacao, sondagens, trabalhos arqueológicos, trabalhos arqueologicos.</text:p>
          </table:table-cell>
          <table:table-cell office:value-type="string">
            <text:p>relatório, relatorio,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D:20080711174755+01'00' D:20080711174755+01'00' RELATÓRIO PRELIMINAR CUBA - 2008 TRABALHOS ARQUEOLÓGICOS APROVEITAMENTO HIDROAGRÍCOLA DE ALVITO-PISÃO (SUB-BLOCO DA VIDIGUEIRA) QUINTA DO PIMENTEL Intervenção Arqueológica em Quinta do Pimentel 2 FICHA TÉCNICA COORDENAÇÃO GERAL Ricardo Teixeira, Arqueólogo, Mestre em arqueologia Vítor Fonseca, Arqueólogo COORDENAÇÃO DE PROJECTO Lídia Baptista, Mestre em arqueologia TRABALHO DE CAMPO Direcção Lídia Baptista Lurdes Cunha, Mestre em arqueologia Arqueólogos Bárbara Carvalho Assistentes de arqueólogo André Saraiva Nelson Vale Operários de Arqueologia Alexandre Pinto Pedro Pinto TRABALHO DE GABINETE Relatório Lídia Baptista Lurdes Cunha Desenho Gráfico Rodry Mendonça Fotografia de Espólio Revisão Lídia Baptista Revisão de texto Teresa Silva DATA 09 de Julho 2008 Relatório Preliminar Julho de 2008 Página 1 de 10 Intervenção Arqueológica em Quinta do Pimentel 2 Índice 1.Introdução......................................................................</text:p>
          </table:table-cell>
          <table:table-cell table:number-columns-repeated="1015"/>
        </table:table-row>
        <table:table-row table:style-name="ro1">
          <table:table-cell office:value-type="string">
            <text:p>141_AAE_PPArnoia.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relatório de projeto / intervenção arqueológica / desenho / planta / cad. Foram analisadas as primeiras 4 página(s) de um total de 25. Pistas usadas: relatório, relatorio, projecto, desenho, implantação, implantacao.</text:p>
          </table:table-cell>
          <table:table-cell office:value-type="string">
            <text:p>relatório, relatorio, projecto, desenho, implantação, implantacao</text:p>
          </table:table-cell>
          <table:table-cell office:value-type="string">
            <text:p>Assinatura PDF</text:p>
          </table:table-cell>
          <table:table-cell office:value-type="string">
            <text:p>D:20080612151954+01'00' Writer OpenOffice.org 2.1 D:20080612160711+01'00' RELATÓRIO ÓBIDOS - 2008 AVALIAÇÃO AMBIENTAL ESTRATÉGICA PATRIMÓNIO CULTURAL PLANO DE PORMENOR DE ARNÓIA Avaliação Ambiental Estratégica Património Cultural. Plano de Pormenor de Arnóia FICHA TÉCNICA COORDENAÇÃO GERAL Ricardo Teixeira, Arqueólogo, Mestre em arqueologia Vítor Fonseca, Arqueólogo COORDENAÇÃO DE PROJECTO Ricardo Teixeira TRABALHO DE CAMPO César Guedes TRABALHO DE GABINETE Relatório Teresa Silva César Guedes Desenho Gráfico Ana Paulo, desenhadora de arqueologia DATA Junho de 2008 Relatório Junho de 2008 Página 1 de 16 Avaliação Ambiental Estratégica Património Cultural. Plano de Pormenor de Arnóia 1. INTRODUÇÃO Os trabalhos efectuados enquadram-se no âmbito do Estudo de Avaliação Ambiental Estratégica do Plano de Pormenor da Arnóia, em Óbidos. O estudo visou o reconhecimento e identificação genéricos dos valores arqueológicos e patrimoniais presentes na área de intervenção do plano e sua envolvente pr...</text:p>
          </table:table-cell>
          <table:table-cell table:number-columns-repeated="1015"/>
        </table:table-row>
        <table:table-row table:style-name="ro1">
          <table:table-cell office:value-type="string">
            <text:p>145_EIA_Decathlon_Braga.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Alta</text:p>
          </table:table-cell>
          <table:table-cell office:value-type="string">
            <text:p>Documento PDF; o conteúdo aparenta corresponder a relatório de projeto / intervenção arqueológica / desenho / planta / cad. Foram analisadas as primeiras 4 página(s) de um total de 38. Pistas usadas: relatório, relatorio, projecto, prospecção, prospeccao, planta, desenho, implantação, implantacao.</text:p>
          </table:table-cell>
          <table:table-cell office:value-type="string">
            <text:p>relatório, relatorio, projecto, prospecção, prospeccao, planta, desenho, implantação, implantacao</text:p>
          </table:table-cell>
          <table:table-cell office:value-type="string">
            <text:p>Assinatura PDF</text:p>
          </table:table-cell>
          <table:table-cell office:value-type="string">
            <text:p>D:20080806152503+01'00' Writer Adobe Acrobat 8.1 D:20080909111449+01'00' RELATÓRIO BRAGA - 2008 ESTUDO DE IMPACTE AMBIENTAL DESCRITOR PATRIMÓNIO LOJA DECATHLON BRAGA EIA Decathlon Braga - Descritor Património Cultural Índice 1.Introdução............................................................................................................3 2.Metodologia do Estudo..............................................................................................7 3.Caracterização da Situação de Referência e Avaliação Patrimonial.........................................8 3.1. Introdução Histórica.........................................................................................8 3.2.Condições de Execução do Trabalho de Campo.........................................................10 3.3.Caracterização da Situação de Referência...............................................................12 3.3.1.Área Envolvente...........................................................................</text:p>
          </table:table-cell>
          <table:table-cell table:number-columns-repeated="1015"/>
        </table:table-row>
        <table:table-row table:style-name="ro1">
          <table:table-cell office:value-type="string">
            <text:p>146_EIA_Decathlon_Guimaraes.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Alta</text:p>
          </table:table-cell>
          <table:table-cell office:value-type="string">
            <text:p>Documento PDF; o conteúdo aparenta corresponder a relatório de projeto / intervenção arqueológica / desenho / planta / cad. Foram analisadas as primeiras 4 página(s) de um total de 32. Pistas usadas: relatório, relatorio, projecto, prospecção, prospeccao, planta, desenho, implantação, implantacao.</text:p>
          </table:table-cell>
          <table:table-cell office:value-type="string">
            <text:p>relatório, relatorio, projecto, prospecção, prospeccao, planta, desenho, implantação, implantacao</text:p>
          </table:table-cell>
          <table:table-cell office:value-type="string">
            <text:p>Assinatura PDF</text:p>
          </table:table-cell>
          <table:table-cell office:value-type="string">
            <text:p>D:20081009105213+01'00' liliana barbosa Writer OpenOffice.org 2.1 D:20081016122501+01'00' RELATÓRIO GUIMARÃES - 2008 ESTUDO DE IMPACTE AMBIENTAL DESCRITOR PATRIMÓNIO LOJA DECATHLON EIA Decathlon Guimarães - Descritor Património Cultural Índice 1.Introdução............................................................................................................ 3 2.Metodologia do Estudo.............................................................................................. 7 3.Caracterização da Situação de Referência e Avaliação Patrimonial......................................... 8 3.1. Introdução Histórica......................................................................................... 8 3.2.Condições de Execução do Trabalho de Campo........................................................... 9 3.3.Caracterização da Situação de Referência............................................................... 12 3.3.1.Área Envolvente.................................................</text:p>
          </table:table-cell>
          <table:table-cell table:number-columns-repeated="1015"/>
        </table:table-row>
        <table:table-row table:style-name="ro1">
          <table:table-cell office:value-type="string">
            <text:p>147_BB_08_PR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517121519+01'00' Writer OpenOffice.org 3.2 D:20100517160915+01'00' Relatório Final Beja 2010 Barragem de Brinches Intervenção Arqueológica em Pinheiro 2 FICHA TÉCNICA COORDENAÇÃO GERAL Ricardo Teixeira, Mestre em arqueologia Vítor Fonseca, Arqueólogo COORDENAÇÃO DE PROJECTO Lídia Baptista, Mestre em arqueologia TRABALHO DE CAMPO Direcção Lídia Baptista, Mestre em Arqueologia Lurdes Cunha, Mestre em Arqueologia Assistentes de arqueólogo André Saraiva Nelson Vale Operários de arqueologia Alexandre Pinto Pedro Pinto TRABALHO DE GABINETE Relatório Lídia Baptista, Mestre em Arqueologia Lurdes Cunha, Mestre em Arqueologia Sérgio Gomes, Mestre em Arqueologia Desenho gráfico Rodry Mendonça Lídia Baptista Tratamento de espólio Anabela Rodrigues Teresa Gonçalves Conservação e restauro Anabela Hipólito, Técnica Superior de Conservação e Restauro Fotografia de espólio Pedro Maia Apoio técnico e revisão de texto Lídia Baptista, Mestre em Arqueologia DATA 15 de Maio de 2010 Intervenção Arqueo...</text:p>
          </table:table-cell>
          <table:table-cell table:number-columns-repeated="1015"/>
        </table:table-row>
        <table:table-row table:style-name="ro1">
          <table:table-cell office:value-type="string">
            <text:p>147_BRMN_08_HP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5. Pistas usadas: relatório, relatorio, relatório final, relatorio final, projecto, intervenção arqueológica, intervencao arqueologica, escavação, escavacao, sondagem, sondagens.</text:p>
          </table:table-cell>
          <table:table-cell office:value-type="string">
            <text:p>relatório, relatorio, relatório final, relatorio final, projecto, intervenção arqueológica, intervencao arqueologica, escavação, escavacao, sondagem, sondagens</text:p>
          </table:table-cell>
          <table:table-cell office:value-type="string">
            <text:p>Assinatura PDF</text:p>
          </table:table-cell>
          <table:table-cell office:value-type="string">
            <text:p>D:20100517161217+01'00' Writer OpenOffice.org 3.2 D:20100518100739+01'00' Relatório Final Beja 2010 Bloco de Rega do Monte Novo Intervenção Arqueológica em Hospital 6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Arqueólogos Lídia Baptista, Mestre em Arqueologia Lurdes Cunha, Mestre em Arqueologia Assistentes de arqueólogo André Saraiva Nelson Vale Operários de Arqueologia Alexandre Pinto Pedro Pinto TRABALHO DE GABINETE Relatório Lídia Baptista, Mestre em Arqueologia Lurdes Cunha, Mestre em Arqueologia Sérgio Gomes, Mestre em Arqueologia Desenho gráfico Rodry Mendonça Tratamento de espólio Anabela Rodrigues Teresa Gonçalves Conservação e restauro Anabela Hipólito, Técnica Superior de Conservação e Restauro Helena Vaz, Técnica Superior de Conservação e Restauro F...</text:p>
          </table:table-cell>
          <table:table-cell table:number-columns-repeated="1015"/>
        </table:table-row>
        <table:table-row table:style-name="ro1">
          <table:table-cell office:value-type="string">
            <text:p>147_BRP_08_FCH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cto, intervenção arqueológica, intervencao arqueologica, acompanhamento arqueológico, acompanhamento arqueologico, escavação, escavacao, sondagens.</text:p>
          </table:table-cell>
          <table:table-cell office:value-type="string">
            <text:p>relatório, relatorio, relatório final, relatorio final, projecto, intervenção arqueológica, intervencao arqueologica, acompanhamento arqueológico, acompanhamento arqueologico, escavação, escavacao, sondagens</text:p>
          </table:table-cell>
          <table:table-cell office:value-type="string">
            <text:p>Assinatura PDF</text:p>
          </table:table-cell>
          <table:table-cell office:value-type="string">
            <text:p>D:20100511182734+01'00' Writer OpenOffice.org 3.2 D:20100513113001+01'00' Relatório Final Beja 2010 Bloco de Rega do Pisão Intervenção Arqueológica em Funchais 6 FICHA TÉCNICA COORDENAÇÃO GERAL Ricardo Teixeira, Mestre em arqueologia Vítor Fonseca, Arqueólogo COORDENAÇÃO DE PROJECTO Lídia Baptista, Mestre em arqueologia TRABALHO DE CAMPO Direcção Lídia Baptista, Mestre em Arqueologia Assistentes de arqueólogo Nelson Vale TRABALHO DE GABINETE Relatório Lídia Baptista, Mestre em Arqueologia Lurdes Cunha, Mestre em Arqueologia Sérgio Gomes, Mestre em Arqueologia Desenho gráfico Rodry Mendonça Tratamento de espólio Anabela Rodrigues Teresa Gonçalves Conservação e restauro Anabela Hipólito, Técnica Superior de Conservação e Restauro Fotografia de espólio Pedro Pinto Apoio técnico e revisão de texto Lídia Baptista, Mestre em Arqueologia DATA 15 de Maio de 2010 Intervenção Arqueológica em Funchais 6 ÍNDICE 1.Introdução..............................................................................</text:p>
          </table:table-cell>
          <table:table-cell table:number-columns-repeated="1015"/>
        </table:table-row>
        <table:table-row table:style-name="ro1">
          <table:table-cell office:value-type="string">
            <text:p>147_HAP_TR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518134419+01'00' Writer OpenOffice.org 3.2 D:20100518160046+01'00' Relatório Final Beja 2010 Aproveitamento Hidroagrícola de Alvito-Pisão Intervenção Arqueológica em Torre 4 FICHA TÉCNICA COORDENAÇÃO GERAL Ricardo Teixeira, Mestre em arqueologia Vítor Fonseca, Arqueólogo COORDENAÇÃO DE PROJECTO Lídia Baptista, Mestre em arqueologia TRABALHO DE CAMPO Direcção Lídia Baptista, Mestre em Arqueologia Lurdes Cunha, Mestre em Arqueologia Assistentes de arqueólogo André Saraiva Nelson Vale Operários de Arqueologia Alexandre Pinto Pedro Pinto TRABALHO DE GABINETE Relatório Andreia Arezes, Mestre em Arqueologia Helena Vaz, Técnica Superior de Conservação e Restauro Lídia Baptista, Mestre em Arqueologia Lurdes Cunha, Mestre em Arqueologia Sérgio Gomes, Mestre em Arqueologia Desenho gráfico Rodry Mendonça Lídia Baptista Tratamento de espólio Anabela Rodrigues Teresa Gonçalves Conservação e restauro Anabela Hipólito, Técnica Superior de Conservação e Restauro Helena Vaz, Técnica Superior de...</text:p>
          </table:table-cell>
          <table:table-cell table:number-columns-repeated="1015"/>
        </table:table-row>
        <table:table-row table:style-name="ro1">
          <table:table-cell office:value-type="string">
            <text:p>149_Cruzeiro_Camin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8. Pistas usadas: relatório, relatorio, relatório final, relatorio final, registo, valor, estado.</text:p>
          </table:table-cell>
          <table:table-cell office:value-type="string">
            <text:p>relatório, relatorio, relatório final, relatorio final, registo, valor, estado</text:p>
          </table:table-cell>
          <table:table-cell office:value-type="string">
            <text:p>Assinatura PDF</text:p>
          </table:table-cell>
          <table:table-cell office:value-type="string">
            <text:p>Writer LibreOffice 3.6 D:20121228183011Z' Conservação e Restauro do Cruzeiro Velho de Lanhelas, Caminha 1. INTRODUÇÃO Este documento visa descrever os trabalhos de conservação e restauro efectuados no Cruzeiro Velho, situado na freguesia de Lanhelas, Caminha. Tendo em conta o estado actual de conservação dos elementos que compõem este conjunto e o seu valor patrimonial, pretende-se que as acções alvo desta proposta garantam uma adequada preservação e valorização do seu carácter arquitectónico e histórico. 1.1.METODOLOGIA Os processos descritos neste documento foram alvo de um planeamento sob o ponto de vista técnico, de forma a recuperar, conservar e preservar os componentes construtivos do conjunto. A intervenção contemplou os trabalhos de consolidação, colagem e preenchimento de lacunas dos elementos fracturados do fuste, bola e cruz, incluindo a ligação de todas as partes in situ. As tarefas de conservação e restauro dos vários elementos realizaram-se em dois momentos, o primeiro em...</text:p>
          </table:table-cell>
          <table:table-cell table:number-columns-repeated="1015"/>
        </table:table-row>
        <table:table-row table:style-name="ro1">
          <table:table-cell office:value-type="string">
            <text:p>151_EIA_Porto_Power_Cente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cto, prospecção, prospeccao.</text:p>
          </table:table-cell>
          <table:table-cell office:value-type="string">
            <text:p>relatório, relatorio, relatório final, relatorio final, projecto, prospecção, prospeccao</text:p>
          </table:table-cell>
          <table:table-cell office:value-type="string">
            <text:p>Assinatura PDF</text:p>
          </table:table-cell>
          <table:table-cell office:value-type="string">
            <text:p>D:20090226152959Z Writer Adobe Acrobat 8.1 D:20090226153109Z RELATÓRIO PORTO - 2009 ESTUDO DE IMPACTE AMBIENTAL DESCRITOR PATRIMÓNIO PORTO POWER CENTER EIA Porto Power Center - Descritor Património Cultural FICHA TÉCNICA COORDENAÇÃO GERAL Ricardo Teixeira e Vítor Fonseca COORDENAÇÃO DE PROJECTO Teresa Silva TRABALHO DE CAMPO Prospecção Liliana Barbosa e Teresa Silva Fotografia Liliana Barbosa e Teresa Silva TRABALHO DE GABINETE Relatório Liliana Barbosa Desenho gráfico Ana Paulo Revisão Teresa Silva DATA Fevereiro de 2009 Relatório Final Fevereiro de 2009 Página 1 de 25 EIA Porto Power Center - Descritor Património Cultural Índice 1.Introdução............................................................................................................ 3 2.Metodologia de Estudo.............................................................................................. 6 2.1. Introdução Histórica......................................................................................... 7 2...</text:p>
          </table:table-cell>
          <table:table-cell table:number-columns-repeated="1015"/>
        </table:table-row>
        <table:table-row table:style-name="ro1">
          <table:table-cell office:value-type="string">
            <text:p>152_EP_Tamega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10. Pistas usadas: relatório, relatorio, relatório final, relatorio final, projecto, património arqueológico, patrimonio arqueologico.</text:p>
          </table:table-cell>
          <table:table-cell office:value-type="string">
            <text:p>relatório, relatorio, relatório final, relatorio final, projecto, património arqueológico, patrimonio arqueologico</text:p>
          </table:table-cell>
          <table:table-cell office:value-type="string">
            <text:p>Assinatura PDF</text:p>
          </table:table-cell>
          <table:table-cell office:value-type="string">
            <text:p>D:20110919180938+01'00' teresasilva PScript5.dll Version 5.2 Acrobat Distiller 8.1.0 (Windows) D:20111229114232Z 152_Rel_2011_09 19b RELATÓRIO FINAL 2ª FASE Estudo de Caracterização do Património Cultural como Factor de Desenvolvimento e Competitividade Territoriais do Baixo Tâmega Amarante, Baião e Marco de Canaveses 2011 Estudo de Caracterização do Património Cultural como Factor de Desenvolvimento e Competitividade Territoriais do Baixo Tâmega FICHA TÉCNICA Ricardo Teixeira &amp; Vítor Fonseca Arqueologia Lda. PROJECTO 152 Coordenação Geral Ricardo Teixeira, Arqueólogo, mestre em arqueologia Vítor Fonseca, arqueólogo Coordenação de Projecto Carla Stockler, Museu Municipal de Baião Ricardo Teixeira, Arqueologia e Património DIRECÇÃO SECTORIAL Património Arqueológico Lurdes Cunha, arqueóloga Património Arquitectónico Paulo Dordio Gomes, mestre em arqueologia RELATÓRIO Texto Carla Stockler Ricardo Teixeira Lurdes Cunha Paulo Dordio Gomes Anabela Sá Fotografia Anabela Sá Bebiana Mota Lisdál...</text:p>
          </table:table-cell>
          <table:table-cell table:number-columns-repeated="1015"/>
        </table:table-row>
        <table:table-row table:style-name="ro1">
          <table:table-cell office:value-type="string">
            <text:p>152_rel_1_red.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185. Pistas usadas: relatório, relatorio, projecto, património arqueológico, patrimonio arqueologico, tabela, base de dados, data, valor.</text:p>
          </table:table-cell>
          <table:table-cell office:value-type="string">
            <text:p>relatório, relatorio, projecto, património arqueológico, patrimonio arqueologico, tabela, base de dados, data, valor</text:p>
          </table:table-cell>
          <table:table-cell office:value-type="string">
            <text:p>Assinatura PDF</text:p>
          </table:table-cell>
          <table:table-cell office:value-type="string">
            <text:p>D:20100204174302Z Teresa Silva Writer OpenOffice.org 3.1 D:20100219103128Z Relatório 1ª Fase Porto 2010 Estudo de Caracterização do Património Cultural como Factor de Desenvolvimento e Competitividade Territoriais do Baixo Tâmega Estudo de Caracterização do Património Cultural como Factor de Desenvolvimento e Competitividade Territoriais do Baixo Tâmega FICHA TÉCNICA COORDENAÇÃO GERAL Ricardo Teixeira Vítor Fonseca COORDENAÇÃO DE PROJECTO Carla Stockler, Museu Municipal de Baião Ricardo Teixeira, Arqueologia e Património Lda. DIRECÇÃO SECTORIAL Património Arqueológico Lurdes Cunha Património Arquitectónico Paulo Dordio Gomes Património Arquivístico Amândio Barros RELATÓRIO Texto Carla Stockler Ricardo Teixeira Lurdes Cunha Paulo Dordio Gomes Amândio Barros Fotografia Arqueologia e Património Lda DGEMN Bases de Dados e SIG Ricardo Teixeira Lurdes Cunha Paulo Dordio Gomes Pedro Maia Teresa Silva Apoio técnico e revisão Teresa Silva Pedro Maia DATA 29 de Janeiro de 2010 Relatório 1ª Fase...</text:p>
          </table:table-cell>
          <table:table-cell table:number-columns-repeated="1015"/>
        </table:table-row>
        <table:table-row table:style-name="ro1">
          <table:table-cell office:value-type="string">
            <text:p>153_BRB_08_CRC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54509+01'00' lilianabarbosa PScript5.dll Version 5.2 Acrobat Distiller 8.2.2 (Windows) D:20100622154509+01'00' 153 BRB 08 CRC REL FINAL Relatório Final Beja 2010 Bloco de Rega de Brinches – Bloco B Intervenção Arqueológica em Charneca (Brinches) Bloco de Rega de Brinches – Bloco B Intervenção Arqueológica em Charneca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aur...</text:p>
          </table:table-cell>
          <table:table-cell table:number-columns-repeated="1015"/>
        </table:table-row>
        <table:table-row table:style-name="ro1">
          <table:table-cell office:value-type="string">
            <text:p>153_BRB_08_CTD2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3.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54608+01'00' lilianabarbosa PScript5.dll Version 5.2 Acrobat Distiller 8.2.2 (Windows) D:20100623123639+01'00' 153 BRB 08 CTD2 REL FINAL Relatório Final Beja 2010 Bloco de Rega de Brinches – Bloco B Intervenção Arqueológica em Contendinha 2 (Pias) Bloco de Rega de Brinches – Bloco B Intervenção Arqueológica em Contendinha 2 (Pia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text:p>
          </table:table-cell>
          <table:table-cell table:number-columns-repeated="1015"/>
        </table:table-row>
        <table:table-row table:style-name="ro1">
          <table:table-cell office:value-type="string">
            <text:p>153_BRB_08_DG REL 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54705+01'00' lilianabarbosa PScript5.dll Version 5.2 Acrobat Distiller 8.2.2 (Windows) D:20100623123946+01'00' 153 BRB 08 DG REL FINAL Relatório Final Beja 2010 Bloco de Rega de Brinches – Bloco B Intervenção Arqueológica em São Domingos (Brinches) Bloco de Rega de Brinches – Bloco B Intervenção Arqueológica em São Domingos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text:p>
          </table:table-cell>
          <table:table-cell table:number-columns-repeated="1015"/>
        </table:table-row>
        <table:table-row table:style-name="ro1">
          <table:table-cell office:value-type="string">
            <text:p>153_BRB_08_FGR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4. Pistas usadas: relatório, relatorio, relatório final, relatorio final, projecto, intervenção arqueológica, intervencao arqueologica, escavação, escavacao, sondagem, sondagens.</text:p>
          </table:table-cell>
          <table:table-cell office:value-type="string">
            <text:p>relatório, relatorio, relatório final, relatorio final, projecto, intervenção arqueológica, intervencao arqueologica, escavação, escavacao, sondagem, sondagens</text:p>
          </table:table-cell>
          <table:table-cell office:value-type="string">
            <text:p>Assinatura PDF</text:p>
          </table:table-cell>
          <table:table-cell office:value-type="string">
            <text:p>D:20100708235642+01'00' Sergio Gomes Adobe Acrobat Pro Extended 9.0.0 Adobe Acrobat Pro Extended 9.0.0 D:20100709111349+01'00' Relatório Final Beja 2010 Bloco de Rega de Brinches – Bloco B Intervenção Arqueológica em Figueirinha (Pias) Bloco de Rega de Brinches – Bloco B Intervenção Arqueológica em Figueirinha (Pia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ANTROPOLOGIA Zélia Rodrigues TRABALHO DE GABINETE Relatório Lídia Baptista, Mestre em Arqueologia Sérgio Gomes, Mestre em Arqueologia Desenho gráfico Rodry Mendonça Tratamento de espólio Francisco Barros; Nelson Vale; Cláudio Jorge; João Molha Conservação...</text:p>
          </table:table-cell>
          <table:table-cell table:number-columns-repeated="1015"/>
        </table:table-row>
        <table:table-row table:style-name="ro1">
          <table:table-cell office:value-type="string">
            <text:p>153_BRB_08_HM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61451+01'00' lilianabarbosa Adobe Acrobat 8.2 Combine Files Adobe Acrobat 8.2 D:20100622161636+01'00' 153 BRB 08 HM REL FINAL Relatório Final Beja 2010 Bloco de Rega de Brinches – Bloco B Intervenção Arqueológica em Horta da Mata (Brinches) Bloco de Rega de Brinches – Bloco B Intervenção Arqueológica em Horta da Mata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aur...</text:p>
          </table:table-cell>
          <table:table-cell table:number-columns-repeated="1015"/>
        </table:table-row>
        <table:table-row table:style-name="ro1">
          <table:table-cell office:value-type="string">
            <text:p>153_BRB_08_LM3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61932+01'00' lilianabarbosa Adobe Acrobat 8.2 Combine Files Adobe Acrobat 8.2 D:20100622162107+01'00' 153 BRB 08 LM3 REL FINAL Relatório Final Beja 2010 Bloco de Rega de Brinches – Bloco B Intervenção Arqueológica em Lameiral 3 (Brinches) Bloco de Rega de Brinches – Bloco B Intervenção Arqueológica em Lameiral 3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auro Ana...</text:p>
          </table:table-cell>
          <table:table-cell table:number-columns-repeated="1015"/>
        </table:table-row>
        <table:table-row table:style-name="ro1">
          <table:table-cell office:value-type="string">
            <text:p>153_BRB_08_MAZ2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55134+01'00' lilianabarbosa PScript5.dll Version 5.2 Acrobat Distiller 8.2.2 (Windows) D:20100622155134+01'00' 153 BRB 08 MAZ2 REL FINAL Relatório Final Beja 2010 Bloco de Rega de Brinches – Bloco B Intervenção Arqueológica em Mina das Azenhas 2 (Brinches) Bloco de Rega de Brinches – Bloco B Intervenção Arqueológica em Mina das Azenhas 2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text:p>
          </table:table-cell>
          <table:table-cell table:number-columns-repeated="1015"/>
        </table:table-row>
        <table:table-row table:style-name="ro1">
          <table:table-cell office:value-type="string">
            <text:p>153_BRB_08_MB1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9.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4247+01'00' sergiogomes PScript5.dll Version 5.2 Acrobat Distiller 8.2.2 (Windows) D:20100623142214+01'00' 153 BRB 08 MB1 REL FINAL Relatório Final Beja 2010 Bloco de Rega de Brinches – Bloco B Intervenção Arqueológica em São Bartolomeu 1 (Brinches) Bloco de Rega de Brinches – Bloco B Intervenção Arqueológica em São Bartolomeu 1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text:p>
          </table:table-cell>
          <table:table-cell table:number-columns-repeated="1015"/>
        </table:table-row>
        <table:table-row table:style-name="ro1">
          <table:table-cell office:value-type="string">
            <text:p>153_BRB_08_MGC2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1.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4351+01'00' sergiogomes PScript5.dll Version 5.2 Acrobat Distiller 8.2.2 (Windows) D:20100623142610+01'00' 153 BRB 08 MGC2 REL FINAL Relatório Final Beja 2010 Bloco de Rega de Brinches – Bloco B Intervenção Arqueológica em Monte do Gato de Cima 2 (Brinches) Bloco de Rega de Brinches – Bloco B Intervenção Arqueológica em Monte do Gato de Cima 2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text:p>
          </table:table-cell>
          <table:table-cell table:number-columns-repeated="1015"/>
        </table:table-row>
        <table:table-row table:style-name="ro1">
          <table:table-cell office:value-type="string">
            <text:p>153_BRB_08_MGC3 REL 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4505+01'00' sergiogomes PScript5.dll Version 5.2 Acrobat Distiller 8.2.2 (Windows) D:20100623143446+01'00' 153 BRB 08 MGC3 REL FINAL Relatório Final Beja 2010 Bloco de Rega de Brinches – Bloco B Intervenção Arqueológica em Monte do Gato de Cima 3 (Brinches) Bloco de Rega de Brinches – Bloco B Intervenção Arqueológica em Monte do Gato de Cima 3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text:p>
          </table:table-cell>
          <table:table-cell table:number-columns-repeated="1015"/>
        </table:table-row>
        <table:table-row table:style-name="ro1">
          <table:table-cell office:value-type="string">
            <text:p>153_BRB_08_OALT2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5.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4821+01'00' sergiogomes PScript5.dll Version 5.2 Acrobat Distiller 8.2.2 (Windows) D:20100623143800+01'00' 153 BRB 08 OALT2 REL FINAL Relatório Final Beja 2010 Bloco de Rega de Brinches – Bloco B Intervenção Arqueológica em Outeiro Alto 2 (Brinches) Bloco de Rega de Brinches – Bloco B Intervenção Arqueológica em Outeiro Alto 2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text:p>
          </table:table-cell>
          <table:table-cell table:number-columns-repeated="1015"/>
        </table:table-row>
        <table:table-row table:style-name="ro1">
          <table:table-cell office:value-type="string">
            <text:p>153_BRB_08_OR2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4919+01'00' sergiogomes PScript5.dll Version 5.2 Acrobat Distiller 8.2.2 (Windows) D:20100623144105+01'00' 153 BRB 08 OR2 REL FINAL Relatório Final Beja 2010 Bloco de Rega de Brinches – Bloco B Intervenção Arqueológica em Ourém 2 (Brinches) Bloco de Rega de Brinches – Bloco B Intervenção Arqueológica em Ourém 2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auro Ana...</text:p>
          </table:table-cell>
          <table:table-cell table:number-columns-repeated="1015"/>
        </table:table-row>
        <table:table-row table:style-name="ro1">
          <table:table-cell office:value-type="string">
            <text:p>153_BRB_08_OR4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5104+01'00' sergiogomes PScript5.dll Version 5.2 Acrobat Distiller 8.2.2 (Windows) D:20100623144431+01'00' 153 BRB 08 OR4 REL FINAL Relatório Final Beja 2010 Bloco de Rega de Brinches – Bloco B Intervenção Arqueológica em Ourém 4 (Brinches) Bloco de Rega de Brinches – Bloco B Intervenção Arqueológica em Ourém 4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auro Ana...</text:p>
          </table:table-cell>
          <table:table-cell table:number-columns-repeated="1015"/>
        </table:table-row>
        <table:table-row table:style-name="ro1">
          <table:table-cell office:value-type="string">
            <text:p>153_BRB_08_PNH1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1.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622185149+01'00' sergiogomes PScript5.dll Version 5.2 Acrobat Distiller 8.2.2 (Windows) D:20100623145339+01'00' 153 BRB 08 PNH1 REL FINAL Relatório Final Beja 2010 Bloco de Rega de Brinches – Bloco B Intervenção Arqueológica em Pinheiro 1 (Brinches) Bloco de Rega de Brinches – Bloco B Intervenção Arqueológica em Pinheiro 1 (Brinches) FICHA TÉCNICA COORDENAÇÃO GERAL Ricardo Teixeira, Arqueólogo, Mestre em arqueologia Vítor Fonseca, Arqueólogo COORDENAÇÃO DE PROJECTO Lídia Baptista, Mestre em arqueologia TRABALHO DE CAMPO Direcção Lídia Baptista, Mestre em arqueologia Helena Marçal Arqueólogos Bárbara Carvalho Sara Luz Assistentes de arqueólogo André Saraiva Eduardo Falcão Francisco Barros Nelson Vale Operários de arqueologia Alexandre Pinto Pedro Pinto TRABALHO DE GABINETE Relatório Lídia Baptista, Mestre em Arqueologia Sérgio Gomes, Mestre em Arqueologia Desenho gráfico Rodry Mendonça Tratamento de espólio Francisco Barros Nelson Vale Cláudio Jorge João Molha Conservação e resta...</text:p>
          </table:table-cell>
          <table:table-cell table:number-columns-repeated="1015"/>
        </table:table-row>
        <table:table-row table:style-name="ro1">
          <table:table-cell office:value-type="string">
            <text:p>154_Ponte_Meined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projecto, acompanhamento arqueológico, acompanhamento arqueologico, prospecção, prospeccao.</text:p>
          </table:table-cell>
          <table:table-cell office:value-type="string">
            <text:p>relatório, relatorio, projecto, acompanhamento arqueológico, acompanhamento arqueologico, prospecção, prospeccao</text:p>
          </table:table-cell>
          <table:table-cell office:value-type="string">
            <text:p>Assinatura PDF</text:p>
          </table:table-cell>
          <table:table-cell office:value-type="string">
            <text:p>D:20081127163442Z Writer Adobe Acrobat 8.1 D:20081127163718Z RELATÓRIO LOUSADA - 2008 CARACTERIZAÇÃO DA SITUAÇÃO DE REFERÊNCIA E ACOMPANHAMENTO ARQUEOLÓGICO PROJECTO DE REABILITAÇÃO E ALARGAMENTO DA PONTE DE MEINEDO SOBRE O RIO SOUSA Caracterização da Situação de Referência / Relatório de Acompanhamento Arqueológico - Ponte de Meinedo Índice 1.Introdução............................................................................................................ 3 2.Trabalho de Campo.................................................................................................. 4 2.1.Metodologia de Estudo....................................................................................... 4 2.2.Caracterização da Situação de Referência................................................................ 6 2.2.1.Caracterização da Área Envolvente.................................................................. 6 2.2.2.Área de Incidência Directa..................................................</text:p>
          </table:table-cell>
          <table:table-cell table:number-columns-repeated="1015"/>
        </table:table-row>
        <table:table-row table:style-name="ro1">
          <table:table-cell office:value-type="string">
            <text:p>157_SAC130_09_IA_CentroSaudeBatal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GPL Ghostscript 9.14 D:20160930123835+01'00' D:20160930123835+01'00' Igespar PDF24 Creator FichaSitio RELATÓRIO FINAL Intervenção Arqueológica Centro de Saúde da Batalha, Rua Saraiva de Carvalho, nº 130 Porto 2009 Copyright © arqueologia e património Matosinhos 2016 SAC 130.09 Intervenção Arqueológica SAC 130. 09 FICHA TÉCNICA Ricardo Teixeira &amp; Vítor Fonseca, Arqueologia Lda. PROJECTO 157 Coordenação geral Ricardo Teixeira, arqueólogo, mestre em arqueologia Vítor Fonseca, arqueólogo Coordenação de projeto Jorge Fonseca, arqueólogo Mafalda Capela, arqueóloga Teresa Silva, arqueóloga, pós-graduada em museologia TRABALHO DE CAMPO Direção Jorge Fonseca Assistentes de arqueólogo Bebiana Mota Ricardo Mota Operários de arqueologia Alexandre Pinto TRABALHO DE GABINETE Relatório Jorge Fonseca Desenho gráfico Rui Oliveira Tratamento de espólio Anabela Rodrigues Pedro Almeida Teresa Gonçalves Fotografia de espólio Pedro Maia, técnico superior de gestão do património Apoio técnico e revisão de te...</text:p>
          </table:table-cell>
          <table:table-cell table:number-columns-repeated="1015"/>
        </table:table-row>
        <table:table-row table:style-name="ro1">
          <table:table-cell office:value-type="string">
            <text:p>158_IA_V_V_M_09_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1.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090306172043Z D:20090306172748Z RELATÓRIO PORTO - 2009 INTERVENÇÃO ARQUEOLÓGICA NO COMPLEXO COMERCIAL VIVACI MAIA VVM .09 Intervenção Arqueológica no Complexo Comercial Vivaci Maia FICHA TÉCNICA COORDENAÇÃO GERAL Ricardo Teixeira, Arqueólogo, Mestre em arqueologia Vítor Fonseca, Arqueólogo COORDENAÇÃO DE PROJECTO Ricardo Teixeira TRABALHO DE CAMPO Direcção Bárbara Carvalho, Arqueóloga Assistentes de arqueólogo André Saraiva Nelson Vale Trabalhadores Indiferenciados Alexandre Pinto Trabalho de Topografia António Feliciano Topografia Lda. TRABALHO DE GABINETE Relatório Bárbara Carvalho Desenho Gráfico Rodry Mendonça Tratamento de Espólio Ricardo Mota Fotografia de Espólio Pedro Maia Revisão Teresa Silva DATA 16 de Fevereiro de 2009 Relatório Final Fevereiro de 2009 Página 1 de 17 Intervenção Arqueológica no Complexo Comercial Vivaci Maia Índice 1. Introdução................................................................................................................ 3 2. Situação d...</text:p>
          </table:table-cell>
          <table:table-cell table:number-columns-repeated="1015"/>
        </table:table-row>
        <table:table-row table:style-name="ro1">
          <table:table-cell office:value-type="string">
            <text:p>158_IA_V_V_M_09_Acom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cto, intervenção arqueológica, intervencao arqueologica, acompanhamento arqueológico, acompanhamento arqueologico, trabalhos arqueológicos, trabalhos arqueologicos, património arqueológico.</text:p>
          </table:table-cell>
          <table:table-cell office:value-type="string">
            <text:p>relatório, relatorio, relatório final, relatorio final, projecto, intervenção arqueológica, intervencao arqueologica, acompanhamento arqueológico, acompanhamento arqueologico, trabalhos arqueológicos, trabalhos arqueologicos, património arqueológico</text:p>
          </table:table-cell>
          <table:table-cell office:value-type="string">
            <text:p>Assinatura PDF</text:p>
          </table:table-cell>
          <table:table-cell office:value-type="string">
            <text:p>D:20091026144907Z D:20091026145503Z RELATÓRIO DE ACOMPANHAMENTO MAIA - 2009 ACOMPANHAMENTO ARQUEOLÓGICO NO COMPLEXO COMERCIAL VIVACI MAIA Acompanhamento Arqueológico no Complexo Comercial Vivaci Maia FICHA TÉCNICA COORDENAÇÃO GERAL Ricardo Teixeira Vítor Fonseca COORDENAÇÃO DE PROJECTO Ricardo Teixeira TRABALHO DE CAMPO Bárbara Carvalho Liliana Barbosa Graça Pereira TRABALHO DE GABINETE Descrição e interpretação da intervenção arqueológica Graça Pereira Desenho gráfico Ana Paulo Revisão de texto DATA Teresa Silva 26 de Outubro de 2009 Relatório Final Outubro de 2009 Página 1 de 17 Acompanhamento Arqueológico no Complexo Comercial Vivaci Maia Índice 1.Introdução..................................................................................................................3 1.1.Localização...........................................................................................................4 2.Metodologia.................................................................................</text:p>
          </table:table-cell>
          <table:table-cell table:number-columns-repeated="1015"/>
        </table:table-row>
        <table:table-row table:style-name="ro1">
          <table:table-cell office:value-type="string">
            <text:p>159_IA_S_PDE_90_0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intervenção arqueológica, intervencao arqueologica, acompanhamento arqueológico, acompanhamento arqueologico.</text:p>
          </table:table-cell>
          <table:table-cell office:value-type="string">
            <text:p>relatório, relatorio, relatório final, relatorio final, intervenção arqueológica, intervencao arqueologica, acompanhamento arqueológico, acompanhamento arqueologico</text:p>
          </table:table-cell>
          <table:table-cell office:value-type="string">
            <text:p>Assinatura PDF</text:p>
          </table:table-cell>
          <table:table-cell office:value-type="string">
            <text:p>D:20091019123127+01'00' D:20091019123229+01'00' RELATÓRIO BRAGANÇA 2009 ACOMPANHAMENTO ARQUEOLÓGICO RUA SENHORA DA PIEDADE, Nº 90/92 SANTA MARIA - BRAGANÇA Intervenção Arqueológica na Rua Senhora da Piedade, nº 90/92, Bragança FICHA TÉCNICA COORDENAÇÃO GERAL Ricardo Teixeira, Mestre em Arqueologia Vítor Fonseca, Arqueólogo TRABALHO DE CAMPO DIRECÇÃO Bárbara Carvalho, Arqueóloga TRABALHO DE GABINETE Relatório da intervenção arqueologica Bárbara Carvalho, Arqueóloga Desenho Gráfico Rodry Mendonça Revisão Teresa Silva, Arqueóloga, Pós-graduada em Museologia DATA 12 de Outubro de 2009 Relatório Final Outubro de 2009 Página 1 de 14 Intervenção Arqueológica na Rua Senhora da Piedade, nº 90/92, Bragança Índice 1.Introdução..............................................................................................................3 2.localização.............................................................................................................4 3.Enquadramento da intervenção arqueoló...</text:p>
          </table:table-cell>
          <table:table-cell table:number-columns-repeated="1015"/>
        </table:table-row>
        <table:table-row table:style-name="ro1">
          <table:table-cell office:value-type="string">
            <text:p>160_CTO_09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7. Pistas usadas: relatório, relatorio, projecto, intervenção arqueológica, intervencao arqueologica, acompanhamento arqueológico, acompanhamento arqueologico, escavação, escavacao.</text:p>
          </table:table-cell>
          <table:table-cell office:value-type="string">
            <text:p>relatório, relatorio, projecto, intervenção arqueológica, intervencao arqueologica, acompanhamento arqueológico, acompanhamento arqueologico, escavação, escavacao</text:p>
          </table:table-cell>
          <table:table-cell office:value-type="string">
            <text:p>Assinatura PDF</text:p>
          </table:table-cell>
          <table:table-cell office:value-type="string">
            <text:p>D:20100316173558Z gracapereira PScript5.dll Version 5.2 Acrobat Distiller 8.1.0 (Windows) D:20100316174406Z 160 rel ouro 2010 03 16 Relatório Preliminar Porto 2010 Intervenção Arqueológica na Central Termoeléctrica do Ouro Intervenção Arqueológica na Central Termoeléctrica do Ouro FICHA TÉCNICA COORDENAÇÃO GERAL Ricardo Teixeira, Arqueólogo, Mestre em arqueologia Vítor Fonseca, Arqueólogo COORDENAÇÃO DE PROJECTO Jorge Fonseca, arqueólogo TRABALHO DE CAMPO ESCAVAÇÃO ARQUEOLÓGICA Consultadoria científica Maria da Luz Sampaio, Historiadora, especialista em Arqueologia Industrial, mestre em Estudos Locais e Regionais Direcção Graça Pereira, arqueóloga Helena Marçal, arqueóloga Arqueólogos Francisco Raimundo Ricardo Oliveira Carlos Barbosa Assistentes de arqueólogo Bebiana Mota Lisdália Mota Ricardo Mota Operários de arqueologia Alexandre Pinto Pedro Pinto ACOMPANHAMENTO ARQUEOLÓGICO Jorge Fonseca TRABALHO DE GABINETE Relatório Helena Marçal Jorge Fonseca Maria da Luz Sampaio Paulo Pestana...</text:p>
          </table:table-cell>
          <table:table-cell table:number-columns-repeated="1015"/>
        </table:table-row>
        <table:table-row table:style-name="ro1">
          <table:table-cell office:value-type="string">
            <text:p>160_CTO_RTedif_est_prev.pdf</text:p>
          </table:table-cell>
          <table:table-cell office:value-type="string">
            <text:p>.pdf</text:p>
          </table:table-cell>
          <table:table-cell office:value-type="string">
            <text:p>Documento PDF</text:p>
          </table:table-cell>
          <table:table-cell office:value-type="string">
            <text:p>Registo Tipológico</text:p>
          </table:table-cell>
          <table:table-cell office:value-type="string">
            <text:p>Média</text:p>
          </table:table-cell>
          <table:table-cell office:value-type="string">
            <text:p>Documento PDF; o conteúdo aparenta corresponder a relatório de projeto / intervenção arqueológica / desenho / planta / cad. Foram analisadas as primeiras 4 página(s) de um total de 96. Pistas usadas: relatório, relatorio, projecto, desenho, levantamento.</text:p>
          </table:table-cell>
          <table:table-cell office:value-type="string">
            <text:p>relatório, relatorio, projecto, desenho, levantamento</text:p>
          </table:table-cell>
          <table:table-cell office:value-type="string">
            <text:p>Assinatura PDF</text:p>
          </table:table-cell>
          <table:table-cell office:value-type="string">
            <text:p>D:20100524142903+01'00' Paulo Sousa PScript5.dll Version 5.2.2 Adobe Acrobat 8.1 D:20100524142903+01'00' 00_capa capa (1) Registo Tipológico – Central do Gás e Electricidade do Ouro – Porto R e l a t ó r i o Abril de 2010 1. INTRODUÇÃO 1.1. ENQUADRAMENTO 1.2. METODOLOGIA E APRESENTAÇÃO DO TRABALHO Registo Tipológico – Central do Gás e Electricidade do Ouro – Porto R e l a t ó r i o Abril de 2010 1. INTRODUÇÃO 1.1. ENQUADRAMENTO O Lugar do Ouro pertencente à freguesia de Lordelo desde tempos remotos está ligado às actividades proporcionadas pela sua situação estratégica, junto ao Rio Douro e Foz próxima, e provável lugar da passagem da estrada romana que seguia ao longo do litoral lusitano. Estas condições propiciaram o desenvolvimento da pesca, construção naval e ofícios associados, e uma vocação comercial específica. Em meados do sec. XIX essas condições geográficas permitiram a instalação de várias estruturas industriais que mudaram radicalmente a fisionomia da freguesia de Lordelo d...</text:p>
          </table:table-cell>
          <table:table-cell table:number-columns-repeated="1015"/>
        </table:table-row>
        <table:table-row table:style-name="ro1">
          <table:table-cell office:value-type="string">
            <text:p>160_IA_CTO0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19. Pistas usadas: relatório, relatorio, relatório final, relatorio final, projeto, projecto, intervenção arqueológica, intervencao arqueologica, acompanhamento arqueológico, acompanhamento arqueologico, sondagens.</text:p>
          </table:table-cell>
          <table:table-cell office:value-type="string">
            <text:p>relatório, relatorio, relatório final, relatorio final, projeto, projecto, intervenção arqueológica, intervencao arqueologica, acompanhamento arqueológico, acompanhamento arqueologico, sondagens</text:p>
          </table:table-cell>
          <table:table-cell office:value-type="string">
            <text:p>Assinatura PDF</text:p>
          </table:table-cell>
          <table:table-cell office:value-type="string">
            <text:p>D:20130919144027+01'00' lilianabarbosa PScript5.dll Version 5.2.2 Acrobat Distiller 8.1.0 (Windows) D:20131011114824+01'00' 160 relat final RELATÓRIO FINAL Intervenção Arqueológica Central Termoelétrica do Ouro Porto 2012 Copyright © arqueologia e património Matosinhos 2013 Intervenção Arqueológica na Central Termoelétrica do Ouro FICHA TÉCNICA Ricardo Teixeira &amp; Vítor Fonseca, Arqueologia Lda. PROJECTO 160 Coordenação geral Ricardo Teixeira, arqueólogo, mestre em arqueologia Vítor Fonseca, arqueólogo Coordenação de projeto Jorge Fonseca, arqueólogo Trabalho de Campo Acompanhamento Arqueológico Direção Jorge Fonseca, arqueólogo Helena Marçal, arqueóloga Graça Pereira, arqueóloga Arqueólogos Carlos Barbosa, arqueólogo Assistentes de arqueólogo Lisdália Mota Sondagens arqueológicas Consultadoria Científica Maria da Luz Sampaio, historiadora, especialista em Arqueologia Industrial, Mestre em Estudos Locais e Regionais Pesquisa Bibliográfica e Documental Maria da Luz Sampaio Helena Marçal...</text:p>
          </table:table-cell>
          <table:table-cell table:number-columns-repeated="1015"/>
        </table:table-row>
        <table:table-row table:style-name="ro1">
          <table:table-cell office:value-type="string">
            <text:p>160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7. Pistas usadas: relatório, relatorio, projecto, intervenção arqueológica, intervencao arqueologica, acompanhamento arqueológico, acompanhamento arqueologico, escavação, escavacao.</text:p>
          </table:table-cell>
          <table:table-cell office:value-type="string">
            <text:p>relatório, relatorio, projecto, intervenção arqueológica, intervencao arqueologica, acompanhamento arqueológico, acompanhamento arqueologico, escavação, escavacao</text:p>
          </table:table-cell>
          <table:table-cell office:value-type="string">
            <text:p>Assinatura PDF</text:p>
          </table:table-cell>
          <table:table-cell office:value-type="string">
            <text:p>D:20100316173558Z gracapereira PScript5.dll Version 5.2 Acrobat Distiller 8.1.0 (Windows) D:20100316174406Z 160 rel ouro 2010 03 16 Relatório Preliminar Porto 2010 Intervenção Arqueológica na Central Termoeléctrica do Ouro Intervenção Arqueológica na Central Termoeléctrica do Ouro FICHA TÉCNICA COORDENAÇÃO GERAL Ricardo Teixeira, Arqueólogo, Mestre em arqueologia Vítor Fonseca, Arqueólogo COORDENAÇÃO DE PROJECTO Jorge Fonseca, arqueólogo TRABALHO DE CAMPO ESCAVAÇÃO ARQUEOLÓGICA Consultadoria científica Maria da Luz Sampaio, Historiadora, especialista em Arqueologia Industrial, mestre em Estudos Locais e Regionais Direcção Graça Pereira, arqueóloga Helena Marçal, arqueóloga Arqueólogos Francisco Raimundo Ricardo Oliveira Carlos Barbosa Assistentes de arqueólogo Bebiana Mota Lisdália Mota Ricardo Mota Operários de arqueologia Alexandre Pinto Pedro Pinto ACOMPANHAMENTO ARQUEOLÓGICO Jorge Fonseca TRABALHO DE GABINETE Relatório Helena Marçal Jorge Fonseca Maria da Luz Sampaio Paulo Pestana...</text:p>
          </table:table-cell>
          <table:table-cell table:number-columns-repeated="1015"/>
        </table:table-row>
        <table:table-row table:style-name="ro1">
          <table:table-cell office:value-type="string">
            <text:p>161_EIA_Leroy_Merlin_Maia.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Alta</text:p>
          </table:table-cell>
          <table:table-cell office:value-type="string">
            <text:p>Documento PDF; o conteúdo aparenta corresponder a relatório de projeto / intervenção arqueológica / desenho / planta / cad. Foram analisadas as primeiras 4 página(s) de um total de 24. Pistas usadas: relatório, relatorio, projecto, prospecção, prospeccao, planta, desenho, implantação, implantacao.</text:p>
          </table:table-cell>
          <table:table-cell office:value-type="string">
            <text:p>relatório, relatorio, projecto, prospecção, prospeccao, planta, desenho, implantação, implantacao</text:p>
          </table:table-cell>
          <table:table-cell office:value-type="string">
            <text:p>Assinatura PDF</text:p>
          </table:table-cell>
          <table:table-cell office:value-type="string">
            <text:p>D:20090324150853Z Adobe Acrobat 8.1 Combine Files Adobe Acrobat 8.1 D:20090324151052Z RELATÓRIO MAIA - 2009 ESTUDO DE IMPACTE AMBIENTAL DESCRITOR PATRIMÓNIO CULTURAL LEROY MERLIN EIA Leroy Merlin Maia - Descritor Património Cultural FICHA TÉCNICA COORDENAÇÃO GERAL Ricardo Teixeira e Vítor Fonseca COORDENAÇÃO DE PROJECTO Ricardo Teixeira TRABALHO DE CAMPO Direcção do trabalho de campo Liliana Barbosa Prospecção Liliana Barbosa e Bibiana Mota Fotografia Liliana Barbosa TRABALHO DE GABINETE Pesquisa bibliográfica Liliana Barbosa Relatório Liliana Barbosa Desenho gráfico Ana Paulo Revisão Ricardo Teixeira DATA 24 de Março de 2009 Março de 2009 Página 1 de 17 EIA Leroy Merlin Maia - Descritor Património Cultural 1. INTRODUÇÃO O presente estudo foi realizado por solicitação da firma C.P.A. - Consultadoria e Projectos do Ambiente, Lda., inserindo-se no Estudo de Impacte Ambiental do projecto de construção da Loja Leroy Merlin Maia, com localização prevista para a freguesia da Maia, concelho d...</text:p>
          </table:table-cell>
          <table:table-cell table:number-columns-repeated="1015"/>
        </table:table-row>
        <table:table-row table:style-name="ro1">
          <table:table-cell office:value-type="string">
            <text:p>163_IA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projecto, intervenção arqueológica, intervencao arqueologica, acompanhamento arqueológico, acompanhamento arqueologico, sondagem, sondagens, trabalhos arqueológicos, trabalhos arqueologicos.</text:p>
          </table:table-cell>
          <table:table-cell office:value-type="string">
            <text:p>relatório, relatorio, projecto, intervenção arqueológica, intervencao arqueologica, acompanhamento arqueológico, acompanhamento arqueologico, sondagem, sondagens, trabalhos arqueológicos, trabalhos arqueologicos</text:p>
          </table:table-cell>
          <table:table-cell office:value-type="string">
            <text:p>Assinatura PDF</text:p>
          </table:table-cell>
          <table:table-cell office:value-type="string">
            <text:p>D:20091209155747Z Writer OpenOffice.org 3.1 D:20091209171901Z RELATÓRIO PRELIMINAR PORTO - 2009 INTERVENÇÃO ARQUEOLÓGICA QUARTEIRÃO DA BAINHARIA SÉ BAI.09 Quarteirão da Bainharia – Sé – BAI. 09 Índice 1.Preâmbulo................................................................................................................. 3 2.Sondagens arqueológicas................................................................................................ 4 Sondagem 01 – Parcela 36 – Rua de S. Sebastião................................................................... 5 Sondagem 02 – Parcela 36 – Rua de S. Sebastião................................................................... 6 Sondagem 03 – Parcela 36 – Rua de S. Sebastião................................................................... 7 Sondagem 04 – Parcela 36 – Rua de S. Sebastião................................................................... 8 Sondagem 05 – Parcela 36 – Rua de S. Sebastião.........................................</text:p>
          </table:table-cell>
          <table:table-cell table:number-columns-repeated="1015"/>
        </table:table-row>
        <table:table-row table:style-name="ro1">
          <table:table-cell office:value-type="string">
            <text:p>163_RT_EDIF_BAI 09.pdf</text:p>
          </table:table-cell>
          <table:table-cell office:value-type="string">
            <text:p>.pdf</text:p>
          </table:table-cell>
          <table:table-cell office:value-type="string">
            <text:p>Documento PDF</text:p>
          </table:table-cell>
          <table:table-cell office:value-type="string">
            <text:p>Registo Tipológico</text:p>
          </table:table-cell>
          <table:table-cell office:value-type="string">
            <text:p>Média</text:p>
          </table:table-cell>
          <table:table-cell office:value-type="string">
            <text:p>Documento PDF; o conteúdo aparenta corresponder a tabela / base de dados / relatório de projeto / intervenção arqueológica. Foram analisadas as primeiras 4 página(s) de um total de 128. Pistas usadas: registo, registos, estado, relatório, relatorio.</text:p>
          </table:table-cell>
          <table:table-cell office:value-type="string">
            <text:p>registo, registos, estado, relatório, relatorio</text:p>
          </table:table-cell>
          <table:table-cell office:value-type="string">
            <text:p>Assinatura PDF</text:p>
          </table:table-cell>
          <table:table-cell office:value-type="string">
            <text:p>D:20130704112727+01'00' D:20130704124841+01'00' RELATÓRIO PRELIMINAR NOVEMBRO - 2009 REGISTO TIPOLÓGICO DE 22 PARCELAS DO QUARTEIRÃO DA BANHARIA - - SÉ Registo Tipológico de 22 parcelas do Quarteirão da Bainharia – Sé R e l a t ó r i o P r e l i m i n a r Novembro de 2009 ÍNDICE INTRODUÇÃO ENQUADRAMENTO URBANO EVOLUÇÃO CARTOGRÁFICA ANÁLISE DE CONJUNTO – MATERIAIS ANÁLISE DAS PARCELAS Ficha de parcela / Caracterização construtiva Levantamento arquitectónico Levantamento Fotográfico LICENÇAS DE OBRAS – FICHAS EQUIPA TÉCNICA Registo Tipológico de 22 parcelas do Quarteirão da Bainharia – Sé R e l a t ó r i o P r e l i m i n a r Novembro de 2009 INTRODUÇÃO O Registo Tipológico do edificado tem como objectivo principal uma análise crítica do tecido edificado, segundo critérios que evidenciem a qualidade arquitectónica e tipológica de todas as vertentes da arquitectura. Trata-se de um registo selectivo, recorrendo ao desenho de plantas, cortes e alçados e a esboços explicativos dos pormenores...</text:p>
          </table:table-cell>
          <table:table-cell table:number-columns-repeated="1015"/>
        </table:table-row>
        <table:table-row table:style-name="ro1">
          <table:table-cell office:value-type="string">
            <text:p>164_EIA_FAIA_Parque_emp.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Alta</text:p>
          </table:table-cell>
          <table:table-cell office:value-type="string">
            <text:p>Documento PDF; o conteúdo aparenta corresponder a relatório de projeto / intervenção arqueológica / desenho / planta / cad. Foram analisadas as primeiras 4 página(s) de um total de 44. Pistas usadas: relatório, relatorio, projecto, prospecção, prospeccao, planta, desenho, implantação, implantacao.</text:p>
          </table:table-cell>
          <table:table-cell office:value-type="string">
            <text:p>relatório, relatorio, projecto, prospecção, prospeccao, planta, desenho, implantação, implantacao</text:p>
          </table:table-cell>
          <table:table-cell office:value-type="string">
            <text:p>Assinatura PDF</text:p>
          </table:table-cell>
          <table:table-cell office:value-type="string">
            <text:p>D:20090318155741Z Adobe Acrobat 8.1 Combine Files Adobe Acrobat 8.1 D:20090318155946Z RELATÓRIO GAIA - 2009 ESTUDO DE IMPACTE AMBIENTAL DESCRITOR PATRIMÓNIO CULTURAL PARQUE EMPRESARIAL DE S. FÉLIX DA MARINHA E.I.A. Parque Empresarial de S. Félix da Marinha - Descritor Património Cultural Índice 1.Introdução................................................................................................................. 3 2.Metodologia do Estudo................................................................................................... 6 3.Caracterização da Situação de Referência e Avaliação Patrimonial.............................................. 8 3.1.Condições de Execução do Trabalho de Campo............................................................... 8 3.2.Caracterização da Situação de Referência..................................................................... 9 3.2.1.Caracterização da Área Envolvente........................................................................</text:p>
          </table:table-cell>
          <table:table-cell table:number-columns-repeated="1015"/>
        </table:table-row>
        <table:table-row table:style-name="ro1">
          <table:table-cell office:value-type="string">
            <text:p>165_REL_lagos_C&amp;R.pdf</text:p>
          </table:table-cell>
          <table:table-cell office:value-type="string">
            <text:p>.pdf</text:p>
          </table:table-cell>
          <table:table-cell office:value-type="string">
            <text:p>Documento PDF</text:p>
          </table:table-cell>
          <table:table-cell office:value-type="string">
            <text:p>Plano de Conservação e Restauro</text:p>
          </table:table-cell>
          <table:table-cell office:value-type="string">
            <text:p>Média</text:p>
          </table:table-cell>
          <table:table-cell office:value-type="string">
            <text:p>Documento PDF; o conteúdo aparenta corresponder a relatório de projeto / intervenção arqueológica / fotografia / registo fotográfico. Foram analisadas as primeiras 4 página(s) de um total de 22. Pistas usadas: projecto, intervenção arqueológica, intervencao arqueologica, câmara, camara.</text:p>
          </table:table-cell>
          <table:table-cell office:value-type="string">
            <text:p>projecto, intervenção arqueológica, intervencao arqueologica, câmara, camara</text:p>
          </table:table-cell>
          <table:table-cell office:value-type="string">
            <text:p>Assinatura PDF</text:p>
          </table:table-cell>
          <table:table-cell office:value-type="string">
            <text:p>LOCALIZAÇÃO RT&amp;VF - Utilizador Writer OpenOffice.org 2.0 D:20090303151109Z' Lg. Alexandre Sá Pinto, 22/44, Tras.– A1 4050-027 Porto Tel.:22 6079210/ Fax:22 6079214/ Telm.:93 4827203/4/5/ E-mail: arqueologia.patrimonio@gmail.com NIPC: 505 693 569 Sociedade por Quotas Matrícula 14 463 na 3ª secção da CRC do Porto Capital Social 25.000 € 1/22 PROJECTO DE REQUALIFICAÇÃO DA FRENTE RIBEIRINHA DE LAGOS – PROGRAMA POLIS PLANO DE CONSERVAÇÃO E RESTAURO DOS VESTÍGIOS DETECTADOS PELA INTERVENÇÃO ARQUEOLÓGICA 2/22 0. INTRODUÇÃO A apresentação do Plano de Conservação e Restauro (PCR) das estruturas arqueológicas postas a descoberto pelas intervenções efectuadas previamente e no decurso das obras de Requalificação da Frente Ribeirinha de Lagos, visa fornecer às entidades envolvidas (Câmara Municipal de Lagos, Direcção Regional de Cultura do Algarve e Equipa Projectista) elementos que permitam por em curso o Projecto de Valorização dos importantes achados. Nesse sentido, o PCR permite, desde já, pôr...</text:p>
          </table:table-cell>
          <table:table-cell table:number-columns-repeated="1015"/>
        </table:table-row>
        <table:table-row table:style-name="ro1">
          <table:table-cell office:value-type="string">
            <text:p>166_BRB_09_CTD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105111204Z Adobe Acrobat Pro Extended 9.0.0 D:20100105111204Z Adobe Acrobat Pro Extended 9.0.0 RELATÓRIO FINAL SERPA - 2009 BLOCO DE REGA DE BRINCHES (FASE PRÉVIA À OBRA) INTERVENÇÃO ARQUEOLÓGICA EM CONTENDINHA 1 (PIAS) BRB 09 CTD1 Intervenção Arqueológica em Contendinha 1 FICHA TÉCNICA COORDENAÇÃO GERAL Ricardo Teixeira, Arqueólogo, Mestre em arqueologia Vítor Fonseca, Arqueólogo COORDENAÇÃO DE PROJECTO Lídia Baptista, Mestre em arqueologia TRABALHO DE CAMPO Direcção Lídia Baptista Assistentes de arqueólogo André Saraiva Francisco Barros Nelson Vale TRABALHO DE GABINETE Relatório Lídia Baptista Desenho gráfico Lídia Baptista Topografia CLTopografia – Carlos Louzeiro DATA 30 de Dezembro de 2009 Relatório Final Dezembro de 2009 Página 1 de 1 Intervenção Arqueológica em Contendinha 1 ÍNDICE 1.Introdução.................................................................................................................................3 2.Intervenção Arqueológica...........................</text:p>
          </table:table-cell>
          <table:table-cell table:number-columns-repeated="1015"/>
        </table:table-row>
        <table:table-row table:style-name="ro1">
          <table:table-cell office:value-type="string">
            <text:p>166_BRB_09_PRR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104234320Z Adobe Acrobat Pro Extended 9.0.0 D:20100104234320Z Adobe Acrobat Pro Extended 9.0.0 RELATÓRIO FINAL SERPA - 2009 BLOCO DE REGA DE BRINCHES (FASE PRÉVIA À OBRA) INTERVENÇÃO ARQUEOLÓGICA EM PARREIRINHA 2 (PIAS) BRB 09 PRR2 Intervenção Arqueológica em Parreirinha 2 FICHA TÉCNICA COORDENAÇÃO GERAL Ricardo Teixeira, Arqueólogo, Mestre em arqueologia Vítor Fonseca, Arqueólogo COORDENAÇÃO DE PROJECTO Lídia Baptista, Mestre em arqueologia TRABALHO DE CAMPO Direcção Lídia Baptista Assistentes de arqueólogo André Saraiva Francisco Barros Nelson Vale TRABALHO DE GABINETE Relatório Lídia Baptista Desenho gráfico Lídia Baptista Topografia CLTopografia – Carlos Louzeiro DATA 30 de Dezembro de 2009 Relatório Final Dezembro de 2009 Página 1 de 8 Intervenção Arqueológica em Parreirinha 2 ÍNDICE 1.Introdução.................................................................................................................................3 2.Intervenção Arqueológica...........................</text:p>
          </table:table-cell>
          <table:table-cell table:number-columns-repeated="1015"/>
        </table:table-row>
        <table:table-row table:style-name="ro1">
          <table:table-cell office:value-type="string">
            <text:p>167_EIA_Bemposta_adit.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projecto, prospecção, prospeccao, património arqueológico, patrimonio arqueologico.</text:p>
          </table:table-cell>
          <table:table-cell office:value-type="string">
            <text:p>relatório, relatorio, projecto, prospecção, prospeccao, património arqueológico, patrimonio arqueologico</text:p>
          </table:table-cell>
          <table:table-cell office:value-type="string">
            <text:p>Assinatura PDF</text:p>
          </table:table-cell>
          <table:table-cell office:value-type="string">
            <text:p>D:20090415100955+01'00' liliana barbosa Writer Adobe Acrobat 8.1 D:20090417165345+01'00' RELATÓRIO BEMPOSTA - 2009 ADITAMENTO AO ESTUDO DE IMPACTE AMBIENTAL PROJECTO DE REFORÇO DE POTÊNCIA DA BARRAGEM DE BEMPOSTA DESCRITOR PATRIMÓNIO ARQUEOLÓGICO E ARQUITECTÓNICO Aditamento ao EIA do Reforço de Potência do Aproveitamento Hidroeléctrico da Bemposta Índice 1.Introdução................................................................................................................. 3 1.1.Informações sobre o Projecto.................................................................................... 4 2.Localização da Área em Estudo........................................................................................ 5 3.Metodologia............................................................................................................... 6 4.Trabalho de Campo...................................................................................................... 7 4.1.Condições de Execuç...</text:p>
          </table:table-cell>
          <table:table-cell table:number-columns-repeated="1015"/>
        </table:table-row>
        <table:table-row table:style-name="ro1">
          <table:table-cell office:value-type="string">
            <text:p>169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170_IA_REL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6. Pistas usadas: relatório, relatorio, projecto, intervenção arqueológica, intervencao arqueologica, acompanhamento arqueológico, acompanhamento arqueologico, sondagem, sondagens, trabalhos arqueológicos, trabalhos arqueologicos.</text:p>
          </table:table-cell>
          <table:table-cell office:value-type="string">
            <text:p>relatório, relatorio, projecto, intervenção arqueológica, intervencao arqueologica, acompanhamento arqueológico, acompanhamento arqueologico, sondagem, sondagens, trabalhos arqueológicos, trabalhos arqueologicos</text:p>
          </table:table-cell>
          <table:table-cell office:value-type="string">
            <text:p>Assinatura PDF</text:p>
          </table:table-cell>
          <table:table-cell office:value-type="string">
            <text:p>D:20091124151543Z Ricardo Teixeira &amp; Vítor Fonseca - Arqueologia Lda Writer OpenOffice.org 3.1 D:20091124151756Z RELATÓRIO PRELIMINAR PORTO - 2009 INTERVENÇÃO ARQUEOLÓGICA QUARTEIRÃO DOS PELAMES SÉ PLM.09 Intervenção Arqueológica – Quarteirão dos Pelames – PLM.09 FICHA TÉCNICA COORDENAÇÃO GERAL Ricardo Teixeira, Arqueólogo, Mestre em arqueologia Vítor Fonseca, Arqueólogo COORDENAÇÃO DE PROJECTO Jorge Fonseca, Arqueólogo TRABALHO DE CAMPO Direcção Jorge Fonseca Arqueólogos Graça Pereira Helena Marçal Assistentes de arqueólogo Bebiana Mota Carlos Barbosa Diogo Parente Lisdália Mota Ricardo Mota Vitor Rompante Eduardo Ribas TRABALHO DE GABINETE Relatório Jorge Fonseca Desenho Gráfico Ana Paulo Revisão Liliana Rodrigues DATA 24 de Novembro de 2009 Relatório Preliminar 24 de Novembro de 2009 Página 1 de 24 Intervenção Arqueológica – Quarteirão dos Pelames – PLM.09 Índice ............................................................................................................................</text:p>
          </table:table-cell>
          <table:table-cell table:number-columns-repeated="1015"/>
        </table:table-row>
        <table:table-row table:style-name="ro1">
          <table:table-cell office:value-type="string">
            <text:p>170_RT_Edif_PLM.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aparenta corresponder a relatório de projeto / intervenção arqueológica. Foram analisadas as primeiras 4 página(s) de um total de 57. Pistas usadas: relatório, relatorio.</text:p>
          </table:table-cell>
          <table:table-cell office:value-type="string">
            <text:p>relatório, relatorio</text:p>
          </table:table-cell>
          <table:table-cell office:value-type="string">
            <text:p>Assinatura PDF</text:p>
          </table:table-cell>
          <table:table-cell office:value-type="string">
            <text:p>D:20130704132630+01'00' Adobe Acrobat 8.1 Combine Files Adobe Acrobat 8.1 D:20130704132630+01'00' RELATÓRIO PRELIMINAR NOVEMBRO - 2009 REGISTO TIPOLÓGICO DE 6 PARCELAS DO QUARTEIRÃO DOS PELAMES - - SÉ Registo Tipológico de 6 parcelas do Quarteirão dos Pelames – Sé R e l a t ó r i o P r e l i m i n a r Novembro de 2009 ANÁLISE DE CONJUNTO – MATERIAIS Registo Tipológico de 6 parcelas do Quarteirão dos Pelames – Sé R e l a t ó r i o P r e l i m i n a r Novembro de 2009 ANÁLISE DAS PARCELAS Ficha de parcela / Caracterização construtiva Levantamento arquitectónico Levantamento Fotográfico Registo Tipológico de 6 parcelas do Quarteirão dos Pelames – Sé R e l a t ó r i o P r e l i m i n a r Novembro de 2009 LICENÇAS DE OBRAS - FICHAS</text:p>
          </table:table-cell>
          <table:table-cell table:number-columns-repeated="1015"/>
        </table:table-row>
        <table:table-row table:style-name="ro1">
          <table:table-cell office:value-type="string">
            <text:p>172_PERGT_0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2.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110429103402+01'00' arqueologogeral PScript5.dll Version 5.2 Acrobat Distiller 8.1.0 (Windows) D:20110429103806+01'00' 172 rel rev 2011 04 26 Relatório Final Acompanhamento Arqueológico Parque de Estacionamento de General Torres (Parque D. Luís I) Sta. Marinha – Vila Nova de Gaia ARQUEOLOGIA E PATRIMÓNIO MATOSINHOS 2011 Acompanhamento Arqueológico - Parque de Estacionamento de General Torres FICHA TÉCNICA Projecto nº 172 COORDENAÇÃO GERAL Ricardo Teixeira, Arqueólogo, Mestre em arqueologia Vítor Fonseca, Arqueólogo TRABALHO DE CAMPO Direcção Helena Marçal, Arqueóloga Graça Pereira, Arqueóloga Assistentes de arqueólogo Rodry Mendonça TRABALHO DE GABINETE Relatório Helena Marçal Desenho gráfico Rui Oliveira Revisão de texto Teresa Silva, Arqueóloga, pós-graduada em Museologia DATA 26 de Abril de 2011 Relatório Final Página 3 de 35</text:p>
          </table:table-cell>
          <table:table-cell table:number-columns-repeated="1015"/>
        </table:table-row>
        <table:table-row table:style-name="ro1">
          <table:table-cell office:value-type="string">
            <text:p>173_IA_ADP_0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3. Pistas usadas: relatório, relatorio, relatório final, relatorio final, projecto, intervenção arqueológica, intervencao arqueologica, acompanhamento arqueológico, acompanhamento arqueologico, trabalhos arqueológicos, trabalhos arqueologicos, património arqueológico.</text:p>
          </table:table-cell>
          <table:table-cell office:value-type="string">
            <text:p>relatório, relatorio, relatório final, relatorio final, projecto, intervenção arqueológica, intervencao arqueologica, acompanhamento arqueológico, acompanhamento arqueologico, trabalhos arqueológicos, trabalhos arqueologicos, património arqueológico</text:p>
          </table:table-cell>
          <table:table-cell office:value-type="string">
            <text:p>Assinatura PDF</text:p>
          </table:table-cell>
          <table:table-cell office:value-type="string">
            <text:p>D:20110110143847Z Writer OpenOffice.org 3.2 D:20110110144354Z Relatório Final Porto 2011 Acompanhamento Arqueológico da Interligação das Origens Douro e Paiva Troço de Ramalde/Galegos e Estação Elevatória de Ramalde ADP . 09 Acompanhamento Arqueológico da Interligação das Origens Douro e Paiva -Troço Ramalde / Galegos e Estação Elevatória de Ramalde – ADP . 09 FICHA TÉCNICA COORDENAÇÃO GERAL Ricardo Teixeira, Arqueólogo, Mestre em arqueologia Vítor Fonseca, Arqueólogo TRABALHO DE CAMPO Direcção Liliana Barbosa, Arqueóloga Arqueólogo Carlos Barbosa TRABALHO DE GABINETE Relatório Carlos Barbosa Apoio técnico e revisão de texto Jorge Fonseca, Arqueólogo Tratamento de espólio Anabela Rodrigues, Assistente de Arqueólogo Teresa Gonçalves, Assistente de Arqueólogo Fotografia de espólio Pedro Maia, Técnico Superior de Património Cultural DATA 07 de Janeiro de 2011 Relatório Final Janeiro de 2011 Página 3 de 37 Acompanhamento Arqueológico da Interligação das Origens Douro e Paiva -Troço Ramalde...</text:p>
          </table:table-cell>
          <table:table-cell table:number-columns-repeated="1015"/>
        </table:table-row>
        <table:table-row table:style-name="ro1">
          <table:table-cell office:value-type="string">
            <text:p>174_ABE_09 MT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21033+01'00' sergiogomes Adobe Acrobat 8.2 Combine Files Adobe Acrobat 8.2 D:20100811121233+01'00' 174 ABE 09 MT1 REL FINAL Relatório Final Beja 2010 Adutor Brinches-Enxoé Intervenção Arqueológica em Montinho 1 (Brinches) Adutor Brinches-Enxoé Intervenção Arqueológica em Montinho 1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Apoio técnico e revisão de texto Lídia Baptista, Mestre em Arqueologia DATA 15 de Agosto de 2010 Relatório Final Agosto de 2010 Página 3 de 17</text:p>
          </table:table-cell>
          <table:table-cell table:number-columns-repeated="1015"/>
        </table:table-row>
        <table:table-row table:style-name="ro1">
          <table:table-cell office:value-type="string">
            <text:p>174_ABE_09_ALP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03228+01'00' sergiogomes Adobe Acrobat 8.2 Combine Files Adobe Acrobat 8.2 D:20100811103228+01'00' 174 ABE 09 ALP3 REL FINAL Relatório Final Beja 2010 Adutor Brinches-Enxoé Intervenção Arqueológica em Alpendres 3 (Brinches) Adutor Brinches-Enxoé Intervenção Arqueológica em Alpendres 3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Apoio técnico e revisão de texto Lídia Baptista, Mestre em Arqueologia DATA 15 de Agosto de 2010 Relatório Final Agosto de 2010 Página 3 de 14</text:p>
          </table:table-cell>
          <table:table-cell table:number-columns-repeated="1015"/>
        </table:table-row>
        <table:table-row table:style-name="ro1">
          <table:table-cell office:value-type="string">
            <text:p>174_ABE_09_CP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4.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73440+01'00' sergiogomes Adobe Acrobat 8.2 Combine Files Adobe Acrobat 8.2 D:20100811173440+01'00' 174 ABE 09 CP1 REL FINALLL Relatório Final Beja 2010 Adutor Brinches-Enxoé Intervenção Arqueológica em Corte do Poço 1 (Brinches) Adutor Brinches-Enxoé Intervenção Arqueológica em Corte do Poço 1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rqueólogos Rui Pinheiro Assistentes de arqueólogo André Saraiva Francisco Barros Nelson Vale Luis Leal Operários de arqueologia Alexandre Pinto Pedro Pinto Francisco Moquenco TRABALHO DE GABINETE Relatório Lídia Baptista, Mestre em Arqueologia Sérgio Gomes, Mestre em Arqueologia Desenho gráfico Rodry Mendonça Tratamento de espólio Francisco Barros João Molha José Grilo Nelson Vale Conservação e restauro...</text:p>
          </table:table-cell>
          <table:table-cell table:number-columns-repeated="1015"/>
        </table:table-row>
        <table:table-row table:style-name="ro1">
          <table:table-cell office:value-type="string">
            <text:p>174_ABE_09_CP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14317+01'00' sergiogomes Adobe Acrobat 8.2 Combine Files Adobe Acrobat 8.2 D:20100811114616+01'00' 174 ABE 09 CP2 REL FINAL Relatório Final Beja 2010 Adutor Brinches-Enxoé Intervenção Arqueológica em Corte do Poço 2 (Brinches) Adutor Brinches-Enxoé Intervenção Arqueológica em Corte do Poço 2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Apoio técnico e revisão de texto Lídia Baptista, Mestre em Arqueologia DATA 15 de Agosto de 2010 Relatório Final Agosto de 2010 Página 3 de 14</text:p>
          </table:table-cell>
          <table:table-cell table:number-columns-repeated="1015"/>
        </table:table-row>
        <table:table-row table:style-name="ro1">
          <table:table-cell office:value-type="string">
            <text:p>174_ABE_09_GB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3.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15727+01'00' sergiogomes Adobe Acrobat 8.2 Combine Files Adobe Acrobat 8.2 D:20100811115954+01'00' 174 ABE 09 GB6 REL FINAL Relatório Final Beja 2010 Adutor Brinches-Enxoé Intervenção Arqueológica em Gato de Baixo 6 (Brinches) Adutor Brinches-Enxoé Intervenção Arqueológica em Gato de Baixo 6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Tratamento de espólio Francisco Barros João Molha José Grilo Nelson Vale Conservação e restauro Anabela Hipólito, Técnica Superior de Conservação e Restauro Fot...</text:p>
          </table:table-cell>
          <table:table-cell table:number-columns-repeated="1015"/>
        </table:table-row>
        <table:table-row table:style-name="ro1">
          <table:table-cell office:value-type="string">
            <text:p>174_ABE_09_OALT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7.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22517+01'00' sergiogomes Adobe Acrobat 8.2 Combine Files Adobe Acrobat 8.2 D:20100811122828+01'00' 174 ABE 09 OALT2 REL FINAL Relatório Final Beja 2010 Adutor Brinches-Enxoé Intervenção Arqueológica em Outeiro Alto 2 (Brinches) Adutor Brinches-Enxoé Intervenção Arqueológica em Outeiro Alto 2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Tratamento de espólio Francisco Barros João Molha José Grilo Nelson Vale Conservação e restauro Anabela Hipólito, Técnica Superior de Conservação e Restauro Fot...</text:p>
          </table:table-cell>
          <table:table-cell table:number-columns-repeated="1015"/>
        </table:table-row>
        <table:table-row table:style-name="ro1">
          <table:table-cell office:value-type="string">
            <text:p>174_ABE_09_OALT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23927+01'00' sergiogomes PScript5.dll Version 5.2 Acrobat Distiller 8.2.2 (Windows) D:20100811123927+01'00' 174 ABE 09 OALT3 REL FINAL Relatório Final Beja 2010 Adutor Brinches-Enxoé Intervenção Arqueológica em Outeiro Alto 3 (Brinches) Adutor Brinches-Enxoé Intervenção Arqueológica em Outeiro Alto 3 (Brinche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Tratamento de espólio Francisco Barros Nelson Vale João Molha Cláudio Jorge José Grilo Fotografia de espólio João Molha Apoio técnico e revisão de text...</text:p>
          </table:table-cell>
          <table:table-cell table:number-columns-repeated="1015"/>
        </table:table-row>
        <table:table-row table:style-name="ro1">
          <table:table-cell office:value-type="string">
            <text:p>174_ABE_09_PRR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31244+01'00' sergiogomes Adobe Acrobat 8.2 Combine Files Adobe Acrobat 8.2 D:20100811131451+01'00' 174 ABE 09 PRR2 REL FINAL Relatório Final Beja 2010 Adutor Brinches-Enxoé Intervenção Arqueológica em Parreirinha 2 (Pias) Adutor Brinches-Enxoé Intervenção Arqueológica em Parreirinha 2 (Pias)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Assistentes de arqueólogo André Saraiva Francisco Barros Nelson Vale Operários de arqueologia Francisco Moquenco TRABALHO DE GABINETE Relatório Lídia Baptista, Mestre em Arqueologia Sérgio Gomes, Mestre em Arqueologia Desenho gráfico Rodry Mendonça Apoio técnico e revisão de texto Lídia Baptista, Mestre em Arqueologia DATA 15 de Agosto de 2010 Relatório Final Agosto de 2010 Página 3 de 14</text:p>
          </table:table-cell>
          <table:table-cell table:number-columns-repeated="1015"/>
        </table:table-row>
        <table:table-row table:style-name="ro1">
          <table:table-cell office:value-type="string">
            <text:p>174_AS_09_TL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00811132541+01'00' sergiogomes Adobe Acrobat 8.2 Combine Files Adobe Acrobat 8.2 D:20100811132735+01'00' 174 AS 09 TL7 REL FINAL Relatório Final Beja 2010 Adutor de Serpa Intervenção Arqueológica em Torre de Lóbio 7 (Brinches) Adutor de Serpa Intervenção Arqueológica em Torre de Lóbio (Brinches)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Francisco Barros Nelson Vale Operários de arqueologia Francisco Moquenco TRABALHO DE GABINETE Relatório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text:p>
          </table:table-cell>
          <table:table-cell table:number-columns-repeated="1015"/>
        </table:table-row>
        <table:table-row table:style-name="ro1">
          <table:table-cell office:value-type="string">
            <text:p>175_PDM_Serpa_2009_10_27.pdf</text:p>
          </table:table-cell>
          <table:table-cell office:value-type="string">
            <text:p>.pdf</text:p>
          </table:table-cell>
          <table:table-cell office:value-type="string">
            <text:p>Documento PDF</text:p>
          </table:table-cell>
          <table:table-cell office:value-type="string">
            <text:p>Documentação administrativ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7. Pistas usadas: relatório, relatorio, património arqueológico, patrimonio arqueologico.</text:p>
          </table:table-cell>
          <table:table-cell office:value-type="string">
            <text:p>relatório, relatorio, património arqueológico, patrimonio arqueologico</text:p>
          </table:table-cell>
          <table:table-cell office:value-type="string">
            <text:p>Assinatura PDF</text:p>
          </table:table-cell>
          <table:table-cell office:value-type="string">
            <text:p>fino Writer OpenOffice.org 3.0 D:20091028001637Z' junho2009 FASE 1 - PROPOSTA PRELIMINAR PARTE 1 – ESTUDOS DE CARACTERIZAÇÃO VOLUME IV PATRIMÓNIO HISTÓRICO, CULTURAL E ARQUEOLÓGICO junho2009 FASE 1 - PROPOSTA PRELIMINAR PARTE 1 – ESTUDOS DE CARACTERIZAÇÃO VOLUME IV PATRIMÓNIO HISTÓRICO, CULTURAL E ARQUEOLÓGICO Índices Índice Geral de Volumes PARTE 1 - ESTUDOS DE CARACTERIZAÇÃO VOLUME I – ENQUADRAMENTO REGIONAL E SOCIOECONOMIA VOLUME II – SISTEMA BIOFÍSICO VOLUME III – SISTEMA URBANO E INFRA-ESTRUTURAS VOLUME IV – PATRIMÓNIO HISTÓRICO, CULTURAL E ARQUEOLÓGICO VOLUME V – GESTÃO DA ÁGUA E SANEAMENTO AMBIENTAL VOLUME VI – EQUIPAMENTOS VOLUME VII – ACTIVIDADES ECONÓMICAS PARTE 2 - PROPOSTA PRELIMINAR VOLUME I – DIAGNÓSTICO ESTRATÉGICO E MODELO DE ORDENAMENTO E DESENVOLVIMENTO VOLUME II – REGULAMENTO PRELIMINAR PARTE 3 – AVALIAÇÃO AMBIENTAL ESTRATÉGICA VOLUME I – RELATÓRIO DE DEFINIÇÃO DE ÂMBITO 2 Índice do Volume IV 1. INTRODUÇÃO.................................................................</text:p>
          </table:table-cell>
          <table:table-cell table:number-columns-repeated="1015"/>
        </table:table-row>
        <table:table-row table:style-name="ro1">
          <table:table-cell office:value-type="string">
            <text:p>175_PDM_Serpa_3_vol IV_2011_06_20.pdf</text:p>
          </table:table-cell>
          <table:table-cell office:value-type="string">
            <text:p>.pdf</text:p>
          </table:table-cell>
          <table:table-cell office:value-type="string">
            <text:p>Documento PDF</text:p>
          </table:table-cell>
          <table:table-cell office:value-type="string">
            <text:p>Documentação administrativa</text:p>
          </table:table-cell>
          <table:table-cell office:value-type="string">
            <text:p>Baixa</text:p>
          </table:table-cell>
          <table:table-cell office:value-type="string">
            <text:p>Documento PDF; o conteúdo aparenta corresponder a documentação administrativa. Foram analisadas as primeiras 4 página(s) de um total de 186. Pistas usadas: proposta.</text:p>
          </table:table-cell>
          <table:table-cell office:value-type="string">
            <text:p>proposta</text:p>
          </table:table-cell>
          <table:table-cell office:value-type="string">
            <text:p>Assinatura PDF</text:p>
          </table:table-cell>
          <table:table-cell office:value-type="string">
            <text:p>fino Microsoft® Office Word 2007 D:20110620114116 D:20110620114116 Microsoft® Office Word 2007 FASE 2 - PROPOSTA DE PLANO PARTE 3 – ESTUDOS DE CARACTERIZAÇÃO VOLUME IV - PATRIMÓNIO HISTÓRICO, CULTURAL E ARQUEOLÓGICO 2 junho2011 junho2011 FASE 2 - PROPOSTA DE PLANO PARTE 3 – ESTUDOS DE CARACTERIZAÇÃO VOLUME IV</text:p>
          </table:table-cell>
          <table:table-cell table:number-columns-repeated="1015"/>
        </table:table-row>
        <table:table-row table:style-name="ro1">
          <table:table-cell office:value-type="string">
            <text:p>175_PDM_Serpa_Vol IV.pdf</text:p>
          </table:table-cell>
          <table:table-cell office:value-type="string">
            <text:p>.pdf</text:p>
          </table:table-cell>
          <table:table-cell office:value-type="string">
            <text:p>Documento PDF</text:p>
          </table:table-cell>
          <table:table-cell office:value-type="string">
            <text:p>Documentação administrativ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7. Pistas usadas: relatório, relatorio, património arqueológico, patrimonio arqueologico.</text:p>
          </table:table-cell>
          <table:table-cell office:value-type="string">
            <text:p>relatório, relatorio, património arqueológico, patrimonio arqueologico</text:p>
          </table:table-cell>
          <table:table-cell office:value-type="string">
            <text:p>Assinatura PDF</text:p>
          </table:table-cell>
          <table:table-cell office:value-type="string">
            <text:p>fino Writer OpenOffice.org 3.0 D:20091028002505Z' junho2009 FASE 1 - PROPOSTA PRELIMINAR PARTE 1 – ESTUDOS DE CARACTERIZAÇÃO VOLUME IV PATRIMÓNIO HISTÓRICO, CULTURAL E ARQUEOLÓGICO junho2009 FASE 1 - PROPOSTA PRELIMINAR PARTE 1 – ESTUDOS DE CARACTERIZAÇÃO VOLUME IV PATRIMÓNIO HISTÓRICO, CULTURAL E ARQUEOLÓGICO Índices Índice Geral de Volumes PARTE 1 - ESTUDOS DE CARACTERIZAÇÃO VOLUME I – ENQUADRAMENTO REGIONAL E SOCIOECONOMIA VOLUME II – SISTEMA BIOFÍSICO VOLUME III – SISTEMA URBANO E INFRA-ESTRUTURAS VOLUME IV – PATRIMÓNIO HISTÓRICO, CULTURAL E ARQUEOLÓGICO VOLUME V – GESTÃO DA ÁGUA E SANEAMENTO AMBIENTAL VOLUME VI – EQUIPAMENTOS VOLUME VII – ACTIVIDADES ECONÓMICAS PARTE 2 - PROPOSTA PRELIMINAR VOLUME I – DIAGNÓSTICO ESTRATÉGICO E MODELO DE ORDENAMENTO E DESENVOLVIMENTO VOLUME II – REGULAMENTO PRELIMINAR PARTE 3 – AVALIAÇÃO AMBIENTAL ESTRATÉGICA VOLUME I – RELATÓRIO DE DEFINIÇÃO DE ÂMBITO 2 Índice do Volume IV 1. INTRODUÇÃO.................................................................</text:p>
          </table:table-cell>
          <table:table-cell table:number-columns-repeated="1015"/>
        </table:table-row>
        <table:table-row table:style-name="ro1">
          <table:table-cell office:value-type="string">
            <text:p>176_EIA_Cabelt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6. Pistas usadas: relatório, relatorio, projeto.</text:p>
          </table:table-cell>
          <table:table-cell office:value-type="string">
            <text:p>relatório, relatorio, projeto</text:p>
          </table:table-cell>
          <table:table-cell office:value-type="string">
            <text:p>Assinatura PDF</text:p>
          </table:table-cell>
          <table:table-cell office:value-type="string">
            <text:p>D:20120523114206+01'00' lilianabarbosa PScript5.dll Version 5.2.2 Acrobat Distiller 8.1.0 (Windows) D:20120523120541+01'00' 176 REL 2012 05 25 ESTUDO DE IMPACTE AMBIENTAL Unidade Industrial Cabelte Vila Nova de Famalicão 2012 Copyright © arqueologia e património Matosinhos 201 EIA Unidade Industrial Cabelte FICHA TÉCNICA Ricardo Teixeira &amp; Vítor Fonseca, Arqueologia Lda. PROJETO 176 Coordenação Geral Ricardo Teixeira, Arqueólogo, mestre em arqueologia Vítor Fonseca, Arqueólogo Coordenação Teresa Silva, Arqueóloga, Pós graduada em Museologia Direção Liliana Barbosa, Arqueóloga Trabalho de Campo Liliana Barbosa Pedro Maia, Técnico Superior de Gestão do Património Fotografia Pedro Maia Trabalho de Gabinete Relatório Liliana Barbosa Desenho Gráfico Rui Oliveira, Licenciado em Artes Plásticas - Pintura Revisão de Texto Pedro Maia Data 25 de Maio de 2012 EIA página 3 de 23</text:p>
          </table:table-cell>
          <table:table-cell table:number-columns-repeated="1015"/>
        </table:table-row>
        <table:table-row table:style-name="ro1">
          <table:table-cell office:value-type="string">
            <text:p>177_BRA_09_AR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projecto, intervenção arqueológica, intervencao arqueologica, escavação, escavacao, sondagens.</text:p>
          </table:table-cell>
          <table:table-cell office:value-type="string">
            <text:p>relatório, relatorio, projecto, intervenção arqueológica, intervencao arqueologica, escavação, escavacao, sondagens</text:p>
          </table:table-cell>
          <table:table-cell office:value-type="string">
            <text:p>Assinatura PDF</text:p>
          </table:table-cell>
          <table:table-cell office:value-type="string">
            <text:p>D:20090810204527+01'00' D:20090810204828+01'00' RELATÓRIO PRELIMINAR FERREIRA DO ALENTEJO - 2009 BLOCO DE REGA DE ALFUNDÃO - BLOCO A INTERVENÇÃO ARQUEOLÓGICA EM AREIAS 2 (PEROGUARDA) BRA 09 AR2 Intervenção Arqueológica em Areias 2 FICHA TÉCNICA COORDENAÇÃO GERAL Ricardo Teixeira, Arqueólogo, Mestre em arqueologia Vítor Fonseca, Arqueólogo COORDENAÇÃO DE PROJECTO Lídia Baptista, Mestre em arqueologia TRABALHO DE CAMPO Direcção Lidía Baptista Bárbara Carvalho, Arqueóloga Helena Marçal, Arqueóloga Assistentes de arqueólogo Rodry Mendonça Tiago Rocha Vitor Rompante Operários de Arqueologia Alexandre Pinto Pedro Pinto TRABALHO DE GABINETE Relatório Lidía Baptista Bárbara Carvalho Desenho Gráfico Fotografia de Espólio Revisão Lídia Baptista DATA 15 de Julho de 2009 Relatório Preliminar Julho de 2009 1 de 8 Intervenção Arqueológica em Areias 2 Índice 1.Introdução................................................................................................................. 3 2.Intervenção Ar...</text:p>
          </table:table-cell>
          <table:table-cell table:number-columns-repeated="1015"/>
        </table:table-row>
        <table:table-row table:style-name="ro1">
          <table:table-cell office:value-type="string">
            <text:p>177_BRA_09_AR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 Pistas usadas: relatório, relatorio, projecto, intervenção arqueológica, intervencao arqueologica, escavação, escavacao, sondagens.</text:p>
          </table:table-cell>
          <table:table-cell office:value-type="string">
            <text:p>relatório, relatorio, projecto, intervenção arqueológica, intervencao arqueologica, escavação, escavacao, sondagens</text:p>
          </table:table-cell>
          <table:table-cell office:value-type="string">
            <text:p>Assinatura PDF</text:p>
          </table:table-cell>
          <table:table-cell office:value-type="string">
            <text:p>D:20090810204909+01'00' D:20090810205049+01'00' RELATÓRIO PRELIMINAR FERREIRA DO ALENTEJO - 2009 BLOCO DE REGA DE ALFUNDÃO - BLOCO A INTERVENÇÃO ARQUEOLÓGICA EM AREIAS 5 (PEROGUARDA) BRA 09 AR5 Intervenção Arqueológica em Areias 5 FICHA TÉCNICA COORDENAÇÃO GERAL Ricardo Teixeira, Arqueólogo, Mestre em arqueologia Vítor Fonseca, Arqueólogo COORDENAÇÃO DE PROJECTO Lídia Baptista, Mestre em arqueologia TRABALHO DE CAMPO Direcção Lídia Baptista Bárbara Carvalho, Arqueóloga Helena Marçal, Arqueóloga Assistentes de arqueólogo Rodry Mendonça Tiago Rocha Vitor Rompante Operários de Arqueologia Alexandre Pinto Pedro Pinto TRABALHO DE GABINETE Relatório Lídia Baptista Bárbara Carvalho Desenho Gráfico Fotografia de Espólio Revisão Lídia Baptista DATA 15 de Julho de 2009 Relatório Preliminar Julho de 2009 1 de 8 Intervenção Arqueológica em Areias 5 Índice 1.Introdução................................................................................................................. 3 2.Intervenção Ar...</text:p>
          </table:table-cell>
          <table:table-cell table:number-columns-repeated="1015"/>
        </table:table-row>
        <table:table-row table:style-name="ro1">
          <table:table-cell office:value-type="string">
            <text:p>177_BRA_09_LC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 Pistas usadas: relatório, relatorio, projecto, intervenção arqueológica, intervencao arqueologica, escavação, escavacao, sondagens.</text:p>
          </table:table-cell>
          <table:table-cell office:value-type="string">
            <text:p>relatório, relatorio, projecto, intervenção arqueológica, intervencao arqueologica, escavação, escavacao, sondagens</text:p>
          </table:table-cell>
          <table:table-cell office:value-type="string">
            <text:p>Assinatura PDF</text:p>
          </table:table-cell>
          <table:table-cell office:value-type="string">
            <text:p>D:20090810205600+01'00' D:20090810211006+01'00' RELATÓRIO PRELIMINAR FERREIRA DO ALENTEJO - 2009 BLOCO DE REGA DE ALFUNDÃO - BLOCO A INTERVENÇÃO ARQUEOLÓGICA EM LANCINHA 1 (ALFUNDÃO) BRA 09 LC1 Intervenção Arqueológica em Lancinha 1 FICHA TÉCNICA COORDENAÇÃO GERAL Ricardo Teixeira, Arqueólogo, Mestre em arqueologia Vítor Fonseca, Arqueólogo COORDENAÇÃO DE PROJECTO Lídia Baptista, Mestre em arqueologia TRABALHO DE CAMPO Direcção Lídia Baptista Bárbara Carvalho, Arqueóloga Helena Marçal, Arqueóloga Assistentes de arqueólogo Rodry Mendonça Tiago Rocha Vitor Rompante Operários de Arqueologia Alexandre Pinto Pedro Pinto TRABALHO DE GABINETE Relatório Lídia Baptista Bárbara Carvalho Desenho Gráfico Fotografia de Espólio Revisão Lídia Baptista DATA 15 de Julho de 2009 Relatório Preliminar Julho de 2009 1 de 7 Intervenção Arqueológica em Lancinha 1 Índice 1.Introdução................................................................................................................. 3 2.Intervençã...</text:p>
          </table:table-cell>
          <table:table-cell table:number-columns-repeated="1015"/>
        </table:table-row>
        <table:table-row table:style-name="ro1">
          <table:table-cell office:value-type="string">
            <text:p>177_BRA_09_LC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102200824Z Adobe Acrobat Pro Extended 9.0.0 D:20100102200824Z Adobe Acrobat Pro Extended 9.0.0 RELATÓRIO FINAL FERREIRA DO ALENTEJO - 2009 BLOCO DE REGA DE ALFUNDÃO - BLOCO A INTERVENÇÃO ARQUEOLÓGICA EM LANCINHA 2 (ALFUNDÃO) BRA 09 LC2 Intervenção Arqueológica em Lancinha 2 FICHA TÉCNICA COORDENAÇÃO GERAL Ricardo Teixeira, Arqueólogo, Mestre em arqueologia Vítor Fonseca, Arqueólogo COORDENAÇÃO DE PROJECTO Lídia Baptista, Mestre em arqueologia TRABALHO DE CAMPO Direcção Lidía Baptista Bárbara Carvalho, Arqueóloga Helena Marçal, Arqueóloga Assistentes de arqueólogo Rodry Mendonça Tiago Rocha Vitor Rompante Operários de Arqueologia Alexandre Pinto Pedro Pinto TRABALHO DE GABINETE Relatório Lidía Baptista Bárbara Carvalho Helena Marçal Desenho Gráfico Rodry Mendonça Lídia Baptista Fotografia e Tratamento do Espólio Francisco Barros Nelson Vale Lídia Baptista Revisão Lídia Baptista DATA 15 de Dezembro de 2009 Relatório Final Dezembro de 2009 1 de 11 Intervenção Arqueológica em Lancin...</text:p>
          </table:table-cell>
          <table:table-cell table:number-columns-repeated="1015"/>
        </table:table-row>
        <table:table-row table:style-name="ro1">
          <table:table-cell office:value-type="string">
            <text:p>177_BRA_09_LC2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 Pistas usadas: relatório, relatorio, projecto, intervenção arqueológica, intervencao arqueologica, escavação, escavacao, sondagens.</text:p>
          </table:table-cell>
          <table:table-cell office:value-type="string">
            <text:p>relatório, relatorio, projecto, intervenção arqueológica, intervencao arqueologica, escavação, escavacao, sondagens</text:p>
          </table:table-cell>
          <table:table-cell office:value-type="string">
            <text:p>Assinatura PDF</text:p>
          </table:table-cell>
          <table:table-cell office:value-type="string">
            <text:p>D:20090810205836+01'00' D:20090810211352+01'00' RELATÓRIO PRELIMINAR FERREIRA DO ALENTEJO - 2009 BLOCO DE REGA DE ALFUNDÃO - BLOCO A INTERVENÇÃO ARQUEOLÓGICA EM LANCINHA 2 (ALFUNDÃO) BRA 09 LC2 Intervenção Arqueológica em Lancinha 2 FICHA TÉCNICA COORDENAÇÃO GERAL Ricardo Teixeira, Arqueólogo, Mestre em arqueologia Vítor Fonseca, Arqueólogo COORDENAÇÃO DE PROJECTO Lídia Baptista, Mestre em arqueologia TRABALHO DE CAMPO Direcção Lídia Baptista Bárbara Carvalho, Arqueóloga Helena Marçal, Arqueóloga Assistentes de arqueólogo Rodry Mendonça Tiago Rocha Vitor Rompante Operários de Arqueologia Alexandre Pinto Pedro Pinto TRABALHO DE GABINETE Relatório Lídia Baptista Bárbara Carvalho Desenho Gráfico Fotografia de Espólio Revisão Lídia Baptista DATA 15 de Julho de 2009 Relatório Preliminar Julho de 2009 1 de 7 Intervenção Arqueológica em Lancinha 2 Índice 1.Introdução................................................................................................................. 3 2.Intervençã...</text:p>
          </table:table-cell>
          <table:table-cell table:number-columns-repeated="1015"/>
        </table:table-row>
        <table:table-row table:style-name="ro1">
          <table:table-cell office:value-type="string">
            <text:p>177_BRB_09_AR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102162210Z Adobe Acrobat Pro Extended 9.0.0 D:20100102162210Z Adobe Acrobat Pro Extended 9.0.0 RELATÓRIO FINAL FERREIRA DO ALENTEJO - 2009 BLOCO DE REGA DE ALFUNDÃO - BLOCO A INTERVENÇÃO ARQUEOLÓGICA EM AREIAS 2 (PEROGUARDA) BRA 09 AR2 Intervenção Arqueológica em Areias 2 FICHA TÉCNICA COORDENAÇÃO GERAL Ricardo Teixeira, Arqueólogo, Mestre em arqueologia Vítor Fonseca, Arqueólogo COORDENAÇÃO DE PROJECTO Lídia Baptista, Mestre em arqueologia TRABALHO DE CAMPO Direcção Lidía Baptista Bárbara Carvalho, Arqueóloga Helena Marçal, Arqueóloga Assistentes de arqueólogo Rodry Mendonça Tiago Rocha Vitor Rompante Operários de Arqueologia Alexandre Pinto Pedro Pinto TRABALHO DE GABINETE Relatório Lidía Baptista Bárbara Carvalho Helena Marçal Desenho Gráfico Rodry Mendonça Lídia Baptista Fotografia e Tratamento do Espólio Francisco Barros Nelson Vale Lídia Baptista Revisão Lídia Baptista DATA 15 de Dezembro de 2009 Relatório Final Dezembro de 2009 1 de 12 Intervenção Arqueológica em Areias 2...</text:p>
          </table:table-cell>
          <table:table-cell table:number-columns-repeated="1015"/>
        </table:table-row>
        <table:table-row table:style-name="ro1">
          <table:table-cell office:value-type="string">
            <text:p>177_BRB_09_AR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102163026Z Adobe Acrobat Pro Extended 9.0.0 D:20100102163026Z Adobe Acrobat Pro Extended 9.0.0 RELATÓRIO FINAL FERREIRA DO ALENTEJO - 2009 BLOCO DE REGA DE ALFUNDÃO - BLOCO A INTERVENÇÃO ARQUEOLÓGICA EM AREIAS 5 (PEROGUARDA) BRA 09 AR5 Intervenção Arqueológica em Areias 5 FICHA TÉCNICA COORDENAÇÃO GERAL Ricardo Teixeira, Arqueólogo, Mestre em arqueologia Vítor Fonseca, Arqueólogo COORDENAÇÃO DE PROJECTO Lídia Baptista, Mestre em arqueologia TRABALHO DE CAMPO Direcção Lidía Baptista Bárbara Carvalho, Arqueóloga Helena Marçal, Arqueóloga Assistentes de arqueólogo Rodry Mendonça Tiago Rocha Vitor Rompante Operários de Arqueologia Alexandre Pinto Pedro Pinto TRABALHO DE GABINETE Relatório Lidía Baptista Bárbara Carvalho Helena Marçal Desenho Gráfico Rodry Mendonça Lídia Baptista Fotografia e Tratamento do Espólio Francisco Barros Nelson Vale Lídia Baptista Revisão Lídia Baptista DATA 15 de Dezembro de 2009 Relatório Final Dezembro de 2009 1 de 10 Intervenção Arqueológica em Areias 5...</text:p>
          </table:table-cell>
          <table:table-cell table:number-columns-repeated="1015"/>
        </table:table-row>
        <table:table-row table:style-name="ro1">
          <table:table-cell office:value-type="string">
            <text:p>177_BRB_09_LC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5.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102173418Z Adobe Acrobat Pro Extended 9.0.0 D:20100102173418Z Adobe Acrobat Pro Extended 9.0.0 RELATÓRIO FINAL FERREIRA DO ALENTEJO - 2009 BLOCO DE REGA DE ALFUNDÃO - BLOCO A INTERVENÇÃO ARQUEOLÓGICA EM LANCINHA 1 (ALFUNDÃO) BRA 09 LC1 Intervenção Arqueológica em Lancinha 1 FICHA TÉCNICA COORDENAÇÃO GERAL Ricardo Teixeira, Arqueólogo, Mestre em arqueologia Vítor Fonseca, Arqueólogo COORDENAÇÃO DE PROJECTO Lídia Baptista, Mestre em arqueologia TRABALHO DE CAMPO Direcção Lidía Baptista Bárbara Carvalho, Arqueóloga Helena Marçal, Arqueóloga Assistentes de arqueólogo Rodry Mendonça Tiago Rocha Vitor Rompante Operários de Arqueologia Alexandre Pinto Pedro Pinto TRABALHO DE GABINETE Relatório Lidía Baptista Bárbara Carvalho Helena Marçal Desenho Gráfico Rodry Mendonça Lídia Baptista Fotografia e Tratamento do Espólio Francisco Barros Nelson Vale Lídia Baptista Revisão Lídia Baptista DATA 15 de Dezembro de 2009 Relatório Final Dezembro de 2009 1 de 11 Intervenção Arqueológica em Lancin...</text:p>
          </table:table-cell>
          <table:table-cell table:number-columns-repeated="1015"/>
        </table:table-row>
        <table:table-row table:style-name="ro1">
          <table:table-cell office:value-type="string">
            <text:p>178 BBE09 CA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3.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D:20100414160740+01'00' Sergio Gomes Writer OpenOffice.org 3.1 D:20100421143055+01'00' R e l a t ó r i o F i n a l 2009S e r p a – B l o c o d e R e g a B r i n c h e s E n x o é T r a b a l h o s a r q u e o l ó g i c o s e m 6C a p e l a – Bloco de Rega de Brinches Enxoé 6 Trabalhos Arqueológicos em Capela FICHA TÉCNICA Coordenação Geral , , Ricardo Teixeira Arqueólogo Mestre em arqueologia , Vítor Fonseca Arqueólogo Coordenação de Projecto , Lídia Baptista Mestre em Arqueologia Trabalho de Campo Direcção , Lídia Baptista Mestre em Arqueologia Arqueólogos Assistentes de arqueólogo Rodry Mendonça Trabalho de Gabinete Relatório , Lídia Baptista Mestre em Arqueologia , Lurdes Cunha Mestre em Arqueologia , Sérgio Gomes Mestre em Arqueologia Desenho gráfico Rodry Mendonça Apoio técnico e revisão de texto , Lídia Baptista Mestre em Arqueologia Data 15 2010 de Abril de Relatório Final -2010Abril 3 / 18 – Bloco de Rega de Brinches Enxoé 6 Trabalhos Arqueológicos em Capela ÍNDICE 1.Introdução...</text:p>
          </table:table-cell>
          <table:table-cell table:number-columns-repeated="1015"/>
        </table:table-row>
        <table:table-row table:style-name="ro1">
          <table:table-cell office:value-type="string">
            <text:p>178 BBE09 ECC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D:20100420130512+01'00' Sergio Gomes Writer OpenOffice.org 3.1 D:20100420171006+01'00' R e l a t ó r i o F i n a l 2009S e r p a – B l o c o d e R e g a B r i n c h e s E n x o é T r a b a l h o s a r q u e o l ó g i c o s e m - 1E s c a l f a C ã e s – Bloco de Rega de Brinches Enxoé - 1 Trabalhos Arqueológicos em Escalfa Cães FICHA TÉCNICA Coordenação Geral , , Ricardo Teixeira Arqueólogo Mestre em arqueologia , Vítor Fonseca Arqueólogo Coordenação de Projecto , Lídia Baptista Mestre em Arqueologia Trabalho de Campo Direcção Flávia Chaves Arqueólogos Assistentes de arqueólogo André Saraiva Cláudio Jorge Luís Teixeira Trabalho de Gabinete Relatório , Lídia Baptista Mestre em Arqueologia , Lurdes Cunha Mestre em Arqueologia , Sérgio Gomes Mestre em Arqueologia Desenho gráfico Rodry Mendonça Tratamento de Espólio Cláudio Jorge Francisco Barros João Molha José Grilo Nelson Vale Conservação e Restauro , Anabela Hipólito Técnica superior de Conservação e Restauro Fotografia de Espólio João...</text:p>
          </table:table-cell>
          <table:table-cell table:number-columns-repeated="1015"/>
        </table:table-row>
        <table:table-row table:style-name="ro1">
          <table:table-cell office:value-type="string">
            <text:p>178 BBE09 HMG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4.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415121303+01'00' Sergio Gomes Writer OpenOffice.org 3.1 D:20100421141957+01'00' R e l a t ó r i o F i n a l 2009S e r p a – B l o c o d e R e g a B r i n c h e s E n x o é T r a b a l h o s a r q u e o l ó g i c o s e m H o r t a d a 1M o r g a d i n h a – Bloco de Rega de Brinches Enxoé 1Trabalhos Arqueológicos em Horta da Morgadinha FICHA TÉCNICA Coordenação Geral , , Ricardo Teixeira Arqueólogo Mestre em arqueologia , Vítor Fonseca Arqueólogo Coordenação de Projecto , Lídia Baptista Mestre em Arqueologia Trabalho de Campo Direcção , Lídia Baptista Mestre em Arqueologia Arqueólogos Assistentes de arqueólogo Cláudio Jorge Francisco Barros Operário de arqueólogo Pedro Zá Trabalho de Gabinete Relatório , Lídia Baptista Mestre em Arqueologia , Lurdes Cunha Mestre em Arqueologia , Sérgio Gomes Mestre em Arqueologia Desenho gráfico Rodry Mendonça Tratamento de espólio Cláudio Jorge Francisco Barros João Molha José Grilo Nelson Vale Conservação e Restauro , Anabela Hipólito Técnica s...</text:p>
          </table:table-cell>
          <table:table-cell table:number-columns-repeated="1015"/>
        </table:table-row>
        <table:table-row table:style-name="ro1">
          <table:table-cell office:value-type="string">
            <text:p>178 BBE09 JD.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7.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D:20100415155530+01'00' Sergio Gomes Writer OpenOffice.org 3.1 D:20100421141022+01'00' R e l a t ó r i o F i n a l 2009S e r p a – B l o c o d e R e g a B r i n c h e s E n x o é T r a b a l h o s a r q u e o l ó g i c o s e m J u d e u – Bloco de Rega de Brinches Enxoé Trabalhos Arqueológicos em Judeu FICHA TÉCNICA Coordenação Geral , , Ricardo Teixeira Arqueólogo Mestre em arqueologia , Vítor Fonseca Arqueólogo Coordenação de Projecto , Lídia Baptista Mestre em Arqueologia Trabalho de Campo Direcção , Flávia Chaves Arqueóloga Arqueólogos Assistentes de arqueólogo Cláudio Jorge Pedro Zá Trabalho de Gabinete Relatório , Lídia Baptista Mestre em Arqueologia , Lurdes Cunha Mestre em Arqueologia , Sérgio Gomes Mestre em Arqueologia Desenho gráfico Rodry Mendonça Tratamento de espólio Cláudio Jorge Francisco Barros João Molha José Grilo Nelson Vale Conservação e Restauro , Anabela Hipólito Técnica superior de Conservação e Restauro Fotografia de espólio João Molha Apoio técnico e revisão d...</text:p>
          </table:table-cell>
          <table:table-cell table:number-columns-repeated="1015"/>
        </table:table-row>
        <table:table-row table:style-name="ro1">
          <table:table-cell office:value-type="string">
            <text:p>178 BBE09 M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5.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office:value-type="string">
            <text:p>D:20100426173910+01'00' Sergio Gomes Writer OpenOffice.org 3.1 D:20100427155757+01'00' R e l a t ó r i o F i n a l 2009S e r p a – B l o c o d e R e g a B r i n c h e s E n x o é T r a b a l h o s a r q u e o l ó g i c o s e m M o n t e A l t o – Bloco de Rega de Brinches Enxoé Trabalhos Arqueológicos em Monte Alto FICHA TÉCNICA Coordenação Geral , , Ricardo Teixeira Arqueólogo Mestre em arqueologia , Vítor Fonseca Arqueólogo Coordenação de Projecto , Lídia Baptista Mestre em Arqueologia Trabalho de Campo Direcção , Lídia Baptista Mestre em Arqueologia , Rui Pinheiro Arqueólogo Arqueólogos Francisco Raimundo Assistentes de arqueólogo André Saraiva Rodry Mendonça Operário de Arqueologia Alexandre Pinto Trabalho de Gabinete Relatório , Lídia Baptista Mestre em Arqueologia , Lurdes Cunha Mestre em Arqueologia , Sérgio Gomes Mestre em Arqueologia Desenho gráfico Rodry Mendonça Tratamento de Espólio Cláudio Jorge Francisco Barros João Molha José Grilo Nelson Vale Conservação e Restauro , An...</text:p>
          </table:table-cell>
          <table:table-cell table:number-columns-repeated="1015"/>
        </table:table-row>
        <table:table-row table:style-name="ro1">
          <table:table-cell office:value-type="string">
            <text:p>178 BBE09 MR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0. Pistas usadas: relatório, relatorio, relatório final, relatorio final, projecto, intervenção arqueológica, intervencao arqueologica, escavação, escavacao, sondagens.</text:p>
          </table:table-cell>
          <table:table-cell office:value-type="string">
            <text:p>relatório, relatorio, relatório final, relatorio final, projecto, intervenção arqueológica, intervencao arqueologica, escavação, escavacao, sondagens</text:p>
          </table:table-cell>
          <table:table-cell office:value-type="string">
            <text:p>Assinatura PDF</text:p>
          </table:table-cell>
          <table:table-cell office:value-type="string">
            <text:p>D:20100531123604+01'00' Writer OpenOffice.org 3.2 D:20100531140937+01'00' R e l a t ó r i o F i n a l 2009S e r p a – B l o c o d e R e g a B r i n c h e s E n x o é T r a b a l h o s a r q u e o l ó g i c o s e m 4M e i r i n h o FICHA TÉCNICA COORDENAÇÃO GERAL , RICARDO TEIXEIRA MESTRE EM ARQUEOLOGIA , VÍTOR FONSECA ARQUEÓLOGO COORDENAÇÃO DE PROJECTO , LÍDIA BAPTISTA MESTRE EM ARQUEOLOGIA TRABALHO DE CAMPO DIRECÇÃO , LÍDIA BAPTISTA MESTRE EM ARQUEOLOGIA ARQUEÓLOGOS , - BÁRBARA CARVALHO PÓS GRADUADA EM PATRIMÓNIO E PROJECTOS CULTURAIS RUI PINHEIRO ASSISTENTES DE ARQUEÓLOGO ANDRÉ SARAIVA NELSON VALE FRANCISCO BARROS EDUARDO FALCÃO TIAGO ROCHA VÍTOR ROMPANTE RODRY MENDONÇA TRABALHO DE GABINETE RELATÓRIO , LÍDIA BAPTISTA MESTRE EM ARQUEOLOGIA , LURDES CUNHA MESTRE EM ARQUEOLOGIA , SÉRGIO GOMES MESTRE EM ARQUEOLOGIA DESENHO GRÁFICO RODRY MENDONÇA TRATAMENTO DE ESPÓLIO FRANCISCO BARROS NELSON VALE CONSERVAÇÃO E RESTAURO , ANABELA HIPÓLITO TÉCNICA SUPERIOR DE CONSERVAÇÃO E RESTAURO FOTOGRAF...</text:p>
          </table:table-cell>
          <table:table-cell table:number-columns-repeated="1015"/>
        </table:table-row>
        <table:table-row table:style-name="ro1">
          <table:table-cell office:value-type="string">
            <text:p>178 BBE09 MT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415120713+01'00' Sergio Gomes Writer OpenOffice.org 3.1 D:20100421142722+01'00' R e l a t ó r i o F i n a l 2009S e r p a – B l o c o d e R e g a B r i n c h e s E n x o é T r a b a l h o s a r q u e o l ó g i c o s e m 3M o n t i n h o s – Bloco de Rega de Brinches Enxoé 3Trabalhos Arqueológicos em Montinhos FICHA TÉCNICA Coordenação Geral , , Ricardo Teixeira Arqueólogo Mestre em arqueologia , Vítor Fonseca Arqueólogo Coordenação de Projecto , Lídia Baptista Mestre em Arqueologia Trabalho de Campo Direcção , Lídia Baptista Mestre em Arqueologia Arqueólogos Assistentes de arqueólogo Francisco Barros José Grilo Trabalho de Gabinete Relatório , Lídia Baptista Mestre em Arqueologia , Lurdes Cunha Mestre em Arqueologia , Sérgio Gomes Mestre em Arqueologia Desenho gráfico Rodry Mendonça Tratamento de espólio Cláudio Jorge Francisco Barros João Molha José Grilo Nelson Vale Conservação e Restauro , Anabela Hipólito Técnica superior de Conservação e Restauro Fotografia de espólio João...</text:p>
          </table:table-cell>
          <table:table-cell table:number-columns-repeated="1015"/>
        </table:table-row>
        <table:table-row table:style-name="ro1">
          <table:table-cell office:value-type="string">
            <text:p>178 BBE09 REL PE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 Pistas usadas: relatório, relatorio, projecto, trabalhos arqueológicos, trabalhos arqueologicos.</text:p>
          </table:table-cell>
          <table:table-cell office:value-type="string">
            <text:p>relatório, relatorio, projecto, trabalhos arqueológicos, trabalhos arqueologicos</text:p>
          </table:table-cell>
          <table:table-cell office:value-type="string">
            <text:p>Assinatura PDF</text:p>
          </table:table-cell>
          <table:table-cell office:value-type="string">
            <text:p>D:20100427120545+01'00' Writer OpenOffice.org 3.1 D:20100427155928+01'00' R e l a t ó r i o P e r i ó d i c o 2010S e r p a M i n i m i z a ç ã o d e I m p a c t e s s o b r e o P a t r i m ó n i o C u l t u r a l – B l o c o d e R e g a B r i n c h e s E n x o é F a s e d e O b r a FICHA TÉCNICA COORDENAÇÃO GERAL , Ricardo Teixeira Mestre em arqueologia , Vítor Fonseca Arqueólogo COORDENAÇÃO DE PROJECTO , Lídia Baptista Mestre em arqueologia TRABALHO DE CAMPO DIRECÇÃO , Lídia Baptista Mestre em Arqueologia , Flávia Chaves Arqueóloga , Rui Pinheiro Arqueólogo ARQUEÓLOGOS ASSISTENTES DE ARQUEÓLOGO André Saraiva Francisco Barros Nelson Vale Eduardo Rodry Mendonça João Molha José Grilo Cláudio Jorge Tiago Rocha Vítor Rompante Luís Teixeira ANTROPOLOGIA Zélia Rodrigues OPERÁRIOS DE ARQUEOLOGIA Alexandre Pinto Francisco Moquenco Miguel Simões Pedro Pinto Pedro Za Minimização de Impactes sobre o Património Cultural Bloco de Rega de Brinches-Enxoé Fase de Obra TRABALHO DE GABINETE RELATÓRIO ,...</text:p>
          </table:table-cell>
          <table:table-cell table:number-columns-repeated="1015"/>
        </table:table-row>
        <table:table-row table:style-name="ro1">
          <table:table-cell office:value-type="string">
            <text:p>178_BBE_09_AG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7.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2123508Z Writer OpenOffice.org 3.1 D:20100312143218Z Relatório Final Porto 2010 Bloco de Rega de Brinches-Enxoé Intervenção Arqueológica em Águas Alvas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Nelson Vale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2 de Março de 2010 Intervenção Arqueológica em Águas Alvas ÍNDICE 1.Introdução...................................</text:p>
          </table:table-cell>
          <table:table-cell table:number-columns-repeated="1015"/>
        </table:table-row>
        <table:table-row table:style-name="ro1">
          <table:table-cell office:value-type="string">
            <text:p>178_BBE_09_AGA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3.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2123227Z Writer OpenOffice.org 3.1 D:20100312143506Z Relatório Final Porto 2010 Bloco de Rega de Brinches-Enxoé Intervenção Arqueológica em Águas Alvas 1 FICHA TÉCNICA COORDENAÇÃO GERAL Ricardo Teixeira, Arqueólogo, Mestre em arqueologia Vítor Fonseca, Arqueólogo COORDENAÇÃO DE PROJECTO Lídia Baptista, Mestre em arqueologia TRABALHO DE CAMPO Direcção Lídia Baptista Assistentes de arqueólogo André Saraiva Nelson Vale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2 de Março de 2010 Intervenção Arqueológica em Águas Alvas 1 ÍNDICE 1.Introdução......................................................</text:p>
          </table:table-cell>
          <table:table-cell table:number-columns-repeated="1015"/>
        </table:table-row>
        <table:table-row table:style-name="ro1">
          <table:table-cell office:value-type="string">
            <text:p>178_BBE_09_AL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4.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09204216Z Writer OpenOffice.org 3.1 D:20100311114337Z Relatório Final Porto 2010 Bloco de Rega de Brinches-Enxoé Intervenção Arqueológica em Alcaria 4 FICHA TÉCNICA COORDENAÇÃO GERAL Ricardo Teixeira, Arqueólogo, Mestre em Arqueologia Vítor Fonseca, Arqueólogo COORDENAÇÃO DE PROJECTO Lídia Baptista, Mestre em arqueologia TRABALHO DE CAMPO Direcção Lídia Baptista, Mestre em Arqueologia Bruno Paiva, Arqueólogo Arqueólogos Rui Pinheiro Assistentes de arqueólogo Francisco Barros Rogério Almeida Operários de arqueologia Alexandre Pinto TRABALHO DE GABINETE Relatório Lurdes Cunha, Mestre em Arqueologia Lídia Baptista, Mestre em Arqueologia Sérgio Gomes, Mestre em Arqueologia Desenho gráfico Apoio técnico e revisão de texto Lídia Baptista, Mestre em Arqueologia. DATA 9 de Março de 2010 Intervenção Arqueológica em Alcaria 4 ÍNDICE 1.Introdução.................................................................................................................................5 2.Situação de...</text:p>
          </table:table-cell>
          <table:table-cell table:number-columns-repeated="1015"/>
        </table:table-row>
        <table:table-row table:style-name="ro1">
          <table:table-cell office:value-type="string">
            <text:p>178_BBE_09_AL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7.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1094025Z Writer OpenOffice.org 3.1 D:20100311120119Z Relatório Final Porto 2010 Bloco de Rega de Brinches-Enxoé Intervenção Arqueológica em Alcaria 5 FICHA TÉCNICA COORDENAÇÃO GERAL Ricardo Teixeira, Mestre em Arqueologia Vítor Fonseca, Arqueólogo COORDENAÇÃO DE PROJECTO Lídia Baptista, Mestre em Arqueologia TRABALHO DE CAMPO Direcção Lídia Baptista, Mestre em Arqueologia Bruno Paiva, Arqueólogo Assistentes de arqueólogo Francisco Barros Rodry Mendonça Operários de arqueologia Alexandre Pinto TRABALHO DE GABINETE Relatório Lídia Baptista, Mestre em Arqueologia Lurdes Cunha, Mestre em Arqueologia Sérgio Gomes, Mestre em Arqueologia Desenho gráfico Rodry Mendonça Tratamento de espólio Francisco Barros, Assistente de Arqueólogo José Grilo, Assistente de Arqueólogo João Molha, Assistente de Arqueólogo Conservação e restauro Anabela Hipólito, Técnica Superior de Conservação e Restauro Fotografia de espólio João Molha Apoio técnico e revisão de texto Lídia Baptista, Mestre em Arqueo...</text:p>
          </table:table-cell>
          <table:table-cell table:number-columns-repeated="1015"/>
        </table:table-row>
        <table:table-row table:style-name="ro1">
          <table:table-cell office:value-type="string">
            <text:p>178_BBE_09_CR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6.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5173947Z Writer OpenOffice.org 3.1 D:20100316101954Z Relatório Final Porto 2010 Bloco de Rega de Brinches-Enxoé Intervenção Arqueológica em Cidade das Rosas 4 FICHA TÉCNICA COORDENAÇÃO GERAL Ricardo Teixeira, Arqueólogo, Mestre em arqueologia Vítor Fonseca, Arqueólogo COORDENAÇÃO DE PROJECTO Lídia Baptista, Mestre em arqueologia TRABALHO DE CAMPO Direcção Lídia Baptista, Mestre em arqueologia Lurdes Cunha, Mestre em Arqueologia Flávia Chaves, Arqueóloga Arqueólogos Rui Pinheiro Assistentes de arqueólogo André Saraiva Claúdio Jorge Francisco Barros José Grilo Operários de arqueologia Francisco Moquenco TRABALHO DE GABINETE Relatório Lurdes Cunha, Mestre em Arqueologia Lídia Baptista, Mestre em Arqueologia Sérgio Gomes, Mestre em Arqueologia Desenho gráfico Rodry Mendonça Tratamento de espólio Claúdio Jorge Francisco Barros João Molha José Grilo Nelson Vale Conservação e restauro Anabela Hipólito, Técnica Superior de Conservação e Restauro Fotografia de espólio João Molha Apoio...</text:p>
          </table:table-cell>
          <table:table-cell table:number-columns-repeated="1015"/>
        </table:table-row>
        <table:table-row table:style-name="ro1">
          <table:table-cell office:value-type="string">
            <text:p>178_BBE_09_FV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6111111Z Writer OpenOffice.org 3.1 D:20100317104315Z Relatório Final Porto 2010 Bloco de Rega de Brinches-Enxoé Intervenção arqueológica em Folha da Vereda 1 FICHA TÉCNICA COORDENAÇÃO GERAL Ricardo Teixeira, Arqueólogo, Mestre em arqueologia Vítor Fonseca, Arqueólogo COORDENAÇÃO DE PROJECTO Lídia Baptista, Mestre em arqueologia TRABALHO DE CAMPO Direcção Lídia Baptista, Mestre em arqueologia Assistentes de arqueólogo Tiago Rocha Vítor Rompante TRABALHO DE GABINETE Relatório Lurdes Cunha, Mestre em Arqueologia Lídia Baptista, Mestre em Arqueologia Sérgio Gomes, Mestre em Arqueologia Desenho gráfico Rodry Mendonça Tratamento de espólio Francisco Barros Conservação e restauro Anabela Hipólito, Técnica Superior de Conservação e Restauro Apoio técnico e revisão de texto Lídia Baptista, Mestre em Arqueologia. DATA 16 de Março de 2010 Intervenção Arqueológica em Folha da Vereda 1 ÍNDICE 1.Introdução.........................................................................................</text:p>
          </table:table-cell>
          <table:table-cell table:number-columns-repeated="1015"/>
        </table:table-row>
        <table:table-row table:style-name="ro1">
          <table:table-cell office:value-type="string">
            <text:p>178_BBE_09_MC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5121556Z Writer OpenOffice.org 3.1 D:20100315171423Z Relatório Final Porto 2010 Bloco de Rega de Brinches-Enxoé Intervenção arqueológica em Malhada do Carrapatelo 1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Nelson Vale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5 de Março de 2010 Intervenção Arqueológica em Malhada do Carrapatelo 1 ÍNDICE 1.Introdução.........</text:p>
          </table:table-cell>
          <table:table-cell table:number-columns-repeated="1015"/>
        </table:table-row>
        <table:table-row table:style-name="ro1">
          <table:table-cell office:value-type="string">
            <text:p>178_BBE_09_MC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cto, intervenção arqueológica, intervencao arqueologica, trabalhos arqueológicos, trabalhos arqueologicos.</text:p>
          </table:table-cell>
          <table:table-cell office:value-type="string">
            <text:p>relatório, relatorio, relatório final, relatorio final, projecto, intervenção arqueológica, intervencao arqueologica, trabalhos arqueológicos, trabalhos arqueologicos</text:p>
          </table:table-cell>
          <table:table-cell office:value-type="string">
            <text:p>Assinatura PDF</text:p>
          </table:table-cell>
          <table:table-cell office:value-type="string">
            <text:p>D:20100312134323Z Writer OpenOffice.org 3.1 D:20100312143906Z Relatório Final Porto 2010 Bloco de Rega de Brinches-Enxoé Intervenção Arqueológica em Malhada do Carrapatelo 2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Nelson Vale TRABALHO DE GABINETE Relatório Lurdes Cunha, Mestre em Arqueologia Lídia Baptista, Mestre em Arqueologia Sérgio Gomes, Mestre em Arqueologia Desenho gráfico Rodry Mendonça Tratamento de espólio Conservação e restauro Anabela Hipólito, Técnica Superior de Conservação e Restauro Fotografia de espólio Apoio técnico e revisão de texto Lídia Baptista, Mestre em Arqueologia. DATA 2 de Março de 2010 Intervenção Arqueológica em Malhada do Carrapatelo 2 ÍNDICE 1.Introdução........................................................................</text:p>
          </table:table-cell>
          <table:table-cell table:number-columns-repeated="1015"/>
        </table:table-row>
        <table:table-row table:style-name="ro1">
          <table:table-cell office:value-type="string">
            <text:p>178_BBE_09_MCH.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6.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2173833Z Writer OpenOffice.org 3.1 D:20100315101253Z Relatório Final Porto 2010 Bloco de Rega de Brinches-Enxoé Intervenção Arqueológica em Monte da Chilra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Nelson Vale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2 de Março de 2010 Intervenção Arqueológica em Monte da Chilra ÍNDICE 1.Introdução...........................</text:p>
          </table:table-cell>
          <table:table-cell table:number-columns-repeated="1015"/>
        </table:table-row>
        <table:table-row table:style-name="ro1">
          <table:table-cell office:value-type="string">
            <text:p>178_BBE_09_MCH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5102011Z Writer OpenOffice.org 3.1 D:20100315170439Z Relatório Final Porto 2010 Bloco de Rega de Brinches-Enxoé Intervenção Arqueológica em Monte da Chilra 1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Nelson Vale Operários de arqueologia Alexandre Pinto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5 de Março de 2010 Intervenção Arqueológica em Monte da Chilra...</text:p>
          </table:table-cell>
          <table:table-cell table:number-columns-repeated="1015"/>
        </table:table-row>
        <table:table-row table:style-name="ro1">
          <table:table-cell office:value-type="string">
            <text:p>178_BBE_09_MCH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5145441Z Writer OpenOffice.org 3.1 D:20100315171022Z Relatório Final Porto 2010 Bloco de Rega de Brinches-Enxoé Intervenção Arqueológica em Monte da Chilra 2 FICHA TÉCNICA COORDENAÇÃO GERAL Ricardo Teixeira, Arqueólogo, Mestre em arqueologia Vítor Fonseca, Arqueólogo COORDENAÇÃO DE PROJECTO Lídia Baptista, Mestre em arqueologia TRABALHO DE CAMPO Direcção Lídia Baptista, Mestre em arqueologia Assistentes de arqueólogo André Saraiva Operários de arqueologia Alexandre Pinto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5 de Março de 2010 Intervenção Arqueológica em Monte da Chilra 2 ÍNDICE 1.I...</text:p>
          </table:table-cell>
          <table:table-cell table:number-columns-repeated="1015"/>
        </table:table-row>
        <table:table-row table:style-name="ro1">
          <table:table-cell office:value-type="string">
            <text:p>178_BBE_09_MM.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09200109Z Writer OpenOffice.org 3.1 D:20100311113908Z Relatório Final Porto 2010 Bloco de Rega de Brinches-Enxoé Intervenção arqueológica em Monte de Medeiros FICHA TÉCNICA COORDENAÇÃO GERAL Ricardo Teixeira, Arqueólogo, Mestre em arqueologia Vítor Fonseca, Arqueólogo COORDENAÇÃO DE PROJECTO Lídia Baptista, Mestre em Arqueologia TRABALHO DE CAMPO Direcção Lídia Baptista, Mestre em Arqueologia Bruno Paiva, Arqueólogo. Arqueólogos Rui Pinheiro Assistentes de arqueólogo Francisco Barros Rogério Almeida Operários de arqueologia Alexandre Pinto TRABALHO DE GABINETE Relatório Lurdes Cunha, Mestre em Arqueologia Lídia Baptista, Mestre em Arqueologia Sérgio Gomes, Mestre em Arqueologia Desenho gráfico Rodry Mendonça Apoio técnico e revisão de texto Lídia Baptista, Mestre em Arqueologia DATA 9 de Março de 2010 Intervenção Arqueológica em Monte de Medeiros ÍNDICE 1.Introdução.....................................................................................................................</text:p>
          </table:table-cell>
          <table:table-cell table:number-columns-repeated="1015"/>
        </table:table-row>
        <table:table-row table:style-name="ro1">
          <table:table-cell office:value-type="string">
            <text:p>178_BBE_09_MM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9.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6100910Z Writer OpenOffice.org 3.1 D:20100316110658Z Relatório Final Porto 2010 Bloco de Rega de Brinches-Enxoé Intervenção Arqueológica em Monte de Medeiros 1 FICHA TÉCNICA COORDENAÇÃO GERAL Ricardo Teixeira, Arqueólogo, Mestre em arqueologia Vítor Fonseca, Arqueólogo COORDENAÇÃO DE PROJECTO Lídia Baptista, Mestre em arqueologia TRABALHO DE CAMPO Direcção Lurdes Cunha, Mestre em Arqueologia Flávia Chaves, Arqueóloga Assistentes de arqueólogo Claúdio Jorge TRABALHO DE GABINETE Relatório Lurdes Cunha, Mestre em Arqueologia Lídia Baptista, Mestre em Arqueologia Sérgio Gomes, Mestre em Arqueologia Desenho gráfico Tratamento de espólio Conservação e restauro Anabela Hipólito, Técnica Superior de Conservação e Restauro Fotografia de espólio Apoio técnico e revisão de texto Lídia Baptista, Mestre em Arqueologia. DATA 16 de Março de 2010 Intervenção Arqueológica em Monte de Medeiros 1 ÍNDICE 1.Introdução....................................................................................</text:p>
          </table:table-cell>
          <table:table-cell table:number-columns-repeated="1015"/>
        </table:table-row>
        <table:table-row table:style-name="ro1">
          <table:table-cell office:value-type="string">
            <text:p>178_BBE_09_MR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1.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1105700Z Writer OpenOffice.org 3.1 D:20100311115726Z Relatório Final Porto 2010 Bloco de Rega de Brinches-Enxoé Intervenção Arqueológica em Meirinho 5 FICHA TÉCNICA COORDENAÇÃO GERAL Ricardo Teixeira, Mestre em Arqueologia Vítor Fonseca, Arqueólogo COORDENAÇÃO DE PROJECTO Lídia Baptista, Mestre em arqueologia TRABALHO DE CAMPO Direcção Lídia Baptista, Mestre em Arqueologia Rui Pinheiro, Arqueólogo Assistentes de arqueólogo André Saraiva Nelson Vale Operários de arqueologia Alexandre Pinto TRABALHO DE GABINETE Relatório Lurdes Cunha, Mestre em Arqueologia Lídia Baptista, Mestre em Arqueologia Sérgio Gomes, Mestre em Arqueologia Desenho gráfico Rodry Mendonça Apoio técnico e revisão de texto Lídia Baptista, Mestre em Arqueologia. DATA 11 de Março de 2010 Intervenção Arqueológica em Meirinho 5 ÍNDICE 1.Introdução.................................................................................................................................5 2.Situação de referência..................</text:p>
          </table:table-cell>
          <table:table-cell table:number-columns-repeated="1015"/>
        </table:table-row>
        <table:table-row table:style-name="ro1">
          <table:table-cell office:value-type="string">
            <text:p>178_BBE_09_REL_TRI_MAR_20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 Pistas usadas: relatório, relatorio, projecto, trabalhos arqueológicos, trabalhos arqueologicos.</text:p>
          </table:table-cell>
          <table:table-cell office:value-type="string">
            <text:p>relatório, relatorio, projecto, trabalhos arqueológicos, trabalhos arqueologicos</text:p>
          </table:table-cell>
          <table:table-cell office:value-type="string">
            <text:p>Assinatura PDF</text:p>
          </table:table-cell>
          <table:table-cell office:value-type="string">
            <text:p>D:20100318122056Z Adobe Acrobat Pro Extended 9.0.0 D:20100318122056Z Adobe Acrobat Pro Extended 9.0.0 Relatório Periódico Beja 2010 Minimização de Impactes sobre o Património Cultural Bloco de Rega de Brinches-Enxoé Fase de Obra FICHA TÉCNICA COORDENAÇÃO GERAL Ricardo Teixeira, Arqueólogo, Mestre em arqueologia Vítor Fonseca, Arqueólogo COORDENAÇÃO DE PROJECTO Lídia Baptista, Mestre em arqueologia TRABALHO DE CAMPO Direcção Lídia Baptista, Mestre em Arqueologia Lurdes Oliveira, Mestre em Arqueologia Flávia Chaves, Arqueóloga Bruno Paiva, Arqueólogo Rui Pinheiro, Arqueólogo Arqueólogos Bárbara Carvalho, Arqueóloga Helena Marçal, Arqueóloga Ricardo Oliveira, Arqueólogo Francisco Raimundo, Arqueólogo Assistentes de arqueólogo André Saraiva Francisco Barros Nelson Vale Eduardo Rodry Mendonça João Molha José Grilo Claúdio Jorge Tiago Rocha Vitor Rompante Luís Teixeira Antropologia Zélia Rodrigues Operários de arqueologia Alexandre Pinto Francisco Moquenco Miguel Simões Pedro Pinto Pedro Za...</text:p>
          </table:table-cell>
          <table:table-cell table:number-columns-repeated="1015"/>
        </table:table-row>
        <table:table-row table:style-name="ro1">
          <table:table-cell office:value-type="string">
            <text:p>178_BBE_09_VE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4. Pistas usadas: relatório, relatorio, relatório final, relatorio final, projecto, intervenção arqueológica, intervencao arqueologica, escavação, escavacao, sondagem, sondagens, trabalhos arqueológicos.</text:p>
          </table:table-cell>
          <table:table-cell office:value-type="string">
            <text:p>relatório, relatorio, relatório final, relatorio final, projecto, intervenção arqueológica, intervencao arqueologica, escavação, escavacao, sondagem, sondagens, trabalhos arqueológicos</text:p>
          </table:table-cell>
          <table:table-cell office:value-type="string">
            <text:p>Assinatura PDF</text:p>
          </table:table-cell>
          <table:table-cell office:value-type="string">
            <text:p>D:20100316114301Z Writer OpenOffice.org 3.1 D:20100317115328Z Relatório Final Porto 2010 Bloco de Rega de Brinches-Enxoé Intervenção Arqueológica em Vale de Éguas 3 FICHA TÉCNICA COORDENAÇÃO GERAL Ricardo Teixeira, Arqueólogo, Mestre em arqueologia Vítor Fonseca, Arqueólogo COORDENAÇÃO DE PROJECTO Lídia Baptista, Mestre em arqueologia TRABALHO DE CAMPO Direcção Lídia Baptista, Mestre em arqueologia Arqueólogos Bruno Paiva Assistentes de arqueólogo André Saraiva Óperários de arqueologia Alexandre Pinto TRABALHO DE GABINETE Relatório Lurdes Cunha, Mestre em Arqueologia Lídia Baptista, Mestre em Arqueologia Sérgio Gomes, Mestre em Arqueologia Desenho gráfico Rodry Mendonça Tratamento de espólio Francisco Barros João Molha José Grilo Nelson Vale Conservação e restauro Anabela Hipólito, Técnica Superior de Conservação e Restauro Fotografia de espólio João Molha Apoio técnico e revisão de texto Lídia Baptista, Mestre em Arqueologia. DATA 16 de Março de 2010 Intervenção Arqueológica em Vale d...</text:p>
          </table:table-cell>
          <table:table-cell table:number-columns-repeated="1015"/>
        </table:table-row>
        <table:table-row table:style-name="ro1">
          <table:table-cell office:value-type="string">
            <text:p>179_BRA_Sinos.pdf</text:p>
          </table:table-cell>
          <table:table-cell office:value-type="string">
            <text:p>.pdf</text:p>
          </table:table-cell>
          <table:table-cell office:value-type="string">
            <text:p>Documento PDF</text:p>
          </table:table-cell>
          <table:table-cell table:style-name="ce2" office:value-type="string">
            <text:p>Não abre</text:p>
          </table:table-cell>
          <table:table-cell office:value-type="string">
            <text:p>Baixa</text:p>
          </table:table-cell>
          <table:table-cell office:value-type="string">
            <text:p>Documento PDF; o conteúdo não foi determinado automaticamente com segurança. Erro ao tentar extrair texto do PDF.</text:p>
          </table:table-cell>
          <table:table-cell/>
          <table:table-cell office:value-type="string">
            <text:p>Assinatura não identificada</text:p>
          </table:table-cell>
          <table:table-cell table:number-columns-repeated="1016"/>
        </table:table-row>
        <table:table-row table:style-name="ro1">
          <table:table-cell office:value-type="string">
            <text:p>180_IA_HPC0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0. Pistas usadas: relatório, relatorio, relatório final, relatorio final, projeto, projecto, intervenção arqueológica, intervencao arqueologica, acompanhamento arqueológico, acompanhamento arqueologico, sondagens.</text:p>
          </table:table-cell>
          <table:table-cell office:value-type="string">
            <text:p>relatório, relatorio, relatório final, relatorio final, projeto, projecto, intervenção arqueológica, intervencao arqueologica, acompanhamento arqueológico, acompanhamento arqueologico, sondagens</text:p>
          </table:table-cell>
          <table:table-cell office:value-type="string">
            <text:p>Assinatura PDF</text:p>
          </table:table-cell>
          <table:table-cell office:value-type="string">
            <text:p>D:20130423101556+01'00' Nitro Pro 8 (8. 0. 9. 8) D:20130307111957Z Nitro Pro 8 (8. 0. 9. 8) RELATÓRIO FINAL Intervenção Arqueológica Requalificação do Espaço Público no Morro da Sé Porto 2009/2010 Copyright © arqueologia e património Matosinhos 2011 HPC.09 Intervenção Arqueológica no Espaço Público do Morro da Sé FICHA TÉCNICA Ricardo Teixeira &amp; Vítor Fonseca, Arqueologia Lda. PROJECTO 180 Coordenação geral Ricardo Teixeira, arqueólogo, mestre em arqueologia Vítor Fonseca, arqueólogo Coordenação de projeto Jorge Fonseca, arqueólogo Trabalho de Campo Sondagens arqueológicas Direção Graça Pereira, arqueóloga Arqueólogos Helena Marçal, arqueóloga Assistentes de arqueólogo Carlos Barbosa Lisdália Mota Acompanhamento Arqueológico Direção Helena Marçal Arqueólogos Graça Pereira José Sendas Rui Pinheiro Assistentes de Arqueólogo André Saraiva Bebiana Mota Carlos Barbosa Lisdália Mota Ricardo Mota Operários de Arqueologia Alexandre Pinto Pedro Pinto Trabalho de Gabinete Coordenação Teresa Silv...</text:p>
          </table:table-cell>
          <table:table-cell table:number-columns-repeated="1015"/>
        </table:table-row>
        <table:table-row table:style-name="ro1">
          <table:table-cell office:value-type="string">
            <text:p>180_Morro_Se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 Pistas usadas: relatório, relatorio, relatório final, relatorio final, projecto, intervenção arqueológica, intervencao arqueologica, acompanhamento arqueológico, acompanhamento arqueologico, sondagem, sondagens, trabalhos arqueológicos.</text:p>
          </table:table-cell>
          <table:table-cell office:value-type="string">
            <text:p>relatório, relatorio, relatório final, relatorio final, projecto, intervenção arqueológica, intervencao arqueologica, acompanhamento arqueológico, acompanhamento arqueologico, sondagem, sondagens, trabalhos arqueológicos</text:p>
          </table:table-cell>
          <table:table-cell office:value-type="string">
            <text:p>Assinatura PDF</text:p>
          </table:table-cell>
          <table:table-cell office:value-type="string">
            <text:p>D:20090923145544+01'00' D:20090923145544+01'00' RELATÓRIO PRELIMINAR PORTO - 2009 INTERVENÇÃO ARQUEOLÓGICA NO “ESPAÇO PÚBLICO DO MORRO DA SÉ” Intervenção Arqueológica no Espaço Público do Morro da Sé, Porto FICHA TÉCNICA COORDENAÇÃO GERAL Ricardo Teixeira Vítor Fonseca COORDENAÇÃO DE PROJECTO Jorge Fonseca TRABALHO DE CAMPO Direcção Arqueólogos Assistente de Arqueólogo Graça Pereira Helena Marçal Carlos Barbosa Lisdália Mota TRABALHO DE GABINETE Descrição e interpretação da intervenção arqueológica Graça Pereira Desenho gráfico Ana Paulo Revisão de texto DATA Teresa Silva 23 de Setembro de 2009 Relatório Preliminar Setembro de 2009 Página 1 de 9 Intervenção Arqueológica no Espaço Público do Morro da Sé, Porto Índice 1.Introdução................................................................................................................. 3 2.Metodologia............................................................................................................... 4 3.A Intervenção Arq...</text:p>
          </table:table-cell>
          <table:table-cell table:number-columns-repeated="1015"/>
        </table:table-row>
        <table:table-row table:style-name="ro1">
          <table:table-cell office:value-type="string">
            <text:p>181b_Rel_2016_06_0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601143656+01'00' Writer OpenOffice 4.1.2 D:20160601160038+01'00' RELATÓRIO FINAL Intervenção Arqueológica Rua de Cedofeita, 5 a 9 Porto 2016 Copyright © arqueologia e património Matosinhos 2016 CDF 5.16 Intervenção Arqueológica Rua de Cedofeita, 5 a 9 FICHA TÉCNICA Ricardo Teixeira &amp; Vítor Fonseca, Arqueologia Lda. PROJECTO 181b Coordenação geral Ricardo Teixeira, Arqueólogo, mestre em arqueologia Vítor Fonseca, arqueólogo Coordenação de projeto Jorge Fonseca, arqueólogo Trabalho de Campo Direção Graça Pereira, arqueóloga Trabalho de Gabinete Relatório Graça Pereira Francisco Raimundo (introdução histórica) Desenho gráfico Rui Oliveira Tratamento de espólio Anabela Rodrigues, assistente de arqueólogo Teresa Gonçalves, assistente de arqueólogo Fotografia de espólio Teresa Gonçalves Apoio técnico e revisão de texto Teresa Silva, arqueóloga, pós-graduada em museologia Data Abril de 2016 relatório final página 3 de 33</text:p>
          </table:table-cell>
          <table:table-cell table:number-columns-repeated="1015"/>
        </table:table-row>
        <table:table-row table:style-name="ro1">
          <table:table-cell office:value-type="string">
            <text:p>181_IA_Rel_Fin_Cedofeit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10726160330+01'00' teresasilva PScript5.dll Version 5.2 Acrobat Distiller 8.1.0 (Windows) D:20110816111054+01'00' 181 Rel Fin RELATÓRIO FINAL Intervenção Arqueológica Rua de Cedofeita, 5-7-9 Porto 2009 Copyright © arqueologia e património Matosinhos 2011 Intervenção Arqueológica na Rua de Cedofeita, 5-7-9 FICHA TÉCNICA Ricardo Teixeira &amp; Vítor Fonseca Arqueologia Lda. PROJECTO 181 Coordenação geral Ricardo Teixeira, arqueólogo, mestre em arqueologia Vítor Fonseca, arqueólogo Coordenação de projecto Jorge Fonseca, arqueólogo TRABALHO DE CAMPO Arqueólogos Graça Pereira, arqueóloga Francisco Raimundo, arqueólogo Assistentes de arqueólogo Ricardo Mota TRABALHO DE GABINETE Relatório Francisco Raimundo Jorge Fonseca Desenho gráfico Ana Paulo, desenhadora de arqueologia Tratamento de espólio Paula Alves, auxiliar Teresa Gonçalves, assistente de arqueólogo Fotografia de espólio Pedro Maia, técnico superior de gestão do património Apoio técnico e revisão de texto Teresa Silva, arqueóloga,...</text:p>
          </table:table-cell>
          <table:table-cell table:number-columns-repeated="1015"/>
        </table:table-row>
        <table:table-row table:style-name="ro1">
          <table:table-cell office:value-type="string">
            <text:p>182 falta.rtf</text:p>
          </table:table-cell>
          <table:table-cell office:value-type="string">
            <text:p>.rtf</text:p>
          </table:table-cell>
          <table:table-cell office:value-type="string">
            <text:p>Documento RTF</text:p>
          </table:table-cell>
          <table:table-cell office:value-type="string">
            <text:p>Dados SIG / GIS</text:p>
          </table:table-cell>
          <table:table-cell office:value-type="string">
            <text:p>Baixa</text:p>
          </table:table-cell>
          <table:table-cell office:value-type="string">
            <text:p>Documento RTF; o conteúdo aparenta corresponder a dados sig / gis. O ficheiro foi lido como texto com codificação utf-8-sig. Pistas usadas: sig.</text:p>
          </table:table-cell>
          <table:table-cell office:value-type="string">
            <text:p>sig</text:p>
          </table:table-cell>
          <table:table-cell office:value-type="string">
            <text:p>Possível JSON/texto estruturado</text:p>
          </table:table-cell>
          <table:table-cell office:value-type="string">
            <text:p>{\rtf1}</text:p>
          </table:table-cell>
          <table:table-cell table:number-columns-repeated="1015"/>
        </table:table-row>
        <table:table-row table:style-name="ro1">
          <table:table-cell office:value-type="string">
            <text:p>183_EIA1_ponte_barc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6. Pistas usadas: relatório, relatorio, projecto, prospecção, prospeccao.</text:p>
          </table:table-cell>
          <table:table-cell office:value-type="string">
            <text:p>relatório, relatorio, projecto, prospecção, prospeccao</text:p>
          </table:table-cell>
          <table:table-cell office:value-type="string">
            <text:p>Assinatura PDF</text:p>
          </table:table-cell>
          <table:table-cell office:value-type="string">
            <text:p>D:20090923175716+01'00' liliana barbosa Writer OpenOffice.org 3.1 D:20091007181034+01'00' RELATÓRIO PONTE DA BARCA - 2009 CARACTERIZAÇÃO DA SITUAÇÃO DE REFERÊNCIA DO PATRIMÓNIO CULTURAL Caracterização da Situação de Referência - Ponte Sobre o Rio Lima – Ponte da Barca Índice 1. Introdução................................................................................................................ 3 2. Metodologia do Estudo.................................................................................................. 4 3. Caracterização da Situação de Referência .......................................................................... 5 3.1. Área de Incidência do Projecto................................................................................. 5 3.1.1. Ponte sobre o Rio Lima..................................................................................... 5 3.2. Área Envolvente.................................................................................................</text:p>
          </table:table-cell>
          <table:table-cell table:number-columns-repeated="1015"/>
        </table:table-row>
        <table:table-row table:style-name="ro1">
          <table:table-cell office:value-type="string">
            <text:p>183_EIA_2ponte_barcaReap.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desenho / planta / cad. Foram analisadas as primeiras 4 página(s) de um total de 16. Pistas usadas: corte, alçado, alcado, levantamento.</text:p>
          </table:table-cell>
          <table:table-cell office:value-type="string">
            <text:p>corte, alçado, alcado, levantamento</text:p>
          </table:table-cell>
          <table:table-cell office:value-type="string">
            <text:p>Assinatura PDF</text:p>
          </table:table-cell>
          <table:table-cell office:value-type="string">
            <text:p>D:20100128121840Z liliana barbosa Adobe Acrobat 8.1 Combine Files Adobe Acrobat 8.1 D:20100128125036Z Parecer Técnico Porto 2010 Reapreciação da Caracterização da Situação de Referência da Ponte da Barca FICHA TÉCNICA COORDENAÇÃO GERAL Ricardo Teixeira Direcção Científica Liliana Barbosa e Teresa Silva TRABALHO DE GABINETE Reapreciação Liliana Barbosa Revisão Vítor Fonseca DATA 28 de Janeiro de 2010 Reapreciação da Caracterização da Situação de Referência - Ponte da Barca Sobre o Rio Lima ÍNDICE 1. Introdução................................................................................................................................5 2. Orientações Metodológicas............................................................................................................ 6 3. Análise da informação..................................................................................................................8 4. Recomendações................................................................</text:p>
          </table:table-cell>
          <table:table-cell table:number-columns-repeated="1015"/>
        </table:table-row>
        <table:table-row table:style-name="ro1">
          <table:table-cell office:value-type="string">
            <text:p>184_CRA_957_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7. Pistas usadas: relatório, relatorio, relatório final, relatorio final, projecto, intervenção arqueológica, intervencao arqueologica, acompanhamento arqueológico, acompanhamento arqueologico, sondagens, trabalhos arqueológicos, trabalhos arqueologicos.</text:p>
          </table:table-cell>
          <table:table-cell office:value-type="string">
            <text:p>relatório, relatorio, relatório final, relatorio final, projec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office:value-type="string">
            <text:p>D:20100609132604+01'00' teresasilva PScript5.dll Version 5.2 Acrobat Distiller 8.1.0 (Windows) D:20100618160648+01'00' 184 rel 2010 06 01 Relatório Final Porto 2010 Intervenção Arqueológica na Rua do Crasto, 957 – CRA 957.10 Intervenção Arqueológica na Rua do Crasto, 957 – CRA 957.10 FICHA TÉCNICA COORDENAÇÃO GERAL Ricardo Teixeira, Arqueólogo, Mestre em arqueologia Vítor Fonseca, Arqueólogo COORDENAÇÃO DE PROJECTO Jorge Fonseca, Arqueólogo TRABALHO DE CAMPO Direcção Francisco Raimundo, Arqueólogo Ricardo Oliveira, Arqueólogo Arqueólogos Bárbara Carvalho Assistentes de arqueólogo Bebiana Mota Lisdália Mota Ricardo Mota Operários de arqueologia Alexandre Pinto Pedro Pinto TRABALHO DE GABINETE Enquadramento Histórico Lídia Baptista Relatório intervenção arqueológica Francisco Raimundo Ricardo Oliveira Desenho gráfico sondagens Rui Oliveira Desenho Ana Paulo Tratamento de espólio Paula Alves Teresa Gonçalves Anabela Rodrigues Fotografia de espólio Pedro Maia Revisão Jorge Fonseca DATA Jun...</text:p>
          </table:table-cell>
          <table:table-cell table:number-columns-repeated="1015"/>
        </table:table-row>
        <table:table-row table:style-name="ro1">
          <table:table-cell office:value-type="string">
            <text:p>185_CCC09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GPL Ghostscript 9.14 D:20210907092552+01'00' D:20210907092552+01'00' Igespar PDF24 Creator FichaSitio RELATÓRIO FINAL INTERVENÇÃO ARQUEOLÓGICA ALA NASCENTE DO CONVENTO CORPUS CHRISTI VILA NOVA DE GAIA 2009 Copyright © arqueologia e património Matosinhos 2021 CCC.09 Intervenção Arqueológica Convento Corpus Christi – CCC.09 FICHA TÉCNICA Ricardo Teixeira &amp; Vítor Fonseca, Arqueologia Lda. PROJECTO 185 Coordenação geral Ricardo Teixeira, arqueólogo, mestre em arqueologia Vítor Fonseca, arqueólogo Coordenação de projeto Jorge Fonseca, arqueólogo Trabalho de Campo Direção Helena Marçal, arqueóloga Arqueólogos Francisco Raimundo, arqueólogo Ricardo Oliveira, arqueólogo Assistentes de arqueólogo Bebiana Mota Lisdália Mota Ricardo Mota Trabalho de Gabinete Relatório Jorge Fonseca Helena Marçal Desenho gráfico Rui Oliveira Tratamento de espólio Anabela Rodrigues, assistente de arqueólogo Teresa Gonçalves, assistente de arqueólogo Conservação e restauro Anabela Hipólito, técnica superior de conse...</text:p>
          </table:table-cell>
          <table:table-cell table:number-columns-repeated="1015"/>
        </table:table-row>
        <table:table-row table:style-name="ro1">
          <table:table-cell office:value-type="string">
            <text:p>186_CA_Amar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aparenta corresponder a relatório de projeto / intervenção arqueológica. Foram analisadas as primeiras 4 página(s) de um total de 198. Pistas usadas: projecto.</text:p>
          </table:table-cell>
          <table:table-cell office:value-type="string">
            <text:p>projecto</text:p>
          </table:table-cell>
          <table:table-cell office:value-type="string">
            <text:p>Assinatura PDF</text:p>
          </table:table-cell>
          <table:table-cell office:value-type="string">
            <text:p>D:20110913164802+01'00' arqueologogeral PScript5.dll Version 5.2 Adobe Acrobat 8.1 D:20110913164943+01'00' 186 Rel_ 3 2011 09 13 REV LILI Amares 2011 Carta Arqueológica do Concelho de Amares Carta Arqueológica do Concelho de Amares FICHA TÉCNICA COORDENAÇÃO GERAL Ricardo Teixeira, Arqueólogo, Mestre em arqueologia Vítor Fonseca, Arqueólogo Coordenação do projecto Liliana Barbosa, Arqueóloga TRABALHO DE CAMPO Arqueólogos Liliana Barbosa e Jorge Fonseca Técnico Superior de Gestão do Património Pedro Maia Técnica de Arqueologia Lisdália Mota TRABALHO DE GABINETE Elaboração da Carta Arqueológica Liliana Barbosa Elementos para o Regulamento Ricardo Teixeira Pesquisa bibliográfica Liliana Barbosa Apoio técnico aos trabalhos de gabinete Pedro Maia Revisão de Conteúdos Ricardo Teixeira Revisão de Texto Teresa Silva Data Setembro de 2011 Setembro de 2011 Página 3 de 55</text:p>
          </table:table-cell>
          <table:table-cell table:number-columns-repeated="1015"/>
        </table:table-row>
        <table:table-row table:style-name="ro1">
          <table:table-cell office:value-type="string">
            <text:p>189_Rel_Portal_Arouca_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3. Pistas usadas: relatório, relatorio, relatório final, relatorio final, projecto, trabalhos arqueológicos, trabalhos arqueologicos.</text:p>
          </table:table-cell>
          <table:table-cell office:value-type="string">
            <text:p>relatório, relatorio, relatório final, relatorio final, projecto, trabalhos arqueológicos, trabalhos arqueologicos</text:p>
          </table:table-cell>
          <table:table-cell office:value-type="string">
            <text:p>Assinatura PDF</text:p>
          </table:table-cell>
          <table:table-cell office:value-type="string">
            <text:p>D:20100517125136+01'00' Writer OpenOffice.org 3.2 D:20100517125516+01'00' Relatório 1ª Fase Porto 2009 Estudo e Levantamento das Peças existentes no Antigo Portal do Terreiro – Mosteiro de Arouca FICHA TÉCNICA COORDENAÇÃO GERAL Ricardo Teixeira, Arqueólogo, Mestre em arqueologia Vítor Fonseca, Arqueólogo COORDENAÇÃO DE PROJECTO Anabela Hipólito, Técnica Superior de Conservação e Restauro Teresa Silva – Licenciada em História, Variante de Arqueologia TRABALHO DE CAMPO Direcção Anabela Hipólito Vítor Fonseca Operários de arqueologia Alexandre Pinto Pedro Pinto TRABALHO DE GABINETE Relatório Anabela Hipólito Pedro Maia Vitor Fonseca Desenho gráfico António Silva Conservação e restauro Anabela Hipólito Fotografia de espólio Alexandre Pinto Pedro Maia DATA 14 de Maio de 2010 Estudo e Levantamento das Peças existentes no Antigo Portal do Terreiro – Mosteiro de Arouca ÍNDICE 1.INTRODUÇÃO..............................................................................................................</text:p>
          </table:table-cell>
          <table:table-cell table:number-columns-repeated="1015"/>
        </table:table-row>
        <table:table-row table:style-name="ro1">
          <table:table-cell office:value-type="string">
            <text:p>189_Rel_Portal_Arouca_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21120113243Z pedromaia PScript5.dll Version 5.2.2 Acrobat Distiller 8.1.0 (Windows) D:20121120113824Z 189 REL Acomp 2012 11 20 RELATÓRIO FINAL Acompanhamento de Montagem Portal do Terreiro de Santa Mafalda Arouca 2012 Copyright © arqueologia e património Matosinhos 2012 Acompanhamento de Montagem Portal do Terreiro de Santa Mafalda FICHA TÉCNICA Ricardo Teixeira &amp; Vítor Fonseca, Arqueologia Lda. PROJECTO 189 Coordenação geral Ricardo Teixeira, arqueólogo, mestre em arqueologia Vítor Fonseca, arqueólogo Coordenação de projecto Anabela Hipólito, mestre em conservação e restauro Trabalho de Gabinete Relatório Anabela Hipólito Desenho gráfico António Silva Fotografia de espólio Pedro Maia, técnico superior de gestão do património Apoio técnico e revisão de texto Pedro Maia Teresa Silva, arqueóloga, pós-graduada em museologia Data 20 de Novembro de 2012 relatório final página 3 de 31</text:p>
          </table:table-cell>
          <table:table-cell table:number-columns-repeated="1015"/>
        </table:table-row>
        <table:table-row table:style-name="ro1">
          <table:table-cell office:value-type="string">
            <text:p>190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191_IA MANC_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92. Pistas usadas: relatório, relatorio, relatório final, relatorio final, projeto, projecto, intervenção arqueológica, intervencao arqueologica, acompanhamento arqueológico, acompanhamento arqueologico, escavação, escavacao.</text:p>
          </table:table-cell>
          <table:table-cell office:value-type="string">
            <text:p>relatório, relatorio, relatório final, relatorio final, projeto, projecto, intervenção arqueológica, intervencao arqueologica, acompanhamento arqueológico, acompanhamento arqueologico, escavação, escavacao</text:p>
          </table:table-cell>
          <table:table-cell office:value-type="string">
            <text:p>Assinatura PDF</text:p>
          </table:table-cell>
          <table:table-cell office:value-type="string">
            <text:p>D:20121001174630+01'00' teresasilva PScript5.dll Version 5.2.2 Acrobat Distiller 8.1.0 (Windows) D:20121029125227Z 191 rel conjunto 2012 10 01 Copyright © arqueologia e património Matosinhos 2011 Intervenção Arqueológica Mosteiro de Ancede FICHA TÉCNICA Ricardo Teixeira &amp; Vítor Fonseca, Arqueologia Lda. PROJECTO 191 Coordenação geral Ricardo Teixeira, arqueólogo, mestre em arqueologia Vítor Fonseca, arqueólogo Apoio científico Ricardo Teixeira Coordenação de projeto Jorge Fonseca, arqueólogo Teresa Silva, arqueóloga, pós-graduada em museologia TRABALHO DE CAMPO – ACOMPANHAMENTO ARQUEOLÓGICO, REGISTO E ESTUDO DE EDIFICADO Coordenação Teresa Silva Registos Bebiana Mota, assistente de arqueólogo Ricardo Mota, assistente de arqueólogo (apoio) TRABALHO DE CAMPO – SONDAGENS ARQUEOLÓGICAS Direção Jorge Fonseca Assistentes de arqueólogo Bebiana Mota Ricardo Mota Operários Pedro Pinto Alexandre Pinto Antropólogo Bruno Carvalho TRABALHO DE GABINETE - ACOMPANHAMENTO ARQUEOLÓGICO, REGISTO E ESTUDO...</text:p>
          </table:table-cell>
          <table:table-cell table:number-columns-repeated="1015"/>
        </table:table-row>
        <table:table-row table:style-name="ro1">
          <table:table-cell office:value-type="string">
            <text:p>193_IA_MP_ACOM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8.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111221105906Z jorgefonseca PScript5.dll Version 5.2 Acrobat Distiller 8.1.0 (Windows) D:20111221160801Z 193 Rel Fin 2011 12 19 Copyright © arqueologia e património Matosinhos 2011 Sistema de Metro Ligeiro da Área Metropolitana do Porto Duplicação da Linha P Procedimento AIA nº 880/Pós-avaliação nº 103 Acompanhamento Arqueológico MP-ACOMP_P03.10 Ricardo Teixeira &amp; Vítor Fonseca, Arqueologia Lda. TRABALHO DE CAMPO Direcção Jorge Fonseca, arqueólogo Helena Marçal, arqueóloga Arqueóloga Rita Canedo Assistente de arqueólogo Lisdália Mota Operário de arqueologia Alexandre Pinto TRABALHO DE GABINETE Relatório Jorge Fonseca Helena Marçal Pesquisa bibliográfica e enquadramento histórico Pedro Maia, técnico superior de gestão do património Desenho gráfico Rui Oliveira, desenhador de arqueologia Tratamento de espólio Anabela Rodrigues, assistente de arqueólogo Teresa Gonçalves, assistente de arqueólogo Paula Alves, auxiliar Fotografia de espólio Pedro Maia Conservação e Restauro Anabela Hipól...</text:p>
          </table:table-cell>
          <table:table-cell table:number-columns-repeated="1015"/>
        </table:table-row>
        <table:table-row table:style-name="ro1">
          <table:table-cell office:value-type="string">
            <text:p>194_IA_PRT_RUADHUG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6.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GPL Ghostscript 9.14 D:20161017175057+01'00' D:20161017175057+01'00' Igespar PDF24 Creator FichaSitio RELATÓRIO FINAL Intervenção Arqueológica Rua D. Hugo, nº 33 Porto 2010 Copyright © arqueologia e património Matosinhos 2016 HUG 33.10 Intervenção Arqueológica na rua D. Hugo, nº 33 - HUG33.10 FICHA TÉCNICA Ricardo Teixeira &amp; Vítor Fonseca, Arqueologia Lda. PROJECTO 194 Coordenação geral Ricardo Teixeira, arqueólogo, mestre em arqueologia Vítor Fonseca, arqueólogo TRABALHO DE CAMPO Direção Jorge Fonseca Assistentes de arqueólogo André Saraiva Bebiana Mota Lisdália Mota Ricardo Mota Operários de arqueologia Alexandre Pinto Pedro Pinto TRABALHO DE GABINETE Relatório Jorge Fonseca Pesquisa bibliográfica e enquadramento histórico Helena Marçal, arqueóloga Desenho gráfico Rui Oliveira Tratamento de espólio Anabela Rodrigues, assistente de arqueólogo Teresa Gonçalves, assistente de arqueólogo Fotografia de espólio Pedro Maia, técnico superior de gestão do património Apoio técnico e revisão de...</text:p>
          </table:table-cell>
          <table:table-cell table:number-columns-repeated="1015"/>
        </table:table-row>
        <table:table-row table:style-name="ro1">
          <table:table-cell office:value-type="string">
            <text:p>194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1. Pistas usadas: relatório, relatorio, projecto, intervenção arqueológica, intervencao arqueologica.</text:p>
          </table:table-cell>
          <table:table-cell office:value-type="string">
            <text:p>relatório, relatorio, projecto, intervenção arqueológica, intervencao arqueologica</text:p>
          </table:table-cell>
          <table:table-cell office:value-type="string">
            <text:p>Assinatura PDF</text:p>
          </table:table-cell>
          <table:table-cell office:value-type="string">
            <text:p>D:20110617150520+01'00' teresasilva PScript5.dll Version 5.2 Acrobat Distiller 8.1.0 (Windows) D:20110617151418+01'00' 194 Rel Prel revisto Relatório Preliminar Intervenção Arqueológica Rua D. Hugo nº 33 Freguesia da Sé Porto HUG 33. 10 Matosinhos 2011 Intervenção Arqueológica na Rua D. Hugo, nº 33 – HUG 33. 10 FICHA TÉCNICA COORDENAÇÃO GERAL Ricardo Teixeira, Arqueólogo, Mestre em arqueologia Vítor Fonseca, Arqueólogo COORDENAÇÃO DE PROJECTO Jorge Fonseca, Arqueólogo TRABALHO DE CAMPO Direcção Jorge Fonseca Assistentes de arqueólogo André Saraiva Bebiana Mota Lisdália Mota Ricardo Mota Operários de arqueologia Alexandre Pinto Pedro Pinto TRABALHO DE GABINETE Relatório Jorge Fonseca Tratamento de espólio Anabela Rodrigues, Assistente de arqueólogo Paula Alves Teresa Gonçalves, Assistente de arqueólogo Fotografia de espólio Pedro Maia, Técnico Superior de Gestão do Património Apoio técnico e revisão de texto Teresa Silva, Arqueóloga, pós-graduada em Museologia DATA 17 de Junho de 2011 R...</text:p>
          </table:table-cell>
          <table:table-cell table:number-columns-repeated="1015"/>
        </table:table-row>
        <table:table-row table:style-name="ro1">
          <table:table-cell office:value-type="string">
            <text:p>196_LOS60_1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121220124018Z teresasilva PScript5.dll Version 5.2.2 Acrobat Distiller 8.1.0 (Windows) D:20121221163122Z 196 rel Copyright © arqueologia e património Matosinhos 2012 Acompanhamento Arqueológico Largo dos Lóios, 60-61 FICHA TÉCNICA Ricardo Teixeira &amp; Vítor Fonseca, Arqueologia Lda. PROJECTO 196 Coordenação geral Ricardo Teixeira, arqueólogo, mestre em arqueologia Vítor Fonseca, arqueólogo Trabalho de Campo Direcção Teresa Silva, arqueóloga, pós-graduada em museologia Trabalho de Gabinete Relatório Teresa Silva Revisão de Texto Pedro Maia, técnico superior de gestão do património Desenho gráfico Rui Oliveira Data 21 de Dezembro de 2012 relatório final página 3 de 17</text:p>
          </table:table-cell>
          <table:table-cell table:number-columns-repeated="1015"/>
        </table:table-row>
        <table:table-row table:style-name="ro1">
          <table:table-cell office:value-type="string">
            <text:p>197_IA_SFO20_1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6. Pistas usadas: relatório, relatorio, relatório final, relatorio final, projecto, trabalhos arqueológicos, trabalhos arqueologicos.</text:p>
          </table:table-cell>
          <table:table-cell office:value-type="string">
            <text:p>relatório, relatorio, relatório final, relatorio final, projecto, trabalhos arqueológicos, trabalhos arqueologicos</text:p>
          </table:table-cell>
          <table:table-cell office:value-type="string">
            <text:p>Assinatura PDF</text:p>
          </table:table-cell>
          <table:table-cell office:value-type="string">
            <text:p>D:20120710105525+01'00' lilianabarbosa PScript5.dll Version 5.2.2 Acrobat Distiller 8.1.0 (Windows) D:20120710110416+01'00' 197 REL 2012 07 10 Copyright © arqueologia e património Matosinhos 2012 Relatório Final Trabalhos Arqueológicos Rua S. Francisco FICHA TÉCNICA Ricardo Teixeira &amp; Vítor Fonseca, Arqueologia Lda. PROJECTO 197 Coordenação geral Ricardo Teixeira, arqueólogo, mestre em arqueologia Vítor Fonseca, arqueólogo Trabalho de Campo Direção Graça Pereira, arqueóloga Liliana Barbosa, arqueóloga Trabalho de Gabinete Relatório Liliana Barbosa Desenho gráfico Rui Oliveira Revisão de texto Teresa Silva, arqueóloga, pós-graduada em museologia Data 10 de Julho de 2012 relatório final página 3 de 15</text:p>
          </table:table-cell>
          <table:table-cell table:number-columns-repeated="1015"/>
        </table:table-row>
        <table:table-row table:style-name="ro1">
          <table:table-cell office:value-type="string">
            <text:p>198_CSR_Caminha E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3. Pistas usadas: relatório, relatorio, prospecção, prospeccao.</text:p>
          </table:table-cell>
          <table:table-cell office:value-type="string">
            <text:p>relatório, relatorio, prospecção, prospeccao</text:p>
          </table:table-cell>
          <table:table-cell office:value-type="string">
            <text:p>Assinatura PDF</text:p>
          </table:table-cell>
          <table:table-cell office:value-type="string">
            <text:p>D:20101018163742+01'00' teresasilva PScript5.dll Version 5.2 Acrobat Distiller 8.2.3 (Windows) D:20101018164031+01'00' 198 relatorio 2010 10 18 Relatório Porto 2010 Caracterização da Situação de Referência - EN13 Ponte Nova sobre o rio Âncora ao km 81+930, PI em Vila Praia de Âncora ao km 82+890, PI em Vila Praia de Âncora ao km 83+073, PI em Vila Praia de Âncora ao km 83+210, PS em Vila Praia de Âncora ao km 83+633 e PS em Moledo ao km 87+356/Reabilitação das obras de arte Caminha – Âncora, Vila Praia de Âncora e Moledo Caracterização da Situação de Referência - EN13 FICHA TÉCNICA COORDENAÇÃO GERAL Ricardo Teixeira, Arqueólogo, Mestre em arqueologia Vítor Fonseca, Arqueólogo Direcção Teresa Silva, arqueóloga Análise da documentação, pesquisa e cartografia Teresa Silva Pedro Maia, Técnico superior de património cultural Prospecção Teresa Silva Pedro Maia Fotografia Pedro Maia Teresa Silva Relatório Teresa Silva Apoio técnico e revisão de texto Pedro Maia DATA Outubro de 2010 Relatório...</text:p>
          </table:table-cell>
          <table:table-cell table:number-columns-repeated="1015"/>
        </table:table-row>
        <table:table-row table:style-name="ro1">
          <table:table-cell office:value-type="string">
            <text:p>199_CSR_Arcos E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5. Pistas usadas: relatório, relatorio, prospecção, prospeccao.</text:p>
          </table:table-cell>
          <table:table-cell office:value-type="string">
            <text:p>relatório, relatorio, prospecção, prospeccao</text:p>
          </table:table-cell>
          <table:table-cell office:value-type="string">
            <text:p>Assinatura PDF</text:p>
          </table:table-cell>
          <table:table-cell office:value-type="string">
            <text:p>D:20120403123818+01'00' pedromaia PScript5.dll Version 5.2.2 Acrobat Distiller 8.1.0 (Windows) D:20120410105015+01'00' 199 relatorio 2011 04 20 Relatório Porto 2012 Caracterização da Situação de Referência Estrada Municipal 202-1 Ponte sobre o Rio Vez ao km 2+687 e sub-obras/Reabilitação das obras de arte Arcos de Valdevez – Paçô e Santar Caracterização da Situação de Referência – EM 202-1 Ponte entre Paçô e Santar FICHA TÉCNICA COORDENAÇÃO GERAL Ricardo Teixeira, Arqueólogo, Mestre em arqueologia Vítor Fonseca, Arqueólogo Direcção Teresa Silva, Arqueóloga Análise da documentação, pesquisa e cartografia Teresa Silva Pedro Maia, Técnico superior de património cultural Prospecção Teresa Silva Pedro Maia Fotografia Pedro Maia Teresa Silva Relatório Teresa Silva Apoio técnico e revisão de texto Pedro Maia Liliana Barbosa DATA Abril de 2012 Relatório Abril de 2012 Página 3 de 28</text:p>
          </table:table-cell>
          <table:table-cell table:number-columns-repeated="1015"/>
        </table:table-row>
        <table:table-row table:style-name="ro1">
          <table:table-cell office:value-type="string">
            <text:p>200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03_CSR_4_Pontes_Bej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2. Pistas usadas: relatório, relatorio, projecto.</text:p>
          </table:table-cell>
          <table:table-cell office:value-type="string">
            <text:p>relatório, relatorio, projecto</text:p>
          </table:table-cell>
          <table:table-cell office:value-type="string">
            <text:p>Assinatura PDF</text:p>
          </table:table-cell>
          <table:table-cell office:value-type="string">
            <text:p>D:20110113113640Z jorgefonseca PScript5.dll Version 5.2 Acrobat Distiller 8.2.5 (Windows) D:20110113113827Z rel 4 pontes novo 3 Relatório Caracterização da Situação de Referência Projecto de Restabelecimento da Rede Viária do Alqueva Pontes sobre o Rio Guadiana e Ribeiras de Vinhais, Alcarreche e de São Leonardo Porto 2011 Caracterização da Situação de Referência - Projecto de Restabelecimento da Rede Viária do Alqueva FICHA TÉCNICA COORDENAÇÃO GERAL Ricardo Teixeira, Arqueólogo, Mestre em arqueologia Vítor Fonseca, Arqueólogo Direcção Rui Pinheiro, Arqueólogo Análise da Documentação, pesquisa e cartografia Rui Pinheiro Trabalho de Campo Rui Pinheiro Lídia Baptista, Arqueóloga, Mestre em Arqueologia Relatório Rui Pinheiro Revisão Teresa Silva, Arqueóloga, pós-graduada em Museologia DATA 05 de Janeiro de 2011 Relatório Janeiro de 2011 Página 3 de 18</text:p>
          </table:table-cell>
          <table:table-cell table:number-columns-repeated="1015"/>
        </table:table-row>
        <table:table-row table:style-name="ro1">
          <table:table-cell office:value-type="string">
            <text:p>204_MNS_Restaur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71.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21031092810Z joanaborges PScript5.dll Version 5.2.2 Acrobat Distiller 8.1.0 (Windows) D:20121031094925Z 204_REL_MNS__2012_10_30 RELATÓRIO FINAL Intervenção de Conservação e Restauro de Elementos Cerâmicos Museu Nogueira da Silva Braga 2011 Copyright © arqueologia e património Matosinhos 2012 Intervenção de Conservação e Restauro de Elementos Cerâmicos Museu Nogueira da Silva FICHA TÉCNICA Ricardo Teixeira &amp; Vítor Fonseca, Arqueologia Lda. PROJECTO 204 Coordenação geral Ricardo Teixeira, arqueólogo, mestre em arqueologia Vítor Fonseca, arqueólogo Coordenação de projecto Anabela Hipólito, mestre em conservação e restauro Trabalho de Campo Direcção Anabela Hipólito Técnicos de Conservação e Restauro Paula Rosa Fernandes, mestre em conservação e restauro Assistentes de Conservação e Restauro Ana Paula Fernandes Anabela Rodrigues Lisdália Mota Operários Pedro Pinto Trabalho de Gabinete Relatório Anabela Hipólito Paula Rosa Fernandes Desenho gráfico Rui Oliveira Fotografia e gestão de B...</text:p>
          </table:table-cell>
          <table:table-cell table:number-columns-repeated="1015"/>
        </table:table-row>
        <table:table-row table:style-name="ro1">
          <table:table-cell office:value-type="string">
            <text:p>205_IA_PGT_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8. Pistas usadas: relatório, relatorio, relatório final, relatorio final, projecto, sondagens.</text:p>
          </table:table-cell>
          <table:table-cell office:value-type="string">
            <text:p>relatório, relatorio, relatório final, relatorio final, projecto, sondagens</text:p>
          </table:table-cell>
          <table:table-cell office:value-type="string">
            <text:p>Assinatura PDF</text:p>
          </table:table-cell>
          <table:table-cell office:value-type="string">
            <text:p>D:20110816124554+01'00' pedromaia PScript5.dll Version 5.2 Acrobat Distiller 8.1.0 (Windows) D:20110817151817+01'00' 205 Rel Fin Copyright © arqueologia e património Matosinhos 2011 Sondagens Arqueológicas Ala Sul do Edifício Histórico da Universidade do Porto FICHA TÉCNICA Ricardo Teixeira &amp; Vítor Fonseca Arqueologia Lda. PROJECTO 205 Coordenação geral Ricardo Teixeira, arqueólogo, mestre em arqueologia Vítor Fonseca, arqueólogo Coordenação de projecto Jorge Fonseca, arqueólogo TRABALHO DE CAMPO Direcção Rui Pinheiro, arqueólogo Assistentes de arqueólogo André Saraiva Ricardo Mota Operários de arqueologia Alexandre Pinto Pedro Pinto TRABALHO DE GABINETE Pesquisa bibliográfica e enquadramento histórico Pedro Maia, técnico superior de gestão do património Relatório Jorge Fonseca Rui Pinheiro Desenho gráfico Rui Oliveira, desenhador de arqueologia Tratamento de espólio Anabela Rodrigues, assistente de arqueólogo Teresa Gonçalves, assistente de arqueólogo Fotografia de espólio Pedro Maia...</text:p>
          </table:table-cell>
          <table:table-cell table:number-columns-repeated="1015"/>
        </table:table-row>
        <table:table-row table:style-name="ro1">
          <table:table-cell office:value-type="string">
            <text:p>206_CR_BEIRIZ_201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8.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D:20140709145238+01'00' joanaborges PScript5.dll Version 5.2.2 Acrobat Distiller 8.1.0 (Windows) D:20140709150903+01'00' 206_REL_BEIRIZ_rev RELATÓRIO FINAL Intervenção de Conservação e Restauro nos azulejos da Capela-mor da Igreja de Beiriz Póvoa de Varzim 2013 Copyright © arqueologia e património Matosinhos 2014 Conservação e Restauro dos azulejos da Capela-mor da Igreja de Beiriz, Póvoa de Varzim FICHA TÉCNICA Ricardo Teixeira &amp; Vítor Fonseca, Arqueologia Lda. PROJECTO 206 Coordenação geral - Ricardo Teixeira &amp; Vítor Fonseca, Arqueologia Lda. Vítor Fonseca, arqueólogo Coordenação de projeto Anabela Hipólito, mestre em conservação e restauro Trabalho de Campo Coordenação Anabela Hipólito Execução dos trabalhos Anabela Hipólito Paula Rosa Fernandes, mestre de conservação e restauro Anabela Rodrigues, técnica assistente Teresa Gonçalves, técnica assistente Paula Alves, assistente Pedro Pinto, operário Fotografia Anabela Hipólito Paula Rosa Fernandes Trabalho de Gabinete Conservação e Re...</text:p>
          </table:table-cell>
          <table:table-cell table:number-columns-repeated="1015"/>
        </table:table-row>
        <table:table-row table:style-name="ro1">
          <table:table-cell office:value-type="string">
            <text:p>207_CS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9. Pistas usadas: relatório, relatorio, projecto.</text:p>
          </table:table-cell>
          <table:table-cell office:value-type="string">
            <text:p>relatório, relatorio, projecto</text:p>
          </table:table-cell>
          <table:table-cell office:value-type="string">
            <text:p>Assinatura PDF</text:p>
          </table:table-cell>
          <table:table-cell office:value-type="string">
            <text:p>D:20110418163446+01'00' sergiogomes Adobe Acrobat 8.1 Combine Files Adobe Acrobat 8.1 D:20110418163446+01'00' 207 RELATORIO Relatório Estudo de Caracterização da Situação de Referência do Projecto “EN 2 – Ponte da Ribeira de Oeiras / EN 122 – Ponte da Ribeira de Terges e Cobres e Ponte da Ribeira do Vale de Açor / ER 2 – Pontão ao Km 636+010 e Pontão da Horta Nova – Reabilitação, Alargamento ou Substituição das Obras de Arte” Matosinhos 2011 Arqueologia e Património Caracterização da Situação de Referência do Projecto... Arqueologia e Património FICHA TÉCNICA Arqueologia e Património Projecto nº: 207 COORDENAÇÃO GERAL Ricardo Teixeira, Arqueólogo, Mestre em arqueologia Vítor Fonseca, Arqueólogo TRABALHO DE CAMPO Direcção Rui Pinheiro, Arqueólogo Arqueólogos Lídia Baptista, Mestre em Arqueologia Sérgio Gomes, Mestre em Arqueologia TRABALHO DE GABINETE Relatório Pedro Maia, Técnico Superior de Gestão do Património Sérgio Gomes, Mestre em Arqueologia Apoio técnico e revisão de texto Teres...</text:p>
          </table:table-cell>
          <table:table-cell table:number-columns-repeated="1015"/>
        </table:table-row>
        <table:table-row table:style-name="ro1">
          <table:table-cell office:value-type="string">
            <text:p>209_EP_Coimb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0. Pistas usadas: relatório, relatorio, projecto.</text:p>
          </table:table-cell>
          <table:table-cell office:value-type="string">
            <text:p>relatório, relatorio, projecto</text:p>
          </table:table-cell>
          <table:table-cell office:value-type="string">
            <text:p>Assinatura PDF</text:p>
          </table:table-cell>
          <table:table-cell office:value-type="string">
            <text:p>D:20110223110940Z pedromaia PScript5.dll Version 5.2 Acrobat Distiller 8.1.0 (Windows) D:20110223114956Z 209 REL Antonio Vasc Relatório Porto 2011 Estudo Histórico de Edifício de Habitação na Rua Dr. António de Vasconcelos nº 29/31 Estudo Histórico de Edifício de Habitação na Rua Dr. António de Vasconcelos nº 29/31 FICHA TÉCNICA COORDENAÇÃO GERAL Ricardo Teixeira, Arqueólogo, Mestre em arqueologia Vítor Fonseca, Arqueólogo COORDENAÇÃO DE PROJECTO Teresa Silva, Arqueóloga, pós-graduada em Museologia TRABALHO DE CAMPO Fotografia do edifício Pedro Maia, Técnico Superior de Gestão do Património TRABALHO DE GABINETE Relatório Pedro Maia Enquadramento Histórico Pedro Maia Apoio técnico e revisão de texto Teresa Silva Pesquisa bibliográfica Pedro Maia DATA Fevereiro de 2011 Relatório Fevereiro de 2011 Página 3 de 22</text:p>
          </table:table-cell>
          <table:table-cell table:number-columns-repeated="1015"/>
        </table:table-row>
        <table:table-row table:style-name="ro1">
          <table:table-cell office:value-type="string">
            <text:p>211_IA_VTD_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4. Pistas usadas: relatório, relatorio, relatório final, relatorio final, projeto, projecto, intervenção arqueológica, intervencao arqueologica, acompanhamento arqueológico, acompanhamento arqueologico, sondagens.</text:p>
          </table:table-cell>
          <table:table-cell office:value-type="string">
            <text:p>relatório, relatorio, relatório final, relatorio final, projeto, projecto, intervenção arqueológica, intervencao arqueologica, acompanhamento arqueológico, acompanhamento arqueologico, sondagens</text:p>
          </table:table-cell>
          <table:table-cell office:value-type="string">
            <text:p>Assinatura PDF</text:p>
          </table:table-cell>
          <table:table-cell office:value-type="string">
            <text:p>D:20150318095546Z Writer LibreOffice 4.3 D:20150318112857Z RELATÓRIO FINAL Intervenção Arqueológica Rua das Virtudes, nº11 Porto 2011/2012 Copyright © arqueologia e património Matosinhos 2015 VTD 11.11 Intervenção Arqueológica Rua das Virtudes, nº 11 FICHA TÉCNICA Ricardo Teixeira &amp; Vítor Fonseca, Arqueologia Lda. PROJECTO 211 Coordenação geral Ricardo Teixeira, Arqueólogo, mestre em arqueologia Vítor Fonseca, arqueólogo Coordenação de projeto Jorge Fonseca, arqueólogo Trabalho de Campo Sondagens Arqueológicas Direção Jorge Fonseca Arqueólogos Graça Pereira, arqueóloga Helena Marçal, arqueóloga Desenhador de Arqueologia Rui Oliveira Acompanhamento Arqueológico Direção Graça Pereira e Helena Marçal Desenhador de Arqueologia Rui Oliveira Levantamento Topográfico Cláudio Pimenta Trabalho de Gabinete Relatório Graça Pereira Desenho gráfico Rui Oliveira e José Luís Domingues Tratamento de espólio Anabela Rodrigues, assistente de arqueólogo Teresa Gonçalves, assistente de arqueólogo Fotograf...</text:p>
          </table:table-cell>
          <table:table-cell table:number-columns-repeated="1015"/>
        </table:table-row>
        <table:table-row table:style-name="ro1">
          <table:table-cell office:value-type="string">
            <text:p>211_IA_VTD_11_11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7. Pistas usadas: relatório, relatorio, projeto, projecto, intervenção arqueológica, intervencao arqueologica.</text:p>
          </table:table-cell>
          <table:table-cell office:value-type="string">
            <text:p>relatório, relatorio, projeto, projecto, intervenção arqueológica, intervencao arqueologica</text:p>
          </table:table-cell>
          <table:table-cell office:value-type="string">
            <text:p>Assinatura PDF</text:p>
          </table:table-cell>
          <table:table-cell office:value-type="string">
            <text:p>D:20120927165336+01'00' teresasilva PScript5.dll Version 5.2.2 Acrobat Distiller 8.1.0 (Windows) D:20121016123218+01'00' 211 rel prel acomp Copyright © arqueologia e património Matosinhos 2011 Intervenção Arqueológica Rua das Virtudes, nº 11 FICHA TÉCNICA Ricardo Teixeira &amp; Vítor Fonseca, Arqueologia Lda. PROJECTO 211 Coordenação geral Ricardo Teixeira, Arqueólogo, mestre em arqueologia Vítor Fonseca, arqueólogo Coordenação de projeto Jorge Fonseca, arqueólogo Trabalho de Campo Direção Helena Marçal, arqueóloga Graça Pereira, arqueóloga Desenhador de arqueologia Rui Oliveira, desenhador Trabalho de Gabinete Relatório Graça Pereira Desenho gráfico Rui Oliveira Data Setembro de 2012 relatório preliminar página 3 de 22</text:p>
          </table:table-cell>
          <table:table-cell table:number-columns-repeated="1015"/>
        </table:table-row>
        <table:table-row table:style-name="ro1">
          <table:table-cell office:value-type="string">
            <text:p>211_IA_VTD_11_11_rel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9. Pistas usadas: relatório, relatorio, relatório final, relatorio final, projecto, intervenção arqueológica, intervencao arqueologica, acompanhamento arqueológico, acompanhamento arqueologico, sondagem, sondagens.</text:p>
          </table:table-cell>
          <table:table-cell office:value-type="string">
            <text:p>relatório, relatorio, relatório final, relatorio final, projecto, intervenção arqueológica, intervencao arqueologica, acompanhamento arqueológico, acompanhamento arqueologico, sondagem, sondagens</text:p>
          </table:table-cell>
          <table:table-cell office:value-type="string">
            <text:p>Assinatura PDF</text:p>
          </table:table-cell>
          <table:table-cell office:value-type="string">
            <text:p>D:20111012170447+01'00' RTVF RTVF Writer OpenOffice.org 3.2 D:20111012170753+01'00' RELATÓRIO PRELIMINAR Sondagens Arqueológicas Rua das Virtudes nº 11 Porto 2011 Copyright © arqueologia e património Matosinhos 2011 VTD 11. 11 Intervenção Arqueológica Rua das Virtudes, nº 11 FICHA TÉCNICA Ricardo Teixeira &amp; Vítor Fonseca, Arqueologia Lda. PROJECTO 211 Coordenação geral Ricardo Teixeira, Arqueólogo, mestre em arqueologia Vítor Fonseca, arqueólogo Coordenação de projecto Jorge Fonseca, arqueólogo Trabalho de Campo Direcção Jorge Fonseca Arqueólogos Helena Marçal, arqueóloga Graça Pereira, arqueóloga Desenhador de arqueologia Rui Oliveira, desenhador Trabalho de Gabinete Relatório Jorge Fonseca Desenho gráfico Rui Oliveira Data Outubro de 2011 relatório preliminar página 3 de 21 Intervenção Arqueológica Rua das Virtudes, nº 11 ÍNDICE 1.Introdução....................................................................................................................................................</text:p>
          </table:table-cell>
          <table:table-cell table:number-columns-repeated="1015"/>
        </table:table-row>
        <table:table-row table:style-name="ro1">
          <table:table-cell office:value-type="string">
            <text:p>212_IA_QTM_11_Rel 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1. Pistas usadas: relatório, relatorio, projecto, sondagens.</text:p>
          </table:table-cell>
          <table:table-cell office:value-type="string">
            <text:p>relatório, relatorio, projecto, sondagens</text:p>
          </table:table-cell>
          <table:table-cell office:value-type="string">
            <text:p>Assinatura PDF</text:p>
          </table:table-cell>
          <table:table-cell office:value-type="string">
            <text:p>D:20110415164921+01'00' teresasilva PScript5.dll Version 5.2 Acrobat Distiller 8.1.0 (Windows) D:20110428164659+01'00' 212 Quinta do Monte Rel Prel Relatório Preliminar Estudo Histórico, Registo Fotográfico e Sondagens Arqueológicas Quinta do Monte Foz do Douro - Porto QTM.11 Matosinhos 2011 Arqueologia e Património Estudo Histórico, Registo Fotográfico e Sondagens Arqueológicas na Quinta do Monte Arqueologia e Património FICHA TÉCNICA Projecto nº: 212 COORDENAÇÃO GERAL Ricardo Teixeira, Arqueólogo, Mestre em arqueologia Vítor Fonseca, Arqueólogo COORDENAÇÃO DE PROJECTO Jorge Fonseca, Arqueólogo TRABALHO DE CAMPO Direcção Jorge Fonseca Arqueólogos Joana Almeida José Sendas Assistente de arqueólogo Ricardo Mota Operário de arqueologia Pedro Pinto Registo Fotográfico do Edificado Teresa Silva, Arqueóloga, pós-graduada em Museologia TRABALHO DE GABINETE Estudo Histórico Teresa Silva Relatório Jorge Fonseca Teresa Silva DATA 15 de Abril de 2011 Relatório Preliminar Página 3 de 66</text:p>
          </table:table-cell>
          <table:table-cell table:number-columns-repeated="1015"/>
        </table:table-row>
        <table:table-row table:style-name="ro1">
          <table:table-cell office:value-type="string">
            <text:p>212_QTM11_REL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8. Pistas usadas: relatório, relatorio, relatório final, relatorio final, projecto, intervenção arqueológica, intervencao arqueologica, acompanhamento arqueológico, acompanhamento arqueologico, sondagens.</text:p>
          </table:table-cell>
          <table:table-cell office:value-type="string">
            <text:p>relatório, relatorio, relatório final, relatorio final, projecto, intervenção arqueológica, intervencao arqueologica, acompanhamento arqueológico, acompanhamento arqueologico, sondagens</text:p>
          </table:table-cell>
          <table:table-cell office:value-type="string">
            <text:p>Assinatura PDF</text:p>
          </table:table-cell>
          <table:table-cell office:value-type="string">
            <text:p>D:20140718184407+01'00' teresasilva PScript5.dll Version 5.2.2 Acrobat Distiller 8.1.0 (Windows) D:20140721170919+01'00' 212 REL PRT QTM 11 Final 2014 07 18 Copyright © arqueologia e património Matosinhos 2014 Estudo histórico, registo fotográfico e intervenção arqueológica na Quinta do Monte FICHA TÉCNICA Ricardo Teixeira &amp; Vítor Fonseca, Arqueologia Lda. PROJECTO 212 Coordenação geral Ricardo Teixeira, arqueólogo, mestre em arqueologia Vítor Fonseca, arqueólogo Registo Fotográfico e Estudo Histórico Teresa Silva, arqueóloga, pós-graduada em Museologia Sondagens arqueológicas Direção Jorge Fonseca, arqueólogo Arqueólogos Joana Almeida José Sendas Assistentes de arqueólogo Ricardo Mota Operário de arqueologia Pedro Pinto Acompanhamento arqueológico Liliana Barbosa, arqueóloga Graça Pereira, arqueóloga Trabalho de Gabinete Coordenação Teresa Silva Relatório Teresa Silva Jorge Fonseca (sondagens arqueológicas) Liliana Barbosa (estudo de espólio e painel de azulejos de Bordallo Pinheiro)...</text:p>
          </table:table-cell>
          <table:table-cell table:number-columns-repeated="1015"/>
        </table:table-row>
        <table:table-row table:style-name="ro1">
          <table:table-cell office:value-type="string">
            <text:p>214_CSR_Sarrelibe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5. Pistas usadas: relatório, relatorio, projecto.</text:p>
          </table:table-cell>
          <table:table-cell office:value-type="string">
            <text:p>relatório, relatorio, projecto</text:p>
          </table:table-cell>
          <table:table-cell office:value-type="string">
            <text:p>Assinatura PDF</text:p>
          </table:table-cell>
          <table:table-cell office:value-type="string">
            <text:p>RTVF RTVF Writer OpenOffice.org 3.2 D:20111003164708+01'00' Relatório Caracterização da Situação de Referência Ampliação às Instalações Sarreliber, S.A. Arcos de Valdevez - Souto Matosinhos 2011 Estudo de Impacte Ambiental, Descritor Património Cultural - Ampliação às instalações Sarreliber, S.A. FICHA TÉCNICA COORDENAÇÃO GERAL Ricardo Teixeira, Arqueólogo, Mestre em arqueologia Vítor Fonseca, Arqueólogo COORDENAÇÃO DE PROJECTO Teresa Silva TRABALHO DE CAMPO Teresa Silva Pedro Maia TRABALHO DE GABINETE Pesquisa Pedro Maia Relatório Pedro Maia Teresa Silva DATA 11 de Abril de 2011 Relatório Página 3 de 25</text:p>
          </table:table-cell>
          <table:table-cell table:number-columns-repeated="1015"/>
        </table:table-row>
        <table:table-row table:style-name="ro1">
          <table:table-cell office:value-type="string">
            <text:p>215_AA_PECM15_FINAL.pd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9. Pistas usadas: relatório, relatorio, relatório final, relatorio final, projeto, intervenção arqueológica, intervencao arqueologica, acompanhamento arqueológico, acompanhamento arqueologico.</text:p>
          </table:table-cell>
          <table:table-cell office:value-type="string">
            <text:p>relatório, relatorio, relatório final, relatorio final, projeto, intervenção arqueológica, intervencao arqueologica, acompanhamento arqueológico, acompanhamento arqueologico</text:p>
          </table:table-cell>
          <table:table-cell office:value-type="string">
            <text:p>Assinatura PDF</text:p>
          </table:table-cell>
          <table:table-cell office:value-type="string">
            <text:p>D:20151209170345Z J. Tomé Writer OpenOffice 4.1.1 D:20151210120614Z RELATÓRIO FINAL Acompanhamento Arqueológico Escola Secundária do Castêlo da Maia Maia 2015 Copyright © arqueologia e património Matosinhos 2015 PECM.15 Intervenção Arqueológica Escola Secundária do Castêlo da Maia FICHA TÉCNICA Ricardo Teixeira &amp; Vítor Fonseca, Arqueologia Lda. PROJETO 215b Coordenação geral Ricardo Teixeira, arqueólogo, mestre em arqueologia Vítor Fonseca, arqueólogo Coordenação de projeto Liliana Barbosa, arqueóloga Trabalho de Campo Direção Liliana Barbosa, arqueóloga Bárbara Costa Arqueóloga de campo Bárbara Costa Trabalho de Gabinete Relatório Bárbara Costa Desenho gráfico Rui Oliveira Revisão de texto Liliana Barbosa Data 10 de Dezembro de 2015 relatório final página 3 de 24</text:p>
          </table:table-cell>
          <table:table-cell table:number-columns-repeated="1015"/>
        </table:table-row>
        <table:table-row table:style-name="ro1">
          <table:table-cell office:value-type="string">
            <text:p>215_PECM_Rel_Fin_Esc.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4.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27 D:20230420095245+01'00' D:20230420095245+01'00' Igespar PDF24 Creator FichaSitio RELATÓRIO FINAL Intervenção Arqueológica Escola Secundária do Castêlo da Maia Maia 2011 Copyright © arqueologia e património Matosinhos 2023 Intervenção Arqueológica Escola Secundária do Castêlo da Maia FICHA TÉCNICA Ricardo Teixeira &amp; Vítor Fonseca, Arqueologia Lda. PROJETO 215 Coordenação geral Ricardo Teixeira, arqueólogo, mestre em arqueologia Vítor Fonseca, arqueólogo Coordenação de projeto Liliana Barbosa, arqueóloga Trabalho de Campo Direção Liliana Barbosa, arqueóloga Joana Tomé, arqueóloga Arqueólogos Jorge Fonseca Assistentes de arqueólogo Lisdália Mota Bebiana Mota Operários de arqueologia Pedro Pinto Rui Oliveira, desenhador de arqueologia Trabalho de Gabinete Relatório Joana Tomé Análise do espólio Sérgio Gomes Desenho gráfico Rui Oliveira Tratamento de espólio Anabela Rodrigues, assistente de arqueólogo Fotografia de espólio Pedro Maia, técnico superior de gestão do patri...</text:p>
          </table:table-cell>
          <table:table-cell table:number-columns-repeated="1015"/>
        </table:table-row>
        <table:table-row table:style-name="ro1">
          <table:table-cell office:value-type="string">
            <text:p>216a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16b_PEAG_11_Relatorio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office:value-type="string">
            <text:p>D:20160420172810+01'00' RTVF RTVF Writer OpenOffice 4.1.2 D:20160421135607+01'00' RELATÓRIO FINAL Acompanhamento Arqueológico Modernização do Ensino Secundário – Escola Secundária Augusto Gomes Matosinhos 2011 Copyright © arqueologia e património Matosinhos 2016 PEAG.11 Acompanhamento Arqueológico Modernização do Ensino Secundário – Escola Secundária Augusto Gomes FICHA TÉCNICA Ricardo Teixeira &amp; Vítor Fonseca, Arqueologia Lda. PROJECTO 216 Coordenação geral Ricardo Teixeira, arqueólogo, mestre em arqueologia Vítor Fonseca, arqueólogo Coordenação de projeto Liliana Barbosa, arqueóloga Trabalho de Campo Direção Liliana Barbosa Álvaro Ferreira, arqueólogo Arqueólogos João Rebuge, arqueólogo Joana Almeida, arqueóloga Jorge Fonseca, arqueólogo Graça Pereira, arqueóloga Trabalho de Gabinete Relatório Joana Almeida Desenho gráfico Rui Oliveira Apoio técnico e revisão de texto Teresa Silva, arqueóloga, pós-graduada em museologia Data Abril 2016 relatório final página 3 de 31</text:p>
          </table:table-cell>
          <table:table-cell table:number-columns-repeated="1015"/>
        </table:table-row>
        <table:table-row table:style-name="ro1">
          <table:table-cell office:value-type="string">
            <text:p>219_BRA_REL_FINAL-GLOB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Sérgio Gomes D:20130829092812+01'00' PScript5.dll Version 5.2.2 D:20130829093321+01'00' Acrobat Distiller 11.0 (Windows) 219 BRA REL FINAL GLOBAL_revisto Copyright © arqueologia e património Beja 2013 Trabalhos de minimização de impactes sobre o património cultural decorrentes da execução do Bloco de Rega de Aljustrel - Fase de Obra FICHA TÉCNICA Ricardo Teixeira &amp; Vítor Fonseca, Arqueologia Lda. PROJECTO 219 Coordenação geral Ricardo Teixeira, Arqueólogo, mestre em arqueologia Vítor Fonseca, arqueólogo Coordenação de projeto Lídia Baptista, arqueóloga, mestre em arqueologia Relatório Lídia Baptista Sérgio Gomes, arqueólogo, doutorado em arqueologia Data 27 de agosto de 2013 relatório final global página 3 de 45</text:p>
          </table:table-cell>
          <table:table-cell table:number-columns-repeated="1015"/>
        </table:table-row>
        <table:table-row table:style-name="ro1">
          <table:table-cell office:value-type="string">
            <text:p>219_BRLA_REL_FINAL_GLOB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Sérgio Gomes D:20130829090512+01'00' PScript5.dll Version 5.2.2 D:20130829093830+01'00' Acrobat Distiller 11.0 (Windows) 219 BRLA REL FINAL GLOBAL_revisto Copyright © arqueologia e património Beja 2013 Trabalhos de minimização de impactes sobre o património cultural decorrentes da execução do Bloco de Rega de Loureiro-Alvito - Fase de Obra FICHA TÉCNICA Ricardo Teixeira &amp; Vítor Fonseca, Arqueologia Lda. PROJECTO 219 Coordenação geral Ricardo Teixeira, Arqueólogo, mestre em arqueologia Vítor Fonseca, arqueólogo Coordenação de projeto Lídia Baptista, arqueóloga, mestre em arqueologia Relatório Lídia Baptista Sérgio Gomes, arqueólogo, doutorado em arqueologia Data 27 de agosto de 2013 relatório final global página 3 de 47</text:p>
          </table:table-cell>
          <table:table-cell table:number-columns-repeated="1015"/>
        </table:table-row>
        <table:table-row table:style-name="ro1">
          <table:table-cell office:value-type="string">
            <text:p>219_CHVG_REL_FINAL_GLOB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0.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Sérgio Gomes D:20130829091814+01'00' PScript5.dll Version 5.2.2 D:20130829094157+01'00' Acrobat Distiller 11.0 (Windows) 219 CHVG REL FINAL GLOBAL_revisto Copyright © arqueologia e património Beja 2013 Trabalhos de minimização de impactes sobre o património cultural decorrentes da execução do Circuito Hidráulico de Vale de Gaio - Fase de Obra FICHA TÉCNICA Ricardo Teixeira &amp; Vítor Fonseca, Arqueologia Lda. PROJECTO 219 Coordenação geral Ricardo Teixeira, Arqueólogo, mestre em arqueologia Vítor Fonseca, arqueólogo Coordenação de projeto Lídia Baptista, arqueóloga, mestre em arqueologia Relatório Lídia Baptista Sérgio Gomes, arqueólogo, doutorado em arqueologia Data 27 de agosto de 2013 relatório final global página 3 de 85</text:p>
          </table:table-cell>
          <table:table-cell table:number-columns-repeated="1015"/>
        </table:table-row>
        <table:table-row table:style-name="ro1">
          <table:table-cell office:value-type="string">
            <text:p>220_RFG_Ervid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29.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lidia D:20160127005516Z Adobe Acrobat Pro 11.0.1 D:20160127005516Z Adobe Acrobat Pro 11.0.1 Trabalhos de minimização de impactes sobre o património cultural decorrentes da execução do Bloco de Rega de Ervidel – Fase de Obra FICHA TÉCNICA Ricardo Teixeira &amp; Vítor Fonseca, Arqueologia Lda. PROJECTO 220 Coordenação geral Ricardo Teixeira, Arqueólogo, mestre em arqueologia Vítor Fonseca, arqueólogo Coordenação de projeto Lídia Baptista, arqueóloga, mestre em arqueologia Relatório Lídia Baptista Sérgio Gomes, arqueólogo, doutorado em arqueologia Data 17 de janeiro de 2016 relatório final global página 3</text:p>
          </table:table-cell>
          <table:table-cell table:number-columns-repeated="1015"/>
        </table:table-row>
        <table:table-row table:style-name="ro1">
          <table:table-cell office:value-type="string">
            <text:p>221_1_CSR_PPRC11_Prad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4. Pistas usadas: relatório, relatorio, projecto, intervenção arqueológica, intervencao arqueologica, acompanhamento arqueológico, acompanhamento arqueologico, sondagens, memória descritiva, memoria descritiva.</text:p>
          </table:table-cell>
          <table:table-cell office:value-type="string">
            <text:p>relatório, relatorio, projecto, intervenção arqueológica, intervencao arqueologica, acompanhamento arqueológico, acompanhamento arqueologico, sondagens, memória descritiva, memoria descritiva</text:p>
          </table:table-cell>
          <table:table-cell office:value-type="string">
            <text:p>Assinatura PDF</text:p>
          </table:table-cell>
          <table:table-cell office:value-type="string">
            <text:p>D:20110525141636+01'00' Teresa Silva Writer OpenOffice.org 3.2 D:20110617195700+01'00' Relatório Caracterização da Situação de Referência EN 201 - Ponte do Prado sobre o Rio Cávado/Reabilitação e Reforço Estrutural da Obra de Arte Arqueologia e Património Matosinhos 2011 Caracterização da Situação de Referência – EN 201 - Ponte do Prado sobre o Rio Cávado Arqueologia e Património FICHA TÉCNICA COORDENAÇÃO GERAL Ricardo Teixeira, Arqueólogo, Mestre em arqueologia Vítor Fonseca, Arqueólogo PESQUISA Pedro Maia Teresa Silva TRABALHO DE CAMPO Jorge Fonseca Ricardo Teixeira Teresa Silva Vítor Fonseca FOTOGRAFIA Ricardo Teixeira Teresa Silva RELATÓRIO Teresa Silva APOIO TÉCNICO E REVISÃO DE TEXTO Pedro Maia DATA 14 de Junho de 2011 DIRECTOR TÉCNICO DE OBRA Elaborado Por: Recepcionado na EP-SA: Nome: Nome: Director Científico de Arqueologia Director de Fiscalização Rúbrica: Rúbrica: Data: Data: Tomada de Conhecimento: Validado na EP-SA: Nome: Nome: Director Técnico da Empreitada Coordenação Ge...</text:p>
          </table:table-cell>
          <table:table-cell table:number-columns-repeated="1015"/>
        </table:table-row>
        <table:table-row table:style-name="ro1">
          <table:table-cell office:value-type="string">
            <text:p>221_2_IA_PPRC_11_Prad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0. Pistas usadas: relatório, relatorio, relatório final, relatorio final, projecto, intervenção arqueológica, intervencao arqueologica, sondagens.</text:p>
          </table:table-cell>
          <table:table-cell office:value-type="string">
            <text:p>relatório, relatorio, relatório final, relatorio final, projecto, intervenção arqueológica, intervencao arqueologica, sondagens</text:p>
          </table:table-cell>
          <table:table-cell office:value-type="string">
            <text:p>Assinatura PDF</text:p>
          </table:table-cell>
          <table:table-cell office:value-type="string">
            <text:p>D:20110916150350+01'00' pedromaia PScript5.dll Version 5.2 Acrobat Distiller 8.1.0 (Windows) D:20110916154049+01'00' 221 Rel Final Sond 2011 09 15 RELATÓRIO FINAL de SONDAGENS Intervenção Arqueológica Ponte do Prado sobre o Rio Cávado/ Reabilitação e Reforço Estrutural Braga 2011 DIRECTOR TÉCNICO DE OBRA Elaborado Por: Recepcionado na EP-SA: Nome: Nome: Director Científico de Arqueologia Director de Fiscalização Rúbrica: Rúbrica: Data: Data: Tomada de Conhecimento: Validado na EP-SA: Nome: Nome: Director Técnico da Empreitada Coordenação Gestão Património Cultural Rúbrica: Rúbrica: Data: Data: N.º Revisão: Data: Motivo(s) da Alteração: Pág. Alterada(s): Copyright © arqueologia e património Matosinhos 2011 Intervenção Arqueológica Ponte do Prado sobre o Rio Cávado FICHA TÉCNICA Ricardo Teixeira &amp; Vítor Fonseca Arqueologia Lda. PROJECTO 221 Coordenação geral Ricardo Teixeira, arqueólogo, mestre em arqueologia Vítor Fonseca, arqueólogo Coordenação de projecto Jorge Fonseca, arqueólogo Ter...</text:p>
          </table:table-cell>
          <table:table-cell table:number-columns-repeated="1015"/>
        </table:table-row>
        <table:table-row table:style-name="ro1">
          <table:table-cell office:value-type="string">
            <text:p>221_3_EP_e_IA PPRC11_Rel 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11. Pistas usadas: relatório, relatorio, relatório final, relatorio final, acompanhamento arqueológico, acompanhamento arqueologico.</text:p>
          </table:table-cell>
          <table:table-cell office:value-type="string">
            <text:p>relatório, relatorio, relatório final, relatorio final, acompanhamento arqueológico, acompanhamento arqueologico</text:p>
          </table:table-cell>
          <table:table-cell office:value-type="string">
            <text:p>Assinatura PDF</text:p>
          </table:table-cell>
          <table:table-cell office:value-type="string">
            <text:p>D:20111111162223Z teresasilva PScript5.dll Version 5.2 Acrobat Distiller 8.1.0 (Windows) D:20111118114733Z 221 REL Fin 2011 11 11 RELATÓRIO FINAL EN 201 - Ponte do Prado sobre o Rio Cávado/Reabilitação e Reforço Estrutural da Obra de Arte Registo do Monumento e Acompanhamento Arqueológico Vila Verde / Braga 2011 DIRECTOR TÉCNICO DE OBRA Elaborado Por: Recepcionado na EP-SA: Nome: Nome: Director Científico de Arqueologia Director de Fiscalização Rúbrica: Rúbrica: Data: Data: Tomada de Conhecimento: Validado na EP-SA: Nome: Nome: Director Técnico da Empreitada Coordenação Gestão Património Cultural Rúbrica: Rúbrica: Data: Data: N.º Revisão: Data: Motivo(s) da Alteração: Pág. Alterada(s): Copyright © arqueologia e património Matosinhos 2011 Copyright © arqueologia e património Matosinhos 2011</text:p>
          </table:table-cell>
          <table:table-cell table:number-columns-repeated="1015"/>
        </table:table-row>
        <table:table-row table:style-name="ro1">
          <table:table-cell office:value-type="string">
            <text:p>222_IA_ALTG11_RelPrelimina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6. Pistas usadas: relatório, relatorio, projecto, intervenção arqueológica, intervencao arqueologica.</text:p>
          </table:table-cell>
          <table:table-cell office:value-type="string">
            <text:p>relatório, relatorio, projecto, intervenção arqueológica, intervencao arqueologica</text:p>
          </table:table-cell>
          <table:table-cell office:value-type="string">
            <text:p>Assinatura PDF</text:p>
          </table:table-cell>
          <table:table-cell office:value-type="string">
            <text:p>D:20110627112244+01'00' jorgefonseca PScript5.dll Version 5.2 Acrobat Distiller 8.1.0 (Windows) D:20110627112838+01'00' 222 Rel Prel Relatório Preliminar Intervenção Arqueológica Avenida da Liberdade 29-41 e Travessa da Glória 15-19 Lisboa ALTG. 11 Matosinhos 2011 Intervenção Arqueológica na Avenida da Liberdade, 29-41/Travessa da Glória, 15-19 – ALTG. 11 FICHA TÉCNICA COORDENAÇÃO GERAL Ricardo Teixeira, Arqueólogo, Mestre em arqueologia Vítor Fonseca, Arqueólogo COORDENAÇÃO DE PROJECTO Jorge Fonseca, Arqueólogo TRABALHO DE CAMPO Direcção Jorge Fonseca Assistente de arqueólogo Ricardo Mota Operário de arqueologia Pedro Pinto TRABALHO DE GABINETE Relatório Jorge Fonseca DATA 22 de Junho de 2011 Relatório Preliminar</text:p>
          </table:table-cell>
          <table:table-cell table:number-columns-repeated="1015"/>
        </table:table-row>
        <table:table-row table:style-name="ro1">
          <table:table-cell office:value-type="string">
            <text:p>223_IA_AGILDE_AHAG 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office:value-type="string">
            <text:p>D:20121016115029+01'00' teresasilva PScript5.dll Version 5.2.2 Acrobat Distiller 8.1.0 (Windows) D:20121119125145Z 223 Rel Fin 2012 10 01 RELATÓRIO FINAL Acompanhamento Arqueológico Aproveitamento Hidroelétrico de Agilde Celorico de Basto 2011 Copyright © arqueologia e património Matosinhos 2012 AHAG.11 Acompanhamento Arqueológico Aproveitamento Hidroelétrico de Agilde FICHA TÉCNICA Ricardo Teixeira &amp; Vítor Fonseca, Arqueologia Lda. PROJECTO 223 Coordenação geral Ricardo Teixeira, arqueólogo, mestre em arqueologia Vítor Fonseca, arqueólogo Coordenação de projeto Jorge Fonseca, arqueólogo Trabalho de Campo Direção Joana Almeida, arqueóloga, pós graduada em museologia Trabalho de Gabinete Relatório Joana Almeida Desenho gráfico Rui Oliveira, desenhador de arqueologia Tratamento de espólio Anabela Rodrigues, assistente de arqueólogo Teresa Gonçalves, assistente de arqueólogo Fotografia de espólio Pedro Maia, técnico superior de gestão do património Revisão de texto Teresa Silva, arqueólog...</text:p>
          </table:table-cell>
          <table:table-cell table:number-columns-repeated="1015"/>
        </table:table-row>
        <table:table-row table:style-name="ro1">
          <table:table-cell office:value-type="string">
            <text:p>224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25_MANCCBD11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4 D:20190731120052+01'00' D:20190731120052+01'00' Igespar PDF24 Creator FichaSitio RELATÓRIO FINAL Intervenção Arqueológica Capela da Nossa Senhora do Bom Despacho do Mosteiro de Santo André de Ancede Baião 2011 Copyright © arqueologia e património Matosinhos 2019 M ANC CBD.11 Intervenção Arqueológica Capela da Nossa Senhora do Bom Despacho – MANCCBD.11 FICHA TÉCNICA Ricardo Teixeira &amp; Vítor Fonseca, Arqueologia Lda. PROJETO 225 Coordenação Geral Ricardo Teixeira, arqueólogo, mestre em arqueologia Vítor Fonseca, arqueólogo TRABALHO DE CAMPO Direção João Rebuge, arqueólogo Assistente de arqueólogo Bebiana Mota Operário de arqueologia Pedro Pinto TRABALHO DE GABINETE Relatório João Rebuge Desenho gráfico Rui Oliveira Tratamento de espólio Anabela Rodrigues, assistente de arqueólogo Teresa Gonçalves, assistente de arqueólogo Conservação e restauro Anabela Hipólito, técnica superior de conservação e restauro Fotografia de espólio Pedro Maia Teresa Gonçalves Apoio técnico...</text:p>
          </table:table-cell>
          <table:table-cell table:number-columns-repeated="1015"/>
        </table:table-row>
        <table:table-row table:style-name="ro1">
          <table:table-cell office:value-type="string">
            <text:p>226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27_GAIA_GGFSM_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21017160220+01'00' jorgefonseca PScript5.dll Version 5.2.2 Acrobat Distiller 8.1.0 (Windows) D:20121121141316Z 227 Relatorio final Copyright © arqueologia e património Matosinhos 2012 Intervenção Arqueológica GGFSM.11 FICHA TÉCNICA Ricardo Teixeira &amp; Vítor Fonseca, Arqueologia Lda. PROJECTO 227 Coordenação geral Ricardo Teixeira, arqueólogo, mestre em arqueologia Vítor Fonseca, arqueólogo Coordenação de projeto Jorge Fonseca, arqueólogo Trabalho de Campo Direção Jorge Fonseca Assistente de arqueólogo Bebiana Mota Desenhador de arqueologia Rui Oliveira Trabalho de Gabinete Relatório Jorge Fonseca Desenho gráfico Rui Oliveira Tratamento de espólio Anabela Rodrigues, assistente de arqueólogo Teresa Gonçalves, assistente de arqueólogo Fotografia de espólio Pedro Maia, técnico superior de gestão do património Apoio técnico e revisão de texto Teresa Silva, arqueóloga, pós-graduada em museologia Data Outubro de 2012 relatório final página 3 de 33</text:p>
          </table:table-cell>
          <table:table-cell table:number-columns-repeated="1015"/>
        </table:table-row>
        <table:table-row table:style-name="ro1">
          <table:table-cell office:value-type="string">
            <text:p>228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30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33a_IA_RUCHA_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32. Pistas usadas: relatório, relatorio, relatório final, relatorio final, projeto, projecto, intervenção arqueológica, intervencao arqueologica, acompanhamento arqueológico, acompanhamento arqueologico, sondagem, sondagens.</text:p>
          </table:table-cell>
          <table:table-cell office:value-type="string">
            <text:p>relatório, relatorio, relatório final, relatorio final, projeto, projecto, intervenção arqueológica, intervencao arqueologica, acompanhamento arqueológico, acompanhamento arqueologico, sondagem, sondagens</text:p>
          </table:table-cell>
          <table:table-cell office:value-type="string">
            <text:p>Assinatura PDF</text:p>
          </table:table-cell>
          <table:table-cell office:value-type="string">
            <text:p>D:20130625171027+01'00' teresasilva PScript5.dll Version 5.2.2 Acrobat Distiller 8.1.0 (Windows) D:20130702102615+01'00' 233 REL 2013 06 18 RELATÓRIO FINAL Requalificação dos Espaços Envolventes do Mosteiro de Arouca Volume I - Intervenção Arqueológica Arouca 2011/12 Copyright © arqueologia e património Matosinhos 2013 RUCHA 11 Intervenção Arqueológica Requalificação dos Espaços Envolventes do Mosteiro de Arouca FICHA TÉCNICA Ricardo Teixeira &amp; Vítor Fonseca, Arqueologia Lda. PROJECTO 233 Coordenação geral Ricardo Teixeira, Arqueólogo, mestre em arqueologia Vítor Fonseca, arqueólogo Coordenação de projeto Jorge Fonseca, arqueólogo TRABALHO DE CAMPO Sondagens Arqueológicas Direção Helena Marçal, arqueóloga e João Rebuge, arqueólogo Arqueólogos José Sendas, arqueólogo e Jorge Fonseca Assistentes de arqueólogo Bebiana Mota, Lisdália Mota e Ricardo Mota Operário de arqueologia Pedro Pinto Acompanhamento Arqueológico Direção Helena Marçal e João Rebuge Assistentes de arqueólogo Bebiana Mota...</text:p>
          </table:table-cell>
          <table:table-cell table:number-columns-repeated="1015"/>
        </table:table-row>
        <table:table-row table:style-name="ro1">
          <table:table-cell office:value-type="string">
            <text:p>233b_CeR_RUCHA_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83.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D:20130625163158+01'00' teresasilva PScript5.dll Version 5.2.2 Acrobat Distiller 8.1.0 (Windows) D:20130627115344+01'00' 233 REl CeR 2013 06 20 RELATÓRIO FINAL Requalificação dos Espaços Envolventes do Mosteiro de Arouca Volume III – Estudo e Acompanhamento da Reconstrução do Portal do Terreiro Arouca 2012 Estudo e Acompanhamento da Reconstrução do Portal do Terreiro de Santa Mafalda FICHA TÉCNICA Ricardo Teixeira &amp; Vítor Fonseca, Arqueologia Lda. PROJECTO 233 Coordenação geral Vítor Fonseca, arqueólogo Coordenação de projeto Anabela Hipólito Trabalho de Campo 2010 Coordenação Anabela Hipólito, mestre em conservação e restauro Recolha e limpeza inicial dos elementos pétreos (2010) Anabela Hipólito Alexandre Pinto, operário Pedro Pinto, operário Registo e inventário dos elementos pétreos Pedro Maia, técnico superior de gestão do património Alexandre Pinto Trabalho de Gabinete 2010 Coordenação Teresa Silva, arqueóloga, pós-graduada em Museologia Pesquisa arquivística Pedro Maia Base de d...</text:p>
          </table:table-cell>
          <table:table-cell table:number-columns-repeated="1015"/>
        </table:table-row>
        <table:table-row table:style-name="ro1">
          <table:table-cell office:value-type="string">
            <text:p>233c_ANTROP_RUCHA_1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15.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D:20130621110852+01'00' pedromaia PScript5.dll Version 5.2.2 Acrobat Distiller 8.1.0 (Windows) D:20130627115112+01'00' 233 REL ANTROP 2013 06 20 fast RELATÓRIO FINAL Requalificação dos Espaços Envolventes do Mosteiro de Arouca Volume II – Trabalhos antropológicos Arouca 2012 Copyright © arqueologia e património Matosinhos 2011 RUCHA 11 Trabalhos de Antropologia - Requalificação dos Espaços Envolventes do Mosteiro de Arouca FICHA TÉCNICA Ricardo Teixeira &amp; Vítor Fonseca, Arqueologia Lda. PROJECTO 233 Coordenação geral Ricardo Teixeira, arqueólogo, mestre em arqueologia Vítor Fonseca, arqueólogo Coordenação de projeto Jorge Fonseca, arqueólogo Trabalho de Campo Direção e execução dos trabalhos antropológicos Zélia Rodrigues, antropóloga Trabalho de Gabinete Coordenação Teresa Silva, arqueóloga, pós-graduada em museologia Relatório Zélia Rodrigues Estudo do espólio osteológico Zélia Rodrigues Tratamento de espólio Anabela Rodrigues, assistente de arqueólogo Teresa Gonçalves, assistente de...</text:p>
          </table:table-cell>
          <table:table-cell table:number-columns-repeated="1015"/>
        </table:table-row>
        <table:table-row table:style-name="ro1">
          <table:table-cell office:value-type="string">
            <text:p>234_EIA_N_Alvar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11123154935Z lilianabarbosa Adobe Acrobat 8.1 Combine Files Adobe Acrobat 8.1 D:20111123161808Z 234 EIA Nun alvares 2011 11 22 ESTUDO DE IMPACTE AMBIENTAL Projecto de Construção da Avenida Nun'Álvares Porto 2011 Copyright © arqueologia e património Matosinhos 2011 E. I. A. Projecto de Construção da Avenida Nun'Álvares - Descritor Património Cultural FICHA TÉCNICA Ricardo Teixeira &amp; Vítor Fonseca, Arqueologia Lda. PROJECTO 234 Coordenação geral Ricardo Teixeira, Arqueólogo, mestre em arqueologia Vítor Fonseca, arqueólogo Coordenação de projecto Liliana Barbosa, arqueóloga Trabalho de Campo Arqueóloga Liliana Barbosa Técnico Superior de Gestão do Património Pedro Maia Fotografia Pedro Maia Liliana Barbosa Trabalho de Gabinete Relatório Liliana Barbosa Desenho gráfico Rui Oliveira Apoio técnico e revisão de texto Teresa Silva, arqueóloga, pós-graduada em museologia Data 23 de Novembro de 2011 relatório final página 3 de 50 E. I. A. Projecto de Construção da Avenida Nun'Álvares - Desc...</text:p>
          </table:table-cell>
          <table:table-cell table:number-columns-repeated="1015"/>
        </table:table-row>
        <table:table-row table:style-name="ro1">
          <table:table-cell office:value-type="string">
            <text:p>237_Az_Ova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857.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D:20120629154827+01'00' Luís Mariz Writer OpenOffice.org 3.2 D:20120629183322+01'00' RELATÓRIO FINAL Intervenção de Conservação e Restauro de Fachadas Azulejadas da cidade de Ovar Ovar 2012 Copyright © arqueologia e património Matosinhos 2011 Intervenção de Conservação e Restauro de Fachadas Azulejadas de Ovar FICHA TÉCNICA Ricardo Teixeira &amp; Vítor Fonseca, Arqueologia Lda. PROJECTO 237 Coordenação geral – Matriz Lda. Luis Tomé, engenheiro civil Operários Albino Cruz Fernando Costa Joaquim Cruz Manuel Moreira Paulo Carvalho Serafim Costa Coordenação geral - Ricardo Teixeira &amp; Vítor Fonseca, Arqueologia Lda. Vítor Fonseca, arqueólogo Coordenação científica Luís Mariz, investigador Coordenação de projeto Anabela Hipólito, mestre em conservação e restauro Trabalho de Campo Coordenação Anabela Hipólito Acompanhamento dos trabalhos Anabela Hipólito Paula Rosa Fernandes, técnica superior de conservação e restauro Luís Mariz Fotografia Anabela Hipólito Paula Rosa Fernandes Pedro Maia, técnico...</text:p>
          </table:table-cell>
          <table:table-cell table:number-columns-repeated="1015"/>
        </table:table-row>
        <table:table-row table:style-name="ro1">
          <table:table-cell office:value-type="string">
            <text:p>238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39_Antrop_Med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2. Pistas usadas: relatório, relatorio, projeto, intervenção arqueológica, intervencao arqueologica.</text:p>
          </table:table-cell>
          <table:table-cell office:value-type="string">
            <text:p>relatório, relatorio, projeto, intervenção arqueológica, intervencao arqueologica</text:p>
          </table:table-cell>
          <table:table-cell office:value-type="string">
            <text:p>Assinatura PDF</text:p>
          </table:table-cell>
          <table:table-cell office:value-type="string">
            <text:p>zélia rodrigues Writer LibreOffice 3.6 D:20121213113944Z' RELATÓRIO ANTROPOLÓGICO Minimização de impactes sobre o património cultural decorrentes da execução do Aproveitamento Hidroelétrico do Baixo Sabor Trabalhos de Antropologia no âmbito da intervenção arqueológica no Terraço Fluvial da Foz do Medal Copyright © arqueologia e património Matosinhos 2011 AHBS MEDAL Trabalhos de antropologia no âmbito da intervenção arqueológica no Terraço Fluvial da Foz do Medal FICHA TÉCNICA Ricardo Teixeira &amp; Vítor Fonseca, Arqueologia Lda. Coordenação geral Ricardo Teixeira, Arqueólogo, mestre em arqueologia Vítor Fonseca, arqueólogo Coordenação de projeto Trabalho de Campo Direção e execução Zélia Maria Rodrigues, antropóloga Trabalho de Gabinete Relatório Zélia Rodrigues Tratamento de espólio Anabela Rodrigues, assistente de arqueólogo Data 12 de Dezembro de 2012 relatório antropológico página 3 de 45 Trabalhos de antropologia no âmbito da intervenção arqueológica no Terraço Fluvial da Foz do Meda...</text:p>
          </table:table-cell>
          <table:table-cell table:number-columns-repeated="1015"/>
        </table:table-row>
        <table:table-row table:style-name="ro1">
          <table:table-cell office:value-type="string">
            <text:p>239_Rel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8. Pistas usadas: relatório, relatorio, relatório final, relatorio final, intervenção arqueológica, intervencao arqueologica, sondagens.</text:p>
          </table:table-cell>
          <table:table-cell office:value-type="string">
            <text:p>relatório, relatorio, relatório final, relatorio final, intervenção arqueológica, intervencao arqueologica, sondagens</text:p>
          </table:table-cell>
          <table:table-cell office:value-type="string">
            <text:p>Assinatura PDF</text:p>
          </table:table-cell>
          <table:table-cell office:value-type="string">
            <text:p>D:20130812115814+01'00' joanaborges PScript5.dll Version 5.2.2 Acrobat Distiller 8.1.0 (Windows) D:20130812115814+01'00' Relatório Final_Fase II RELATÓRIO FINAL Minimização de impactes sobre o património cultural decorrentes da execução do Aproveitamento Hidroelétrico do Baixo Sabor Sondagens Arqueológicas no âmbito da intervenção arqueológica no EP193 Terraço Fluvial da Foz do Medal Copyright © arqueologia e património Matosinhos 2013 Sondagens Arqueológicas no âmbito da intervenção arqueológica no EP193 - Terraço Fluvial da Foz do Medal FICHA TÉCNICA Assessoria Ricardo Teixeira, arqueólogo, mestre em arqueologia Trabalho de Campo Direção Joana Carrondo, arqueóloga Luís Nobre, arqueólogo Arqueólogos Joana Tomé Carlos Silva Joan Palmer Tapício Nóbrega Marta Correia Luis Miguel Amigo Miguel Mezquida Direção dos trabalhos antropológicos Zélia Rodrigues, antropóloga Assistentes de arqueólogo André Saraiva Raquel Ferreira Operário de arqueologia Pedro Pinto Topografia Cláudio Pimenta Operá...</text:p>
          </table:table-cell>
          <table:table-cell table:number-columns-repeated="1015"/>
        </table:table-row>
        <table:table-row table:style-name="ro1">
          <table:table-cell office:value-type="string">
            <text:p>240_ALMADA_CE_MI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 Pistas usadas: projeto, acompanhamento arqueológico, acompanhamento arqueologico, escavação, escavacao, trabalhos arqueológicos, trabalhos arqueologicos.</text:p>
          </table:table-cell>
          <table:table-cell office:value-type="string">
            <text:p>projeto, acompanhamento arqueológico, acompanhamento arqueologico, escavação, escavacao, trabalhos arqueológicos, trabalhos arqueologicos</text:p>
          </table:table-cell>
          <table:table-cell office:value-type="string">
            <text:p>Assinatura PDF</text:p>
          </table:table-cell>
          <table:table-cell office:value-type="string">
            <text:p>Ricardo Teixeira RTVF Writer OpenOffice.org 3.2 D:20120117152752Z' Arqueologia e Património Ricardo Teixeira &amp; Vítor Fonseca, Arqueologia lda. Rua do Chouso, nº 434 Santa Cruz do Bispo 4455-804 Matosinhos www.arqueologiaepatrimonio.pt │ e-mail ap@arqueologiaepatrimonio.pt │ Telefone 229 942 673 │ Telemóvel 934 827 203 │ Fax 229 942 675 OBRA DE CONSERVAÇÃO, REABILITAÇÃO E VALORIZAÇÃO DA IGREJA DA MISERICÓRDIA DE ALMADA _____________________________________________________________ Caderno de Encargos de Arqueologia _____________________________________________________________ ÍNDICE 1.Introdução e enquadramento................................................................................................................................3 2.Objeto...........................................................................................................................................................................4 3.Equipa, licenciamento e relatórios........................................</text:p>
          </table:table-cell>
          <table:table-cell table:number-columns-repeated="1015"/>
        </table:table-row>
        <table:table-row table:style-name="ro1">
          <table:table-cell office:value-type="string">
            <text:p>242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43_CSR_BELVER_2012.pdf</text:p>
          </table:table-cell>
          <table:table-cell office:value-type="string">
            <text:p>.pdf</text:p>
          </table:table-cell>
          <table:table-cell office:value-type="string">
            <text:p>Documento PDF</text:p>
          </table:table-cell>
          <table:table-cell office:value-type="string">
            <text:p>Tabela / base de dados</text:p>
          </table:table-cell>
          <table:table-cell office:value-type="string">
            <text:p>Baixa</text:p>
          </table:table-cell>
          <table:table-cell office:value-type="string">
            <text:p>Documento PDF; o conteúdo aparenta corresponder a tabela / base de dados. Foram analisadas as primeiras 4 página(s) de um total de 56. Pistas usadas: nome, data.</text:p>
          </table:table-cell>
          <table:table-cell office:value-type="string">
            <text:p>nome, data</text:p>
          </table:table-cell>
          <table:table-cell office:value-type="string">
            <text:p>Assinatura PDF</text:p>
          </table:table-cell>
          <table:table-cell office:value-type="string">
            <text:p>D:20120403151356+01'00' Lis Mota Adobe Acrobat 8.1 Combine Files Adobe Acrobat 8.1 D:20120622153556+01'00' Caracterização de Situação de Referência Ponte Metálica de Belver - Reabilitação e Reforço Estrutural E.N. 244 ao km 85+54 Belver 2012 DIRECTOR TÉCNICO DE OBRA Elaborado Por: Recepcionado na EP-SA: Nome: Nome: Director Científico de Arqueologia Director de Fiscalização Rúbrica: Rúbrica: Data: Data: Tomada de Conhecimento: Validado na EP-SA: Nome: Nome: Director Técnico da Empreitada Coordenação Gestão Património Cultural Rúbrica: Rúbrica: Data: Data: N.º Revisão: Data: Motivo(s) da Alteração: Pág. Alterada(s): Copyright © arqueologia e património Matosinhos 2012 Caracterização de Situação de Referência Ponte Metálica de Belver - Reabilitação e Reforço Estrutural E.N. 244 ao km 85+54 Belver 2012 Copyright © arqueologia e património Matosinhos 2012</text:p>
          </table:table-cell>
          <table:table-cell table:number-columns-repeated="1015"/>
        </table:table-row>
        <table:table-row table:style-name="ro1">
          <table:table-cell office:value-type="string">
            <text:p>245a_ANTROP_SABOR_LJ Vol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77.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office:value-type="string">
            <text:p>D:20130214112046Z Nitro Pro 8 (8. 0. 9. 8) D:20130214100431Z Nitro Pro 8 (8. 0. 9. 8) Copyright © arqueologia e património Matosinhos 2013 Trabalhos de antropologia no âmbito da intervenção arqueológica no Sítio do Laranjal -Cidalhes FICHA TÉCNICA Assessoria Ricardo Teixeira, arqueólogo, mestre em arqueologia Trabalho de Campo Direção Jorge Fonseca, arqueólogo Ana Roriz, arqueóloga Sara Luz, arqueóloga Direção dos trabalhos antropológicos Zélia Rodrigues, antropóloga Execução dos trabalhos antropológicos Zélia Rodrigues Bernardete Soares, antropóloga Trabalho de Gabinete Relatório Zélia Rodrigues Revisão de texto Pedro Maia, técnico superior de gestão do património Data Fevereiro de 2013 relatório final página 3 de 60</text:p>
          </table:table-cell>
          <table:table-cell table:number-columns-repeated="1015"/>
        </table:table-row>
        <table:table-row table:style-name="ro1">
          <table:table-cell office:value-type="string">
            <text:p>245a_IA_SABOR_LJ .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61.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office:value-type="string">
            <text:p>D:20130214182722Z Nitro Pro 8 (8. 0. 9. 8) D:20130214120223Z Nitro Pro 8 (8. 0. 9. 8) Copyright © arqueologia e património Matosinhos 2013 Intervenção Arqueológica Sítio do Laranjal BS. CLD. LJ. 02. 12 FICHA TÉCNICA Assessoria Ricardo Teixeira, arqueólogo, mestre em arqueologia Trabalho de Campo Direção Jorge Fonseca, arqueólogo Ana Roriz, arqueóloga Sara Luz, arqueóloga Arqueólogos Alexandrina Amorim, arqueóloga Diana Amorim, arqueóloga Joana Tomé, arqueóloga João Rebuge, arqueólogo Marta Correia, arqueóloga Tiago Melo, arqueólogo Rui Leonardo, arqueólogo Direção dos trabalhos antropológicos Zélia Rodrigues, antropóloga Antropóloga Bernardete Soares Assistentes de arqueólogo Bebiana Mota Ricardo Mota Eduardo Falcão André Saraiva Fotogrametria Rui Oliveira Cláudio Pimenta Topografia Cláudio Pimenta Operário de arqueologia Pedro Pinto Trabalho de Gabinete Relatório Jorge Fonseca Desenho gráfico Rui Oliveira Cláudio Pimenta José Luís Domingues Tratamento de espólio Anabela Rodrigues, ass...</text:p>
          </table:table-cell>
          <table:table-cell table:number-columns-repeated="1015"/>
        </table:table-row>
        <table:table-row table:style-name="ro1">
          <table:table-cell office:value-type="string">
            <text:p>245b_SABOR_CM.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38.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office:value-type="string">
            <text:p>D:20130321160235Z Nitro Pro 8 (8. 0. 9. 8) D:20130321154352Z Nitro Pro 8 (8. 0. 9. 8) Copyright © arqueologia e património Matosinhos 2013 Intervenção Arqueológica Cemitério dos Mouros – BS.CLD.CM.12 FICHA TÉCNICA Assessoria Ricardo Teixeira, arqueólogo, mestre em arqueologia Trabalho de Campo Direção Sandra Clélia, arqueóloga Arqueólogos Filipa Pinto Antunes, arqueóloga Óscar Teixeira, arqueólogo Pedro Moura, arqueólogo Ricardo Fernandes, arqueólogo Tânia Falcão, arqueóloga Assistentes de arqueólogo Bebiana Mota Ricardo Mota Operários de arqueologia Pedro Pinto Trabalho de Gabinete Relatório Sandra Clélia Desenho gráfico Rui Oliveira Cláudio Pimenta José Luís Domingues Tratamento de espólio Anabela Rodrigues, assistente de arqueólogo Teresa Gonçalves, assistente de arqueólogo Fotografia de espólio Pedro Maia, técnico superior de gestão do património Apoio técnico e revisão de texto Jorge Fonseca, arqueólogo Liliana Rodrigues, arqueóloga Data Março de 2013 relatório final página 3 de 6...</text:p>
          </table:table-cell>
          <table:table-cell table:number-columns-repeated="1015"/>
        </table:table-row>
        <table:table-row table:style-name="ro1">
          <table:table-cell office:value-type="string">
            <text:p>246_MMT47_13_Relat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office:value-type="string">
            <text:p>GPL Ghostscript 9.27 D:20230421145126+01'00' D:20230421145126+01'00' PDF24 Creator RELATÓRIO FINAL Acompanhamento Arqueológico Rua Morgado de Mateus nº 46 Porto 2014 Copyright © arqueologia e património Matosinhos 2023 MMT4613 Acompanhamento Arqueológico Rua Morgado de Mateus, nº 46 FICHA TÉCNICA Ricardo Teixeira &amp; Vítor Fonseca, Arqueologia Lda. PROJETO 246 Coordenação geral Ricardo Teixeira, arqueólogo, mestre em arqueologia Vítor Fonseca, arqueólogo Coordenação de projeto Vítor Fonseca, arqueólogo Trabalho de Campo Direção Helena Marçal, arqueóloga Arqueólogos Helena Marçal, arqueóloga Trabalho de Gabinete Relatório Helena Marçal Desenho gráfico Rui Oliveira Tratamento de espólio Anabela Rodrigues, assistente de arqueólogo Teresa Gonçalves, assistente de arqueólogo Fotografia de espólio Teresa Gonçalves Apoio técnico e revisão de texto Liliana Barbosa, arqueóloga Data 18 de abril de 2023 relatório final página 3 de 25</text:p>
          </table:table-cell>
          <table:table-cell table:number-columns-repeated="1015"/>
        </table:table-row>
        <table:table-row table:style-name="ro1">
          <table:table-cell office:value-type="string">
            <text:p>247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48_IA_SNR_29_1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21218172916Z Nitro Pro 8 (8. 0. 9. 8) D:20121218170123Z Nitro Pro 8 (8. 0. 9. 8) Copyright © arqueologia e património Matosinhos 2012 Intervenção Arqueológica Rua de Sá Noronha 29-33 FICHA TÉCNICA Ricardo Teixeira &amp; Vítor Fonseca, Arqueologia Lda. PROJECTO 248 Coordenação geral Ricardo Teixeira, arqueólogo, mestre em arqueologia Vítor Fonseca, arqueólogo Trabalho de Campo Direção Graça Pereira, arqueóloga Trabalho de Gabinete Relatório Graça Pereira Desenho gráfico Rui Oliveira Tratamento de espólio Anabela Rodrigues, assistente de arqueólogo Teresa Gonçalves, assistente de arqueólogo Fotografia de espólio Pedro Maia, técnico superior de gestão do património Apoio técnico e revisão de texto Teresa Silva, arqueóloga, pós-graduada em museologia Data Dezembro de 2012 relatório final página 3 de 27</text:p>
          </table:table-cell>
          <table:table-cell table:number-columns-repeated="1015"/>
        </table:table-row>
        <table:table-row table:style-name="ro1">
          <table:table-cell office:value-type="string">
            <text:p>249a_ANTROP_NC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130. Pistas usadas: relatório, relatorio, relatório final, relatorio final, data, descrição, descricao.</text:p>
          </table:table-cell>
          <table:table-cell office:value-type="string">
            <text:p>relatório, relatorio, relatório final, relatorio final, data, descrição, descricao</text:p>
          </table:table-cell>
          <table:table-cell office:value-type="string">
            <text:p>Assinatura PDF</text:p>
          </table:table-cell>
          <table:table-cell office:value-type="string">
            <text:p>EP 399 – Gravura rupestre – Couto rita.gaspar Microsoft® Office Word 2007 D:20140708163242+01'00' D:20140708163242+01'00' Microsoft® Office Word 2007 AHBS Empreitada Geral de Construção do Aproveitamento Hidroelétrico do Baixo Sabor PLANO DE SALVAGUARDA DO PATRIMÓNIO ESTUDO SOBRE A ROMANIZAÇÃO NO VALE DO SABOR EP 189 (QUINTA DE CRESTELOS – NECRÓPOLE ESTE) PARTE II - RELATÓRIO FINAL ANTROPOLOGIA AHBS/RPSP.870.00  AHBS COPYRIGHT – Todos os direitos reservados Página 1 de 105 O presente documento encontra-se atualizado na rede do ACE. Após impressão não se garante a sua atualização, exceto se tiver carimbo (verde) “cópia controlada”. PLANO DE SALVAGUARDA DO PATRIMÓNIO ESTUDO SOBRE A ROMANIZAÇÃO NO VALE DO SABOR EP 189 (QUINTA DE CRESTELOS - NECRÓPOLE ESTE) PARTE II - RELATÓRIO FINAL ANTROPOLOGIA CONTROLO DE REVISÃO Revisão Data Capítulo/Página Descrição 00 26.05.2014 Não Aplicável Versão Original ELABORADO VERIFICADO VALIDADO APROVADO __________ ___/___/___ ANTROPÓLOGO RESPONSÁVEL ______...</text:p>
          </table:table-cell>
          <table:table-cell table:number-columns-repeated="1015"/>
        </table:table-row>
        <table:table-row table:style-name="ro1">
          <table:table-cell office:value-type="string">
            <text:p>249a_IA_NC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5. Pistas usadas: relatório, relatorio, relatório final, relatorio final, projeto, intervenção arqueológica, intervencao arqueologica, escavação, escavacao, sondagens, trabalhos arqueológicos, trabalhos arqueologicos.</text:p>
          </table:table-cell>
          <table:table-cell office:value-type="string">
            <text:p>relatório, relatorio, relatório final, relatorio final, projeto, intervenção arqueológica, intervencao arqueologica, escavação, escavacao, sondagens, trabalhos arqueológicos, trabalhos arqueologicos</text:p>
          </table:table-cell>
          <table:table-cell office:value-type="string">
            <text:p>Assinatura PDF</text:p>
          </table:table-cell>
          <table:table-cell office:value-type="string">
            <text:p>EP 399 – Gravura rupestre – Couto rita.gaspar Microsoft® Office Word 2007 D:20140708160733+01'00' D:20140708160733+01'00' Microsoft® Office Word 2007 AHBS Empreitada Geral de Construção do Aproveitamento Hidroeléctrico do Baixo Sabor PLANO DE SALVAGUARDA DO PATRIMÓNIO ESTUDO SOBRE A ROMANIZAÇÃO NO VALE DO SABOR EP 189 – QUINTA DE CRESTELOS – NECRÓPOLE ESTE PARTE I - RELATÓRIO FINAL AHBS/RPSP.872.00  AHBS COPYRIGHT – Todos os direitos reservados Página 1 de 54 O presente documento encontra-se actualizado na rede do ACE. Após impressão não se garante a sua actualização, excepto se tiver carimbo (verde) “cópia controlada”. ESTUDO SOBRE A ROMANIZAÇÃO NO VALE DO SABOR EP 189 – QUINTA DE CRESTELOS – NECRÓPOLE ESTE PARTE I - RELATÓRIO FINAL CONTROLO DE REVISÃO Revisão Data Capítulo/Página Descrição 00 04.06.2014 Não Aplicável Versão Original ELABORADO VERIFICADO VALIDADO APROVADO __________ __________ __________ ___/___/___ ARQUEÓLOGO RESPONSÁVEL __________ ___/___/___ COORDENADOR TÉCNICO GE...</text:p>
          </table:table-cell>
          <table:table-cell table:number-columns-repeated="1015"/>
        </table:table-row>
        <table:table-row table:style-name="ro1">
          <table:table-cell office:value-type="string">
            <text:p>249b_ANTROP_QC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130. Pistas usadas: relatório, relatorio, relatório final, relatorio final, data, descrição, descricao.</text:p>
          </table:table-cell>
          <table:table-cell office:value-type="string">
            <text:p>relatório, relatorio, relatório final, relatorio final, data, descrição, descricao</text:p>
          </table:table-cell>
          <table:table-cell office:value-type="string">
            <text:p>Assinatura PDF</text:p>
          </table:table-cell>
          <table:table-cell office:value-type="string">
            <text:p>EP 399 – Gravura rupestre – Couto rita.gaspar Microsoft® Office Word 2007 D:20140708163242+01'00' D:20140708163242+01'00' Microsoft® Office Word 2007 AHBS Empreitada Geral de Construção do Aproveitamento Hidroelétrico do Baixo Sabor PLANO DE SALVAGUARDA DO PATRIMÓNIO ESTUDO SOBRE A ROMANIZAÇÃO NO VALE DO SABOR EP 189 (QUINTA DE CRESTELOS – NECRÓPOLE ESTE) PARTE II - RELATÓRIO FINAL ANTROPOLOGIA AHBS/RPSP.870.00  AHBS COPYRIGHT – Todos os direitos reservados Página 1 de 105 O presente documento encontra-se atualizado na rede do ACE. Após impressão não se garante a sua atualização, exceto se tiver carimbo (verde) “cópia controlada”. PLANO DE SALVAGUARDA DO PATRIMÓNIO ESTUDO SOBRE A ROMANIZAÇÃO NO VALE DO SABOR EP 189 (QUINTA DE CRESTELOS - NECRÓPOLE ESTE) PARTE II - RELATÓRIO FINAL ANTROPOLOGIA CONTROLO DE REVISÃO Revisão Data Capítulo/Página Descrição 00 26.05.2014 Não Aplicável Versão Original ELABORADO VERIFICADO VALIDADO APROVADO __________ ___/___/___ ANTROPÓLOGO RESPONSÁVEL ______...</text:p>
          </table:table-cell>
          <table:table-cell table:number-columns-repeated="1015"/>
        </table:table-row>
        <table:table-row table:style-name="ro1">
          <table:table-cell office:value-type="string">
            <text:p>249b_BS189_13 ARQ.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9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30515154601+01'00' Nitro Pro 8 (8. 0. 9. 8) D:20130515141108Z Nitro Pro 8 (8. 0. 9. 8) Copyright © arqueologia e património Matosinhos 2011 Intervenção Arqueológica na Necrópole Este da Quinta de Crestelos FICHA TÉCNICA PROJECTO 249b Trabalho de Campo Direção Ana Roriz, arqueóloga Alexandrina Amorim, arqueóloga Arqueólogos Joana Tomé, Sandrine Fernandes, Carlos Silva, Joan Palmer, Rui Pinheiro , Rui Leonardo, Oscar Teixeira, Tapício Nóbrega Direção dos trabalhos antropológicos Zélia Rodrigues, antropóloga Assistentes de arqueólogo Bebiana Mota, Raúl Costa, Ricardo Mota, André Saraiva Operário de arqueologia Pedro Pinto Trabalho de Gabinete Relatório Ana Roriz e Alexandra Amorim Desenho gráfico Rui Oliveira José Domingues Nuno Vitória Fotografia de espólio Tãnia Falcão, técnico superior de gestão do património Apoio técnico e revisão de texto Jorge Fonseca, arqueólogo Teresa Silva, arqueóloga, pós-graduada em museologia Data Maio de 2013 relatório final página 3 de 49</text:p>
          </table:table-cell>
          <table:table-cell table:number-columns-repeated="1015"/>
        </table:table-row>
        <table:table-row table:style-name="ro1">
          <table:table-cell office:value-type="string">
            <text:p>249b_BS189_13_ANTRO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1.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30515125332Z Nitro Pro 8 (8. 0. 9. 8) D:20130515125729Z Nitro Pro 8 (8. 0. 9. 8) Trabalhos de antropologia no âmbito da intervenção arqueológica na Necrópole Este da Quinta de Crestelos FICHA TÉCNICA PROJECTO 249b Trabalho de Campo Direção da intervenção arqueológica Ana Roriz, arqueóloga Alexandrina Soares, arqueóloga Direção dos trabalhos antropológicos Zélia Rodrigues, antropóloga Execução dos trabalhos antropológicos Zélia Rodrigues Trabalho de Gabinete Relatório Zélia Rodrigues Revisão de texto Teresa Silva, arqueóloga, pós-graduada em Museologia Data Maio de 2013 relatório final página 3 de 98</text:p>
          </table:table-cell>
          <table:table-cell table:number-columns-repeated="1015"/>
        </table:table-row>
        <table:table-row table:style-name="ro1">
          <table:table-cell office:value-type="string">
            <text:p>249b_IA_QC_FIN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5. Pistas usadas: relatório, relatorio, relatório final, relatorio final, projeto, intervenção arqueológica, intervencao arqueologica, escavação, escavacao, sondagens, trabalhos arqueológicos, trabalhos arqueologicos.</text:p>
          </table:table-cell>
          <table:table-cell office:value-type="string">
            <text:p>relatório, relatorio, relatório final, relatorio final, projeto, intervenção arqueológica, intervencao arqueologica, escavação, escavacao, sondagens, trabalhos arqueológicos, trabalhos arqueologicos</text:p>
          </table:table-cell>
          <table:table-cell office:value-type="string">
            <text:p>Assinatura PDF</text:p>
          </table:table-cell>
          <table:table-cell office:value-type="string">
            <text:p>EP 399 – Gravura rupestre – Couto rita.gaspar Microsoft® Office Word 2007 D:20140708160733+01'00' D:20140708160733+01'00' Microsoft® Office Word 2007 AHBS Empreitada Geral de Construção do Aproveitamento Hidroeléctrico do Baixo Sabor PLANO DE SALVAGUARDA DO PATRIMÓNIO ESTUDO SOBRE A ROMANIZAÇÃO NO VALE DO SABOR EP 189 – QUINTA DE CRESTELOS – NECRÓPOLE ESTE PARTE I - RELATÓRIO FINAL AHBS/RPSP.872.00  AHBS COPYRIGHT – Todos os direitos reservados Página 1 de 54 O presente documento encontra-se actualizado na rede do ACE. Após impressão não se garante a sua actualização, excepto se tiver carimbo (verde) “cópia controlada”. ESTUDO SOBRE A ROMANIZAÇÃO NO VALE DO SABOR EP 189 – QUINTA DE CRESTELOS – NECRÓPOLE ESTE PARTE I - RELATÓRIO FINAL CONTROLO DE REVISÃO Revisão Data Capítulo/Página Descrição 00 04.06.2014 Não Aplicável Versão Original ELABORADO VERIFICADO VALIDADO APROVADO __________ __________ __________ ___/___/___ ARQUEÓLOGO RESPONSÁVEL __________ ___/___/___ COORDENADOR TÉCNICO GE...</text:p>
          </table:table-cell>
          <table:table-cell table:number-columns-repeated="1015"/>
        </table:table-row>
        <table:table-row table:style-name="ro1">
          <table:table-cell office:value-type="string">
            <text:p>250_IA_VIT126_17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4 D:20171222141654Z00'00' D:20171222141654Z00'00' Igespar PDF24 Creator FichaSitio RELATÓRIO FINAL Intervenção Arqueológica Rua da Vitória, Nº 126- 130 Porto 2017 Copyright © arqueologia e património Matosinhos 2017 VIT126.17 Intervenção Arqueológica Rua da Vitória, Nº126-130 FICHA TÉCNICA Ricardo Teixeira &amp; Vítor Fonseca, Arqueologia Lda. PROJETO 250 Coordenação geral Ricardo Teixeira, Arqueólogo, mestre em arqueologia Vítor Fonseca, arqueólogo Coordenação de projeto Liliana Barbosa, arqueólogo Trabalho de Campo Direção Liliana Barbosa, arqueóloga Arqueólogos Rita Teixeira, arqueóloga Pedro Dâmaso, arqueólogo Trabalho de Gabinete Relatório Rita Teixeira Desenho gráfico Rui Oliveira José Domingues Tratamento de espólio Anabela Rodrigues, assistente de arqueólogo Teresa Gonçalves, assistente de arqueólogo Apoio técnico e revisão de texto Liliana Barbosa Data 21 de Dezembro de 2017 relatório final página 3 de 31</text:p>
          </table:table-cell>
          <table:table-cell table:number-columns-repeated="1015"/>
        </table:table-row>
        <table:table-row table:style-name="ro1">
          <table:table-cell office:value-type="string">
            <text:p>251_CSR_Rea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0. Pistas usadas: relatório, relatorio, projecto, prospeção.</text:p>
          </table:table-cell>
          <table:table-cell office:value-type="string">
            <text:p>relatório, relatorio, projecto, prospeção</text:p>
          </table:table-cell>
          <table:table-cell office:value-type="string">
            <text:p>Assinatura PDF</text:p>
          </table:table-cell>
          <table:table-cell office:value-type="string">
            <text:p>D:20120808112233+01'00' pedromaia PScript5.dll Version 5.2.2 Acrobat Distiller 8.1.0 (Windows) D:20120809140629+01'00' 251 REL 2012 08 07 Caracterização da Situação de Referência - EN13 FICHA TÉCNICA Ricardo Teixeira &amp; Vítor Fonseca, Arqueologia Lda. PROJECTO 251 Coordenação geral Ricardo Teixeira, Arqueólogo, mestre em arqueologia Vítor Fonseca, Arqueólogo Direção Teresa Silva, Arqueóloga, Pós graduada em Museologia Liliana Barbosa, Arqueóloga Prospeção Teresa Silva Liliana Barbosa Pedro Maia, Técnico Superior do Património Cultural Fotografia Teresa Silva Liliana Barbosa Pedro Maia Relatório Teresa Silva Liliana Barbosa Apoio técnico e Revisão de texto Pedro Maia Data 07 de Agosto de 2012 CSR página 3 de 41</text:p>
          </table:table-cell>
          <table:table-cell table:number-columns-repeated="1015"/>
        </table:table-row>
        <table:table-row table:style-name="ro1">
          <table:table-cell office:value-type="string">
            <text:p>253_IA_LAMEGO_201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42.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GPL Ghostscript 9.14 D:20180213121428Z00'00' D:20180213121428Z00'00' Igespar PDF24 Creator FichaSitio RELATÓRIO FINAL Intervenção Arqueológica Parque de Estacionamento de Almacave - Lamego 2012 Copyright © arqueologia e património Matosinhos 2018 PALM.12 Intervenção Arqueológica Parque de Estacionamento de Almacave - Lamego FICHA TÉCNICA Ricardo Teixeira &amp; Vítor Fonseca, Arqueologia Lda. PROJECTO 253 Coordenação geral Ricardo Teixeira, arqueólogo, mestre em arqueologia Vítor Fonseca, arqueólogo Arqueólogo responsável José Sendas, mestre em arqueologia Assistente de arqueólogo Lisdália Mota, assistente de arqueólogo Grafismo&amp;Ilustrações Rui Oliveira, técnico superior José Domingues, técnico superior Tratamento de espólio Anabela Rodrigues, assistente de arqueólogo Teresa Gonçalves, assistente de arqueólogo Revisão Pedro Maia, técnico superior de gestão do património Trabalhos de gabinete (coordenação) Liliana Barbosa, arqueóloga O arqueólogo responsável: José Luís da Silva Sendas Matosi...</text:p>
          </table:table-cell>
          <table:table-cell table:number-columns-repeated="1015"/>
        </table:table-row>
        <table:table-row table:style-name="ro1">
          <table:table-cell office:value-type="string">
            <text:p>254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57_LAR102_14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cto, intervenção arqueológica, intervencao arqueologica, acompanhamento arqueológico, acompanhamento arqueologico.</text:p>
          </table:table-cell>
          <table:table-cell office:value-type="string">
            <text:p>relatório, relatorio, relatório final, relatorio final, projecto, intervenção arqueológica, intervencao arqueologica, acompanhamento arqueológico, acompanhamento arqueologico</text:p>
          </table:table-cell>
          <table:table-cell office:value-type="string">
            <text:p>Assinatura PDF</text:p>
          </table:table-cell>
          <table:table-cell office:value-type="string">
            <text:p>GPL Ghostscript 9.14 D:20161114095934Z00'00' D:20161114095934Z00'00' Igespar PDF24 Creator FichaSitio RELATÓRIO FINAL Intervenção Arqueológica Rua das Laranjeiras, 102 a 104 Porto 2013 Copyright © arqueologia e património Matosinhos 2016 LAR102.14 Acompanhamento Arqueológico Rua das Laranjeiras, 102 a 104 FICHA TÉCNICA Ricardo Teixeira &amp; Vítor Fonseca, Arqueologia Lda. PROJECTO 257 Coordenação geral Ricardo Teixeira, arqueólogo, mestre em arqueologia Vítor Fonseca, arqueólogo Trabalho de Campo Direção e relatório Teresa Silva, arqueóloga, pós graduada em museologia Graça Pereira, arqueóloga Trabalho de Gabinete Desenho gráfico Rui Oliveira Tratamento de espólio Anabela Rodrigues, assistente de arqueólogo Teresa Gonçalves, assistente de arqueólogo Fotografia de espólio Teresa Gonçalves Revisão de texto Pedro Maia, técnico superior de património cultural Data 9 de Novembro de 2016 relatório final página 3 de 23</text:p>
          </table:table-cell>
          <table:table-cell table:number-columns-repeated="1015"/>
        </table:table-row>
        <table:table-row table:style-name="ro1">
          <table:table-cell office:value-type="string">
            <text:p>258_CSR_PAAV13_Rel.pdf</text:p>
          </table:table-cell>
          <table:table-cell office:value-type="string">
            <text:p>.pdf</text:p>
          </table:table-cell>
          <table:table-cell office:value-type="string">
            <text:p>Documento PDF</text:p>
          </table:table-cell>
          <table:table-cell office:value-type="string">
            <text:p>Relatório de projeto</text:p>
          </table:table-cell>
          <table:table-cell office:value-type="string">
            <text:p>Baixa</text:p>
          </table:table-cell>
          <table:table-cell office:value-type="string">
            <text:p>Documento PDF; o conteúdo aparenta corresponder a tabela / base de dados. Foram analisadas as primeiras 4 página(s) de um total de 64. Pistas usadas: nome, data.</text:p>
          </table:table-cell>
          <table:table-cell office:value-type="string">
            <text:p>nome, data</text:p>
          </table:table-cell>
          <table:table-cell office:value-type="string">
            <text:p>Assinatura PDF</text:p>
          </table:table-cell>
          <table:table-cell office:value-type="string">
            <text:p>D:20130903142952+01'00' pedromaia PScript5.dll Version 5.2.2 Acrobat Distiller 8.1.0 (Windows) D:20131007123952+01'00' 258 CSR 2013 09 02 Caracterização de Situação de Referência Ponte de Bolfiar sobre o Rio Alfusqueiro; Ponte de Perrães aom km 17+406; PI sobre CF, Ramal do Vouga; Ponte de Águeda ao km 231+950 – Reabilitação das Obras de Arte Distrito de Aveiro, Concelhos de Águeda e Albergaria-a-Velha, 2013 DIRECTOR TÉCNICO DE OBRA Elaborado Por: Recepcionado na EP-SA: Nome: Nome: Director Científico de Arqueologia Director de Fiscalização Rúbrica: Rúbrica: Data: Data: Tomada de Conhecimento: Validado na EP-SA: Nome: Nome: Director Técnico da Empreitada Coordenação Gestão Património Cultural Rúbrica: Rúbrica: Data: Data: N.º Revisão: Data: Motivo(s) da Alteração: Pág. Alterada(s): Copyright © arqueologia e património Matosinhos 2013 Copyright © arqueologia e património Matosinhos 2013</text:p>
          </table:table-cell>
          <table:table-cell table:number-columns-repeated="1015"/>
        </table:table-row>
        <table:table-row table:style-name="ro1">
          <table:table-cell office:value-type="string">
            <text:p>259b_IA_Relatorio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1.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D:20160122183001Z Writer OpenOffice 4.1.1 D:20160125112629Z RELATÓRIO FINAL Intervenção Arqueológica Edifício da Creche da Associação de Moradores de Massarelos - Rua Casal do Pedro, nº3 Porto 2013 Copyright © arqueologia e património Matosinhos 2016 CSP3.13 Intervenção Arqueológica Rua Casal do Pedro, nº3 FICHA TÉCNICA Ricardo Teixeira &amp; Vítor Fonseca, Arqueologia Lda. PROJETO 259b Coordenação geral Ricardo Teixeira, arqueólogo, mestre em arqueologia Vítor Fonseca, arqueólogo Coordenação de projeto Jorge Fonseca, arqueólogo Trabalho de Campo Direção Graça Pereira, arqueóloga Trabalho de Gabinete Relatório Graça Pereira Desenho gráfico Rui Oliveira Tratamento de espólio Anabela Rodrigues, assistente de arqueólogo Teresa Gonçalves, assistente de arqueólogo Fotografia de espólio Pedro Maia, técnico superior de gestão do património Apoio técnico e revisão de texto Teresa Silva, arqueóloga, pós-graduada em museologia Data Janeiro de 2016 relatório final página 3 de 39</text:p>
          </table:table-cell>
          <table:table-cell table:number-columns-repeated="1015"/>
        </table:table-row>
        <table:table-row table:style-name="ro1">
          <table:table-cell office:value-type="string">
            <text:p>261_IA MANC_1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1. Pistas usadas: relatório, relatorio, relatório final, relatorio final, projecto, intervenção arqueológica, intervencao arqueologica, sondagens.</text:p>
          </table:table-cell>
          <table:table-cell office:value-type="string">
            <text:p>relatório, relatorio, relatório final, relatorio final, projecto, intervenção arqueológica, intervencao arqueologica, sondagens</text:p>
          </table:table-cell>
          <table:table-cell office:value-type="string">
            <text:p>Assinatura PDF</text:p>
          </table:table-cell>
          <table:table-cell office:value-type="string">
            <text:p>D:20130702161005+01'00' pedromaia PScript5.dll Version 5.2.2 Acrobat Distiller 8.1.0 (Windows) D:20130704111422+01'00' 261 Rel Final 2013 05 17 RELATÓRIO FINAL Sondagens Arqueológicas Hospedaria e Casa dos Moços do Mosteiro de Santo André de Ancede Baião 2013 Copyright © arqueologia e património Matosinhos 2013 Intervenção Arqueológica M.ANC.13 FICHA TÉCNICA Ricardo Teixeira &amp; Vítor Fonseca, Arqueologia Lda. PROJECTO 261 Coordenação geral Ricardo Teixeira, arqueólogo, mestre em arqueologia Vítor Fonseca, arqueólogo Trabalho de Campo Direção Jorge Fonseca Assistentes de arqueólogo Bebiana Mota Ricardo Mota Operário de arqueologia Pedro Pinto Trabalho de Gabinete Relatório Jorge Fonseca Teresa Silva, arqueóloga, pós-graduada em museologia Desenho gráfico Rui Oliveira Cláudio Pimenta Tratamento de espólio Anabela Rodrigues, assistente de arqueólogo Teresa Gonçalves, assistente de arqueólogo Conservação e restauro Anabela Hipólito, técnica superior de conservação e restauro Fotografia de e...</text:p>
          </table:table-cell>
          <table:table-cell table:number-columns-repeated="1015"/>
        </table:table-row>
        <table:table-row table:style-name="ro1">
          <table:table-cell office:value-type="string">
            <text:p>261_I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8. Pistas usadas: relatório, relatorio, projeto, projecto, intervenção arqueológica, intervencao arqueologica, sondagens.</text:p>
          </table:table-cell>
          <table:table-cell office:value-type="string">
            <text:p>relatório, relatorio, projeto, projecto, intervenção arqueológica, intervencao arqueologica, sondagens</text:p>
          </table:table-cell>
          <table:table-cell office:value-type="string">
            <text:p>Assinatura PDF</text:p>
          </table:table-cell>
          <table:table-cell office:value-type="string">
            <text:p>D:20130509141557+01'00' jorgefonseca PScript5.dll Version 5.2.2 Acrobat Distiller 8.1.0 (Windows) D:20130509141826+01'00' 261 Rel Prel 2013 05 02 RELATÓRIO PRELIMINAR Sondagens Arqueológicas Hospedaria e Casa dos Moços do Mosteiro de Santo André de Ancede Baião 2013 Copyright © arqueologia e património Matosinhos 2011 Intervenção Arqueológica M.ANC.13 FICHA TÉCNICA Ricardo Teixeira &amp; Vítor Fonseca, Arqueologia Lda. PROJECTO 261 Coordenação geral Ricardo Teixeira, Arqueólogo, mestre em arqueologia Vítor Fonseca, arqueólogo Coordenação de projeto Jorge Fonseca, arqueólogo Trabalho de Campo Direção Jorge Fonseca Assistentes de arqueólogo Bebiana Mota Ricardo Mota Operário de arqueologia Pedro Pinto Trabalho de Gabinete Relatório Jorge Fonseca Desenho gráfico Rui Oliveira Tratamento de espólio Anabela Rodrigues, assistente de arqueólogo Teresa Gonçalves, assistente de arqueólogo Conservação e restauro Anabela Hipólito, técnica superior de conservação e restauro Fotografia de espólio Pedro...</text:p>
          </table:table-cell>
          <table:table-cell table:number-columns-repeated="1015"/>
        </table:table-row>
        <table:table-row table:style-name="ro1">
          <table:table-cell office:value-type="string">
            <text:p>262_IA INTER_1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14.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D:20131128151643Z ArqueologoGeral PScript5.dll Version 5.2.2 Acrobat Distiller 8.1.0 (Windows) D:20131203112927Z 262 REL Pomb 21 11 2013b Copyright © arqueologia e património Matosinhos 2013 Intercetor de Raposeira, na Zona Especial de Proteção do Mosteiro de Pombeiro FICHA TÉCNICA Ricardo Teixeira &amp; Vítor Fonseca, Arqueologia Lda. PROJECTO 262 Coordenação geral Ricardo Teixeira, Arqueólogo, mestre em arqueologia Vítor Fonseca, arqueólogo Coordenação de projeto Jorge Fonseca, arqueólogo Trabalho de Campo Direção Rui Pinheiro, pós-graduado em arqueologia Arqueólogos Jorge Fonseca, arqueólogo Zélia Rodrigues, antropóloga Assistentes de arqueólogo Ricardo Mota Operários de arqueologia José Pedro Pinheiro Trabalho de Gabinete Coordenação dos trabalhos de gabinete, apoio técnico e revisão Teresa Silva, arqueóloga, pós-graduada em museologia Relatório Rui Pinheiro Desenho gráfico Rui Oliveira Tratamento de espólio Anabela Rodrigues, assistente de arqueólogo Teresa Gonçalves, assistente de ar...</text:p>
          </table:table-cell>
          <table:table-cell table:number-columns-repeated="1015"/>
        </table:table-row>
        <table:table-row table:style-name="ro1">
          <table:table-cell office:value-type="string">
            <text:p>264_CLCAST1713_IA_RuaCastel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GPL Ghostscript 9.14 D:20160913114358+01'00' D:20160913114358+01'00' pedromaia PDF24 Creator CLCAST1713_FICHA_SITIO.pdf RELATÓRIO FINAL Intervenção Arqueológica Rua do Castelo, nº17-19 Lamego 2013 Copyright © arqueologia e património Matosinhos 2016 CLCAST17.13 Intervenção Arqueológica Reconstrução de edifício para habitação - Lamego FICHA TÉCNICA Ricardo Teixeira &amp; Vítor Fonseca, Arqueologia Lda. PROJECTO 264 Coordenação geral Ricardo Teixeira, arqueólogo, mestre em arqueologia Vítor Fonseca, arqueólogo Direção de Campo José Sendas, arqueólogo, mestre em arqueologia Assistentes de arqueólogo Lisdália Mota, assistente de arqueólogo Ricardo Mota, assistente de arqueólogo Bebiana Mota, assistente de arqueólogo Grafismo&amp;Ilustrações Rui Oliveira, técnico superior (coordenação e execução) José Domingues, técnico superior (execução) Tratamento de espólio Anabela Rodrigues, assistente de arqueólogo Teresa Gonçalves, assistente de arqueólogo Fotografia de espólio Pedro Maia, técnico superior d...</text:p>
          </table:table-cell>
          <table:table-cell table:number-columns-repeated="1015"/>
        </table:table-row>
        <table:table-row table:style-name="ro1">
          <table:table-cell office:value-type="string">
            <text:p>265_RSM19_21_AA_StaMarin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GPL Ghostscript 9.14 D:20160916112807+01'00' D:20160916112807+01'00' Igespar PDF24 Creator FichaSitio RELATÓRIO FINAL Intervenção Arqueológica Rua de Santa Marinha, 19-21 Vila Nova de Gaia 2013 Copyright © arqueologia e património Matosinhos 2016 SM19.13 Intervenção Arqueológica Rua de Santa Marinha, 19-21 FICHA TÉCNICA Ricardo Teixeira &amp; Vítor Fonseca, Arqueologia Lda. PROJECTO 110 Coordenação geral Ricardo Teixeira, arqueólogo, mestre em arqueologia Vítor Fonseca, arqueólogo Coordenação de Projeto Jorge Fonseca, arqueólogo Trabalho de Campo Direção Teresa Silva, arqueóloga Trabalho de Gabinete Relatório Teresa Silva Desenho gráfico Rui Oliveira Tratamento de espólio Anabela Rodrigues, assistente de arqueólogo Teresa Gonçalves, assistente de arqueólogo Fotografia de espólio Teresa Gonçalves Revisão de texto Pedro Maia, técnico superior de gestão do património Data 13 de Setembro de 2016 relatório final página 3 de 21</text:p>
          </table:table-cell>
          <table:table-cell table:number-columns-repeated="1015"/>
        </table:table-row>
        <table:table-row table:style-name="ro1">
          <table:table-cell office:value-type="string">
            <text:p>267_AcArq_MTS_APDL_13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0.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office:value-type="string">
            <text:p>D:20150623160839+01'00' Arlinda Fortes Writer LibreOffice 4.4 D:20150626112124+01'00' RELATÓRIO FINAL Acompanhamento Arqueológico Empreitada de construção da zona norte do pólo 2 (Gatões/Guifões) da Plataforma Logística de Leixões, incluindo os acessos ao porto Matosinhos, 2015 Copyright © arqueologia e património Matosinhos 2015 PLLP2.13 Acompanhamento Arqueológico da Plataforma Logística de Leixões Pólo 2 - Gatões/Guifões FICHA TÉCNICA Ricardo Teixeira &amp; Vítor Fonseca, Arqueologia Lda. PROJECTO 267 Coordenação geral Vítor Fonseca, arqueólogo Coordenação de projeto Liliana Barbosa, arqueóloga Trabalho de Campo Arqueólogo Pedro Dâmaso, arqueólogo Trabalho de Gabinete Relatório do acompanhamento arqueológico Pedro Dâmaso Apoio técnico e revisão de texto Liliana Barbosa Data 22 de junho de 2015 relatório final página 3 de 73</text:p>
          </table:table-cell>
          <table:table-cell table:number-columns-repeated="1015"/>
        </table:table-row>
        <table:table-row table:style-name="ro1">
          <table:table-cell office:value-type="string">
            <text:p>267_REL_FINAL_Escav.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2. Pistas usadas: relatório, relatorio, relatório final, relatorio final, projeto, intervenção arqueológica, intervencao arqueologica, acompanhamento arqueológico, acompanhamento arqueologico, escavação, escavacao.</text:p>
          </table:table-cell>
          <table:table-cell office:value-type="string">
            <text:p>relatório, relatorio, relatório final, relatorio final, projeto, intervenção arqueológica, intervencao arqueologica, acompanhamento arqueológico, acompanhamento arqueologico, escavação, escavacao</text:p>
          </table:table-cell>
          <table:table-cell office:value-type="string">
            <text:p>Assinatura PDF</text:p>
          </table:table-cell>
          <table:table-cell office:value-type="string">
            <text:p>GPL Ghostscript 9.14 D:20160621181302+01'00' D:20160621181302+01'00' Liliana Barbosa PDF24 Creator RELATÓRIO FINAL Intervenção Arqueológica Plataforma Logística de Leixões Pólo 2 - Gatões/Guifões Matosinhos 2015 Copyright © arqueologia e património Matosinhos 2016 PLLP2.13 Intervenção Arqueológica Plataforma Logística de Leixões Pólo 2 - Gatões/Guifões FICHA TÉCNICA Ricardo Teixeira &amp; Vítor Fonseca, Arqueologia Lda. PROJETO 267 Coordenação geral Vítor Fonseca, arqueólogo Coordenação de projeto Liliana Barbosa, arqueóloga Trabalho de Campo Direção Liliana Barbosa, escavação arqueológica Pedro Dâmaso, acompanhamento arqueológico Zélia Rodrigues, trabalhos antropológicos Arqueólogos Liliana Barbosa Pedro Dâmaso Jorge Fonseca Rui Pinheiro João Silva Bárbara Costa Licenciados em Arqueologia Rita Teixeira Rui Santo Sílvia Maciel Ana Branco Filipe Macedo Sara Fonseca Antropóloga Zélia Rodrigues Assistentes de arqueólogo Bebiana Mota Ricardo Mota Teresa Gonçalves Desenho arqueológico Bebiana M...</text:p>
          </table:table-cell>
          <table:table-cell table:number-columns-repeated="1015"/>
        </table:table-row>
        <table:table-row table:style-name="ro1">
          <table:table-cell office:value-type="string">
            <text:p>268_IA_TVA 1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9.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122102001Z barbaracosta PScript5.dll Version 5.2.2 Acrobat Distiller 8.0.0 (Windows) D:20160122123453Z 268_REL_FIN_2016_01_04 Copyright © arqueologia e património Matosinhos 2015 Intervenção Arqueológica na Rua Tareija Vaz de Altaro FICHA TÉCNICA Ricardo Teixeira &amp; Vítor Fonseca, Arqueologia Lda. PROJECTO 268 Coordenação geral Ricardo Teixeira, Arqueólogo, mestre em arqueologia Vítor Fonseca, arqueólogo Coordenação de projeto Jorge Fonseca, arqueólogo Trabalho de Campo Direção Graça Pereira, arqueóloga Arqueólogos Helena Marçal, arqueóloga Assistentes de arqueólogo Anabela Rodrigues, assistente de arqueólogo Bebiana Mota, assistente de arqueólogo Desenhador de Arqueologia Rui Oliveira Levantamento Topográfico Cláudio Pimenta Trabalho de Gabinete Relatório Graça Pereira Desenho gráfico José Luís Domingues Rui Oliveira Tratamento de espólio Anabela Rodrigues Teresa Gonçalves, assistente de arqueólogo Fotografia de espólio Pedro Maia, técnico superior de gestão do património Apoio...</text:p>
          </table:table-cell>
          <table:table-cell table:number-columns-repeated="1015"/>
        </table:table-row>
        <table:table-row table:style-name="ro1">
          <table:table-cell office:value-type="string">
            <text:p>269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70 _IA_CAS13_Vol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17. Pistas usadas: relatório, relatorio, relatório final, relatorio final, projecto, trabalhos arqueológicos, trabalhos arqueologicos.</text:p>
          </table:table-cell>
          <table:table-cell office:value-type="string">
            <text:p>relatório, relatorio, relatório final, relatorio final, projecto, trabalhos arqueológicos, trabalhos arqueologicos</text:p>
          </table:table-cell>
          <table:table-cell office:value-type="string">
            <text:p>Assinatura PDF</text:p>
          </table:table-cell>
          <table:table-cell office:value-type="string">
            <text:p>D:20140212153953Z jorgefonseca PScript5.dll Version 5.2.2 Acrobat Distiller 8.1.0 (Windows) D:20140220154240-00'00' 270 Rel Fin 2014 02 11 Copyright © arqueologia e património Matosinhos 2014 Estudo para a definição da área arqueológica da Torre do Castelo de Aguiar de Sousa – CAS. 13 FICHA TÉCNICA Ricardo Teixeira &amp; Vítor Fonseca, Arqueologia Lda. PROJECTO 270 Coordenação geral Ricardo Teixeira, Arqueólogo, mestre em arqueologia Vítor Fonseca, arqueólogo Trabalho de Campo Direção dos trabalhos arqueológicos Jorge Fonseca Arqueólogo Rui Pinheiro, arqueólogo Assistentes de arqueólogo Bebiana Mota Ricardo Mota Operário de arqueologia Pedro Pinto Direção e execução dos trabalhos antropológicos Zélia Rodrigues, antropóloga Trabalho de Gabinete Relatório Jorge Fonseca Desenho gráfico Rui Oliveira Tratamento de espólio Anabela Rodrigues, assistente de arqueólogo Teresa Gonçalves, assistente de arqueólogo Conservação e restauro Paula Fernandes, técnica superior de conservação e restauro Fotog...</text:p>
          </table:table-cell>
          <table:table-cell table:number-columns-repeated="1015"/>
        </table:table-row>
        <table:table-row table:style-name="ro1">
          <table:table-cell office:value-type="string">
            <text:p>270_ANTROP_CAS_1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office:value-type="string">
            <text:p>D:20140212121925Z jorgefonseca PScript5.dll Version 5.2.2 Acrobat Distiller 8.1.0 (Windows) D:20140220154225-00'00' 270 REL ANTROP Copyright © arqueologia e património Matosinhos 2014 Estudo para a definição da área arqueológica da Torre do Castelo de Aguiar de Sousa – CAS. 13 FICHA TÉCNICA Ricardo Teixeira &amp; Vítor Fonseca, Arqueologia Lda. PROJETO 270 Coordenação geral Ricardo Teixeira, arqueólogo, mestre em arqueologia Vítor Fonseca, arqueólogo Trabalho de Campo Direção Jorge Fonseca, arqueólogo Direção e execução dos trabalhos antropológicos Zélia Rodrigues, antropóloga Trabalho de Gabinete Relatório Zélia Rodrigues Tratamento de espólio Anabela Rodrigues, assistente de arqueólogo Teresa Gonçalves, assistente de arqueólogo Apoio técnico e revisão de texto Pedro Maia, técnico superior de gestão do património Teresa Silva, arqueóloga, pós-graduada em museologia Data Fevereiro de 2014 relatório final página 3 de 36</text:p>
          </table:table-cell>
          <table:table-cell table:number-columns-repeated="1015"/>
        </table:table-row>
        <table:table-row table:style-name="ro1">
          <table:table-cell office:value-type="string">
            <text:p>270_Est_CAS13 VOL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40318162349Z Nitro Pro 8 (8. 0. 9. 8) Nitro Pro 8 (8. 0. 9. 8) D:20140320122421Z RELATÓRIO FINAL Estudo para a definição da área arqueológica da Torre do Castelo de Aguiar de Sousa Vol. 1 - Levantamento e recolha de informação oral, documental e bibliográfica Aguiar de Sousa 2013-2014 Copyright © arqueologia e património Matosinhos 2014 Estudo para a definição da área arqueológica da Torre do Castelo de Aguiar de Sousa Levantamento e recolha de informação oral, documental e bibliográfica FICHA TÉCNICA Ricardo Teixeira &amp; Vítor Fonseca, Arqueologia Lda. PROJECTO 270 Coordenação Ricardo Teixeira, Arqueólogo, mestre em arqueologia Pesquisa Bibliográfica Ricardo Teixeira (coordenação e execução) Teresa Silva (execução) Pedro Maia (apoio) Hugo Caseira (apoio) Pesquisa Documental Ricardo Teixeira (coordenação e execução) Teresa Silva (execução) Hugo Caseira (apoio) Recolha de Testemunhos Orais Teresa Silva Pedro Maia (apoio) Hugo Caseira (apoio) Bases de Dados Ricardo Teixeira Teresa Sil...</text:p>
          </table:table-cell>
          <table:table-cell table:number-columns-repeated="1015"/>
        </table:table-row>
        <table:table-row table:style-name="ro1">
          <table:table-cell office:value-type="string">
            <text:p>270_Est_CAS13_VOL1_ ANEXO.pdf</text:p>
          </table:table-cell>
          <table:table-cell office:value-type="string">
            <text:p>.pdf</text:p>
          </table:table-cell>
          <table:table-cell office:value-type="string">
            <text:p>Documento PDF</text:p>
          </table:table-cell>
          <table:table-cell office:value-type="string">
            <text:p>Pesquisa Bibliográfica</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531. Pistas usadas: relatório, relatorio, relatório final, relatorio final, base de dados, código, codigo.</text:p>
          </table:table-cell>
          <table:table-cell office:value-type="string">
            <text:p>relatório, relatorio, relatório final, relatorio final, base de dados, código, codigo</text:p>
          </table:table-cell>
          <table:table-cell office:value-type="string">
            <text:p>Assinatura PDF</text:p>
          </table:table-cell>
          <table:table-cell office:value-type="string">
            <text:p>D:20140320121915Z Nitro Pro 8 (8. 0. 9. 8) Nitro Pro 8 (8. 0. 9. 8) D:20140320122136Z Estudo para a definição da área arqueológica da Torre do Castelo de Aguiar de Sousa Levantamento e recolha de informação oral, documental e bibliográfica ANEXOS I. Pesquisa Bibliográfica – Base de Dados relatório final anexos CASTELO DE AGUIAR DE SOUSA - PESQUISA BIBLIOGRÁFICA IDENTIFICAÇÃO - Castelologia Medieval de Entre-Douro E Minho: desde as origens a 1220. Título ALMEIDA 1978 Código Trabalho complementar para prestação de provas de doutoramento em História de Arte apresentada na Faculdade de Letras da Universidade do Porto, em 1978. Texto policopiado. Local de Edição / Editor / Ano (...) LOCALIZAÇÃO BCFLUPLocal de Depósito Disponível online SUMÁRIO Obra de referência sobre castelologia medieval. O autor faz referência ao Castelo de Aguiar de Sousa referindo que foi cabeça de terra e que esteve "ligado às campanhas de Almançor que o tomou em 995". Sobre o processo de encastelamento tem particular...</text:p>
          </table:table-cell>
          <table:table-cell table:number-columns-repeated="1015"/>
        </table:table-row>
        <table:table-row table:style-name="ro1">
          <table:table-cell office:value-type="string">
            <text:p>272_DMG66_13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6. Pistas usadas: relatório, relatorio, relatório final, relatorio final, projecto, intervenção arqueológica, intervencao arqueologica, acompanhamento arqueológico, acompanhamento arqueologico, sondagens.</text:p>
          </table:table-cell>
          <table:table-cell office:value-type="string">
            <text:p>relatório, relatorio, relatório final, relatorio final, projecto, intervenção arqueológica, intervencao arqueologica, acompanhamento arqueológico, acompanhamento arqueologico, sondagens</text:p>
          </table:table-cell>
          <table:table-cell office:value-type="string">
            <text:p>Assinatura PDF</text:p>
          </table:table-cell>
          <table:table-cell office:value-type="string">
            <text:p>D:20160407113528+01'00' Teresa Silva Writer OpenOffice 4.1.2 D:20160407115547+01'00' RELATÓRIO FINAL Intervenção Arqueológica Largo de S. Domingos, nº 66 Porto 2013 - 2015 Copyright © arqueologia e património Matosinhos 2016 00 DMG66.13 Intervenção Arqueológica Largo de S. Domingos, nº 66 – DMG66.13 FICHA TÉCNICA Ricardo Teixeira &amp; Vítor Fonseca, Arqueologia Lda. PROJECTO 272 Coordenação geral Ricardo Teixeira, arqueólogo, mestre em arqueologia Vítor Fonseca, arqueólogo Pesquisa Documental Teresa Silva, arqueóloga, pós graduada em museologia Ana Branco, estagiária do curso de arqueologia (FLUP) Daniel Leite, estagiário do curso de arqueologia (FLUP) Hugo Caseira, estagiário do curso de gestão de património cultural (ESE) Sondagens arqueológicas Trabalho de Campo Direção Jorge Fonseca, arqueólogo Assistente de arqueólogo Lisdália Mota Acompanhamento arqueológico Direção Teresa Silva Helena Marçal, arqueóloga Arqueólogos Teresa Silva Helena Marçal Graça Pereira, arqueóloga João Silva, ar...</text:p>
          </table:table-cell>
          <table:table-cell table:number-columns-repeated="1015"/>
        </table:table-row>
        <table:table-row table:style-name="ro1">
          <table:table-cell office:value-type="string">
            <text:p>272_IA_EP_DMG66_1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4. Pistas usadas: relatório, relatorio, relatório final, relatorio final, projecto, intervenção arqueológica, intervencao arqueologica, sondagens.</text:p>
          </table:table-cell>
          <table:table-cell office:value-type="string">
            <text:p>relatório, relatorio, relatório final, relatorio final, projecto, intervenção arqueológica, intervencao arqueologica, sondagens</text:p>
          </table:table-cell>
          <table:table-cell office:value-type="string">
            <text:p>Assinatura PDF</text:p>
          </table:table-cell>
          <table:table-cell office:value-type="string">
            <text:p>D:20140926171837+01'00' teresasilva PScript5.dll Version 5.2.2 Acrobat Distiller 8.1.0 (Windows) D:20140929145343+01'00' 272 Rel Fin 2014 09 23 RELATÓRIO FINAL Intervenção Arqueológica Largo de S. Domingos, nº 66 Porto 2013 Copyright © arqueologia e património Matosinhos 2014 Intervenção Arqueológica Largo de S. Domingos, nº 66 – DMG66.13 FICHA TÉCNICA Ricardo Teixeira &amp; Vítor Fonseca, Arqueologia Lda. PROJECTO 272 Coordenação geral Ricardo Teixeira, arqueólogo, mestre em arqueologia Vítor Fonseca, arqueólogo Pesquisa Documental Teresa Silva, arqueóloga, pós graduada em museologia Ana Branco, estagiária do curso de arqueologia (FLUP) Daniel Leite, estagiário do curso de arqueologia (FLUP) Hugo Caseira, estagiário do curso de gestão de património cultural (ESE) Sondagens arqueológicas Trabalho de Campo Direção Jorge Fonseca, arqueólogo Assistente de arqueólogo Lisdália Mota Registo de Edificado Teresa Silva Jorge Fonseca Trabalho de Gabinete Relatório Teresa Silva (informação histórica...</text:p>
          </table:table-cell>
          <table:table-cell table:number-columns-repeated="1015"/>
        </table:table-row>
        <table:table-row table:style-name="ro1">
          <table:table-cell office:value-type="string">
            <text:p>275_AA_REL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150224153304Z Writer LibreOffice 4.3 D:20150224163304Z RELATÓRIO FINAL Acompanhamento Arqueológico Viela do Buraco nº 24 Porto 2015 Copyright © arqueologia e património Matosinhos 2015 BUR.24.13 Acompanhamento Arqueológico Viela do Buraco nº 24 FICHA TÉCNICA Ricardo Teixeira &amp; Vítor Fonseca, Arqueologia Lda. PROJECTO 275 Coordenação geral Ricardo Teixeira, arqueólogo, mestre em arqueologia Vítor Fonseca, arqueólogo Trabalho de Campo Direção Helena Marçal, arqueóloga Arqueólogos Helena Marçal, arqueóloga Liliana Barbosa, arqueóloga João Silva, arqueólogo Operários de arqueologia Pedro Pinto Trabalho de Gabinete Relatório Helena Marçal Desenho gráfico Rui Oliveira Tratamento de espólio Anabela Rodrigues, assistente de arqueólogo Teresa Gonçalves, assistente de arqueólogo Conservação e restauro Paula Fernandes, técnica superior de conservação e restauro Fotografia de espólio Pedro Maia, técnico superior de gestão do património Apoio técnico e revisão de texto Pedro Maia Data 24 de fev...</text:p>
          </table:table-cell>
          <table:table-cell table:number-columns-repeated="1015"/>
        </table:table-row>
        <table:table-row table:style-name="ro1">
          <table:table-cell office:value-type="string">
            <text:p>276_IA_REL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office:value-type="string">
            <text:p>D:20140722160304+01'00' teresasilva PScript5.dll Version 5.2.2 Acrobat Distiller 8.1.0 (Windows) D:20140722160912+01'00' 276_REL_Final Copyright © arqueologia e património Matosinhos 2014 Acompanhamento Arqueológico Rua Francisco da Rocha Soares, nº 94 FICHA TÉCNICA Ricardo Teixeira &amp; Vítor Fonseca, Arqueologia Lda. PROJECTO 276 Coordenação geral Ricardo Teixeira, Arqueólogo, mestre em arqueologia Vítor Fonseca, arqueólogo Fotografia Teresa Silva, arqueóloga Relatório Teresa Silva Data 22 de Julho de 2014 relatório final página 3 de 10</text:p>
          </table:table-cell>
          <table:table-cell table:number-columns-repeated="1015"/>
        </table:table-row>
        <table:table-row table:style-name="ro1">
          <table:table-cell office:value-type="string">
            <text:p>278_2009_1(097)CR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User D:20160527111642+01'00' PScript5.dll Version 5.2.2 D:20160527151306+01'00' Acrobat Distiller 11.0 (Windows) 1_2009-1(097)CR_RelatorioFinal Copyright © arqueologia e património Beja 2016 Memória descritiva, levantamento topográfico e fotográfico Poço de Cinco Reis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Rui Pinheiro Assistentes de arqueólogo Nelson Vale Rodry Mendonça Trabalho de Gabinete Relatório Lídia Baptista Desenho gráfico Rodry Mendonça Data 25 de maio de 2016 relatório final página 3</text:p>
          </table:table-cell>
          <table:table-cell table:number-columns-repeated="1015"/>
        </table:table-row>
        <table:table-row table:style-name="ro1">
          <table:table-cell office:value-type="string">
            <text:p>278_2009_1(097)MC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8.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User D:20160530101913+01'00' PScript5.dll Version 5.2.2 D:20160530102327+01'00' Acrobat Distiller 11.0 (Windows) 1_2009-1(097)MC2_RelatorioFinal Copyright © arqueologia e património Beja 2016 Memória descritiva, levantamento topográfico e fotográfico Tanque do Monte da Calçada 2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Rui Pinheiro Assistentes de arqueólogo José Grilo Trabalho de Gabinete Relatório Lídia Baptista Desenho gráfico Rodry Mendonça Data 25 de maio de 2016 relatório final página 3</text:p>
          </table:table-cell>
          <table:table-cell table:number-columns-repeated="1015"/>
        </table:table-row>
        <table:table-row table:style-name="ro1">
          <table:table-cell office:value-type="string">
            <text:p>278_25794RB4_RelatorioFinal_Memor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User D:20160525101319+01'00' PScript5.dll Version 5.2.2 D:20160525104656+01'00' Acrobat Distiller 11.0 (Windows) 1_25794RB4_RelatorioFinal_Memória RELATÓRIO FINAL Minimização de impactes sobre o património cultural decorrentes da execução dos Blocos de Rega de Beringel-Beja – Fase Prévia à Obra Memória descritiva, levantamento topográfico e fotográfico e remoção para depósito credenciado Memória descritiva, levantamento topográfico e fotográfico e remoção para depósito credenciado Ribeira do Barranco 4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ssistentes de arqueólogo Nelson Vale Trabalho de Gabinete Relatório Lídia Baptista Desenho gráfico Rodry Mendonça Data 2 de maio de 2016 relatório final página 3</text:p>
          </table:table-cell>
          <table:table-cell table:number-columns-repeated="1015"/>
        </table:table-row>
        <table:table-row table:style-name="ro1">
          <table:table-cell office:value-type="string">
            <text:p>278_32348VA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72711+01'00' PScript5.dll Version 5.2.2 D:20160511172841+01'00' Acrobat Distiller 11.0 (Windows) 1_32348VA_RelatorioFinal Intervenção Arqueológica Via do Álamo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Nelson Vale Trabalho de Gabinete Relatório Lídia Baptista Lurdes Oliveira Rui Pinheiro Desenho gráfico Rodry Mendonça Data 2 de maio de 2016 relatório final página 3</text:p>
          </table:table-cell>
          <table:table-cell table:number-columns-repeated="1015"/>
        </table:table-row>
        <table:table-row table:style-name="ro1">
          <table:table-cell office:value-type="string">
            <text:p>278_32348VA_RelatorioFinal_Memor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User D:20160525104039+01'00' PScript5.dll Version 5.2.2 D:20160527110011+01'00' Acrobat Distiller 11.0 (Windows) 1_32348VA_RelatorioFinal_Memória Copyright © arqueologia e património Beja 2016 Memória descritiva, levantamento topográfico e fotográfico Via do Álamo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Nelson Vale Trabalho de Gabinete Relatório Lídia Baptista Lurdes Oliveira Rui Pinheiro Desenho gráfico Rodry Mendonça Data 25 de maio de 2016 relatório final página 3</text:p>
          </table:table-cell>
          <table:table-cell table:number-columns-repeated="1015"/>
        </table:table-row>
        <table:table-row table:style-name="ro1">
          <table:table-cell office:value-type="string">
            <text:p>278_33098FC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User D:20160525144809+01'00' PScript5.dll Version 5.2.2 D:20160527110027+01'00' Acrobat Distiller 11.0 (Windows) 1_33098FC3_RelatorioFinal Copyright © arqueologia e património Beja 2016 Memória descritiva, levantamento topográfico e fotográfico Fonte dos Cântaros 3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Rui Pinheiro Assistentes de arqueólogo José Grilo Trabalho de Gabinete Relatório Lídia Baptista Desenho gráfico Rodry Mendonça Data 25 de maio de 2016 relatório final página 3</text:p>
          </table:table-cell>
          <table:table-cell table:number-columns-repeated="1015"/>
        </table:table-row>
        <table:table-row table:style-name="ro1">
          <table:table-cell office:value-type="string">
            <text:p>278_33217MC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607215717+01'00' PScript5.dll Version 5.2.2 D:20160607215921+01'00' Acrobat Distiller 11.0 (Windows) 1_33217MC1_RelatorioFinal Intervenção Arqueológica Monte da Calçada 1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José Grilo Trabalho de Gabinete Relatório Lídia Baptista Lurdes Oliveira Rui Pinheiro Desenho gráfico Rodry Mendonça Data 06 de junho de 2016 relatório final página 3</text:p>
          </table:table-cell>
          <table:table-cell table:number-columns-repeated="1015"/>
        </table:table-row>
        <table:table-row table:style-name="ro1">
          <table:table-cell office:value-type="string">
            <text:p>278_33237NB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71445+01'00' PScript5.dll Version 5.2.2 D:20160511171744+01'00' Acrobat Distiller 11.0 (Windows) 1_33237NB_RelatorioFinal Copyright © arqueologia e património Beja 2016 Intervenção Arqueológica Nobre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rqueólogo Telmo Gomes Assistentes de arqueólogo André Saraiva Liliana Luís Nelson Vale Raul Costa Trabalho de Gabinete Relatório Lídia Baptista Desenho gráfico Rodry Mendonça Data 2 de maio de 2016 relatório final página 3</text:p>
          </table:table-cell>
          <table:table-cell table:number-columns-repeated="1015"/>
        </table:table-row>
        <table:table-row table:style-name="ro1">
          <table:table-cell office:value-type="string">
            <text:p>278_33534RA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607123632+01'00' PScript5.dll Version 5.2.2 D:20160607123818+01'00' Acrobat Distiller 11.0 (Windows) 1_33534RA1_RelatorioFinal Intervenção Arqueológica Ribeira do Álamo 1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Telmo Gomes Assistentes de arqueólogo José Grilo Nelson Vale Trabalho de Gabinete Relatório Lídia Baptista Lurdes Oliveira Rui Pinheiro Desenho gráfico Rodry Mendonça Data 06 de junho de 2016 relatório final página 3</text:p>
          </table:table-cell>
          <table:table-cell table:number-columns-repeated="1015"/>
        </table:table-row>
        <table:table-row table:style-name="ro1">
          <table:table-cell office:value-type="string">
            <text:p>278_33562AD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63323+01'00' PScript5.dll Version 5.2.2 D:20160511163522+01'00' Acrobat Distiller 11.0 (Windows) 1_33562AD_RelatorioFinal Intervenção Arqueológica Arcediago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27 de abril de 2016 relatório final página 3</text:p>
          </table:table-cell>
          <table:table-cell table:number-columns-repeated="1015"/>
        </table:table-row>
        <table:table-row table:style-name="ro1">
          <table:table-cell office:value-type="string">
            <text:p>278_34677LC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70602+01'00' PScript5.dll Version 5.2.2 D:20160511170734+01'00' Acrobat Distiller 11.0 (Windows) 1_34677LC_RelatorioFinal Copyright © arqueologia e património Beja 2016 Intervenção Arqueológica Lobeira de Cima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27 de abril de 2016 relatório final página 3</text:p>
          </table:table-cell>
          <table:table-cell table:number-columns-repeated="1015"/>
        </table:table-row>
        <table:table-row table:style-name="ro1">
          <table:table-cell office:value-type="string">
            <text:p>278_35355QT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63935+01'00' PScript5.dll Version 5.2.2 D:20160511164113+01'00' Acrobat Distiller 11.0 (Windows) 1_35355QT_RelatorioFinal Intervenção Arqueológica Quartejã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27 de abril de 2016 relatório final página 3</text:p>
          </table:table-cell>
          <table:table-cell table:number-columns-repeated="1015"/>
        </table:table-row>
        <table:table-row table:style-name="ro1">
          <table:table-cell office:value-type="string">
            <text:p>278_35418MBR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65429+01'00' PScript5.dll Version 5.2.2 D:20160511165626+01'00' Acrobat Distiller 11.0 (Windows) 1_35418MBR_RelatorioFinal Intervenção Arqueológica Monte Branco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27 de abril de 2016 relatório final página 3</text:p>
          </table:table-cell>
          <table:table-cell table:number-columns-repeated="1015"/>
        </table:table-row>
        <table:table-row table:style-name="ro1">
          <table:table-cell office:value-type="string">
            <text:p>278_35739MB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72258+01'00' PScript5.dll Version 5.2.2 D:20160511172404+01'00' Acrobat Distiller 11.0 (Windows) 1_35739MB2_RelatorioFinal Copyright © arqueologia e património Beja 2016 Intervenção Arqueológica Monte dos Baiões 2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Nelson Vale Trabalho de Gabinete Relatório Lídia Baptista Lurdes Oliveira Rui Pinheiro Desenho gráfico Rodry Mendonça Data 2 de maio de 2016 relatório final página 3</text:p>
          </table:table-cell>
          <table:table-cell table:number-columns-repeated="1015"/>
        </table:table-row>
        <table:table-row table:style-name="ro1">
          <table:table-cell office:value-type="string">
            <text:p>278_35746MF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64657+01'00' PScript5.dll Version 5.2.2 D:20160511164845+01'00' Acrobat Distiller 11.0 (Windows) 1_35746MF_RelatorioFinal Intervenção Arqueológica Monte da Faleira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rqueólogo Telmo Gomes Assistentes de arqueólogo José Grilo Trabalho de Gabinete Relatório Lídia Baptista Desenho gráfico Rodry Mendonça Data 27 de abril de 2016 relatório final página 3</text:p>
          </table:table-cell>
          <table:table-cell table:number-columns-repeated="1015"/>
        </table:table-row>
        <table:table-row table:style-name="ro1">
          <table:table-cell office:value-type="string">
            <text:p>278_36059SR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606144712+01'00' PScript5.dll Version 5.2.2 D:20160606144858+01'00' Acrobat Distiller 11.0 (Windows) 1_36059SR3_RelatorioFinal Intervenção Arqueológica Soeiro 3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José Grilo Nelson Vale Trabalho de Gabinete Relatório Lídia Baptista Lurdes Oliveira Rui Pinheiro Desenho gráfico Rodry Mendonça Data 06 de junho de 2016 relatório final página 3</text:p>
          </table:table-cell>
          <table:table-cell table:number-columns-repeated="1015"/>
        </table:table-row>
        <table:table-row table:style-name="ro1">
          <table:table-cell office:value-type="string">
            <text:p>278_36061NB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70043+01'00' PScript5.dll Version 5.2.2 D:20160511170227+01'00' Acrobat Distiller 11.0 (Windows) 1_36061NB2_RelatorioFinal Intervenção Arqueológica Nobre 2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27 de abril de 2016 relatório final página 3</text:p>
          </table:table-cell>
          <table:table-cell table:number-columns-repeated="1015"/>
        </table:table-row>
        <table:table-row table:style-name="ro1">
          <table:table-cell office:value-type="string">
            <text:p>278_36065FC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608121630+01'00' PScript5.dll Version 5.2.2 D:20160608121737+01'00' Acrobat Distiller 11.0 (Windows) 1_36065FC2_RelatorioFinal Intervenção Arqueológica Fonte dos Cântaros 2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José Grilo Nelson Vale Trabalho de Gabinete Relatório Lídia Baptista Lurdes Oliveira Rui Pinheiro Desenho gráfico Rodry Mendonça Data 06 de junho de 2016 relatório final página 3</text:p>
          </table:table-cell>
          <table:table-cell table:number-columns-repeated="1015"/>
        </table:table-row>
        <table:table-row table:style-name="ro1">
          <table:table-cell office:value-type="string">
            <text:p>278_BRBB14C7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0109Z Sérgio Alexandre Gomes Writer OpenOffice 4.1.2 D:20160210144645Z RELATÓRIO FINAL Trabalhos de minimização de impactes sobre o património cultural decorrentes da execução do Bloco de Rega de Beringel-Beja – Fase Prévia Intervenção Arqueológica Carlota 7 Copyright © arqueologia e património Beja 2015 BRBB14.C7 Intervenção Arqueológica Carlota 7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CR6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3554Z Sérgio Alexandre Gomes Writer OpenOffice 4.1.2 D:20160203152408Z RELATÓRIO FINAL Trabalhos de minimização de impactes sobre o património cultural decorrentes da execução do Bloco de Rega de Beringel -Beja – Fase Prévia Intervenção Arqueológica Cinco Reis 6 BRBB14.CR6 Intervenção Arqueológica Cinco Reis 6 Copyright © arqueologia e património Beja 2015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CR7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1914Z Sérgio Alexandre Gomes Writer OpenOffice 4.1.2 D:20160210123246Z RELATÓRIO FINAL Trabalhos de minimização de impactes sobre o património cultural decorrentes da execução do Bloco de Rega de Beringel-Beja – Fase Prévia Intervenção Arqueológica Cinco Reis 7 Copyright © arqueologia e património Beja 2015 BRBB14.CR7 Intervenção Arqueológica Cinco Reis 7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CR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1141611Z Sérgio Alexandre Gomes Writer OpenOffice 4.1.2 D:20160210174222Z RELATÓRIO FINAL Trabalhos de minimização de impactes sobre o património cultural decorrentes da execução do Bloco de Rega de Beringel-Beja – Fase Prévia Intervenção Arqueológica Carlota Copyright © arqueologia e património Beja 2015 BRBB14.CR Intervenção Arqueológica Carlota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10 de janeiro de 2016 relatório final página 3 de 19</text:p>
          </table:table-cell>
          <table:table-cell table:number-columns-repeated="1015"/>
        </table:table-row>
        <table:table-row table:style-name="ro1">
          <table:table-cell office:value-type="string">
            <text:p>278_BRBB14CT6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3339Z Sérgio Alexandre Gomes Writer OpenOffice 4.1.2 D:20160203161118Z RELATÓRIO FINAL Trabalhos de minimização de impactes sobre o património cultural decorrentes da execução do Bloco de Rega de Beringel-Beja – Fase Prévia Intervenção Arqueológica Cortes 6 Copyright © arqueologia e património Beja 2015 BRBB14.CT6 Intervenção Arqueológica Cortes 6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CT8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2601Z Sérgio Alexandre Gomes Writer OpenOffice 4.1.2 D:20160203164738Z RELATÓRIO FINAL Trabalhos de minimização de impactes sobre o património cultural decorrentes da execução do Bloco de Rega de Beringel-Beja – Fase Prévia Intervenção Arqueológica Cortes 8 Copyright © arqueologia e património Beja 2015 BRBB14.CT8 Intervenção Arqueológica Cortes 8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C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1140806Z Sérgio Alexandre Gomes Writer OpenOffice 4.1.2 D:20160205114010Z RELATÓRIO FINAL Trabalhos de minimização de impactes sobre o património cultural decorrentes da execução do Bloco de Rega de Beringel-Beja – Fase Prévia Intervenção Arqueológica Cântaros Copyright © arqueologia e património Beja 2015 BRBB14.C Intervenção Arqueológica Cântaros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25 de janeiro de 2015 relatório final página 3 de 17</text:p>
          </table:table-cell>
          <table:table-cell table:number-columns-repeated="1015"/>
        </table:table-row>
        <table:table-row table:style-name="ro1">
          <table:table-cell office:value-type="string">
            <text:p>278_BRBB14FC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4534Z Sérgio Alexandre Gomes Writer OpenOffice 4.1.2 D:20160210105726Z RELATÓRIO FINAL Trabalhos de minimização de impactes sobre o património cultural decorrentes da execução do Bloco de Rega de Beringel-Beja – Fase Prévia Intervenção Arqueológica Fonte dos Cântaros Copyright © arqueologia e património Beja 2015 BRBB14.FC Intervenção Arqueológica Fonte dos Cântaros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10 de janeiro de 2015 relatório final página 3 de 17</text:p>
          </table:table-cell>
          <table:table-cell table:number-columns-repeated="1015"/>
        </table:table-row>
        <table:table-row table:style-name="ro1">
          <table:table-cell office:value-type="string">
            <text:p>278_BRBB14MB6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72132Z Sérgio Alexandre Gomes Writer OpenOffice 4.1.2 D:20160203172610Z RELATÓRIO FINAL Trabalhos de minimização de impactes sobre o património cultural decorrentes da execução do Bloco de Rega de Beringel-Beja – Fase Prévia Intervenção Arqueológica Monte do Bolor 6 Copyright © arqueologia e património Beja 2015 BRBB14.MB6 Intervenção Arqueológica Monte do Bolor 6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MP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2758Z Sérgio Alexandre Gomes Writer OpenOffice 4.1.2 D:20160203180752Z RELATÓRIO FINAL Trabalhos de minimização de impactes sobre o património cultural decorrentes da execução do Bloco de Rega de Beringel-Beja – Fase Prévia Intervenção Arqueológica Monte do Peso Copyright © arqueologia e património Beja 2015 BRBB14.MP Intervenção Arqueológica Monte do Peso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30 de novembro de 2015 relatório final página 3 de 17</text:p>
          </table:table-cell>
          <table:table-cell table:number-columns-repeated="1015"/>
        </table:table-row>
        <table:table-row table:style-name="ro1">
          <table:table-cell office:value-type="string">
            <text:p>278_BRBB14MV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02164728Z Sérgio Alexandre Gomes Writer OpenOffice 4.1.2 D:20160210114501Z RELATÓRIO FINAL Trabalhos de minimização de impactes sobre o património cultural decorrentes da execução do Bloco de Rega de Beringel-Beja – Fase Prévia Intervenção Arqueológica Monte do Vilarinho 2 Copyright © arqueologia e património Beja 2015 BRBB14.MV2 Intervenção Arqueológica Monte do Vilarinho 2 FICHA TÉCNICA Ricardo Teixeira &amp; Vítor Fonseca, Arqueologia Lda. PROJECTO 278 Coordenação geral Ricardo Teixeira, Arqueólogo, mestre em arqueologia Vítor Fonseca, arqueólogo Coordenação de projeto Lídia Baptista, arqueóloga, mestre em arqueologia Trabalho de Campo Direção Lurdes Oliveira Rui Pinheiro Assistentes de arqueólogo Liliana Luís Nelson Vale Trabalho de Gabinete Relatório Lurdes Oliveira Desenho gráfico Rodry Mendonça Apoio técnico e revisão de texto Lídia Baptista Data 10 de janeiro de 2016 relatório final página 3 de 17</text:p>
          </table:table-cell>
          <table:table-cell table:number-columns-repeated="1015"/>
        </table:table-row>
        <table:table-row table:style-name="ro1">
          <table:table-cell office:value-type="string">
            <text:p>279_1995MM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81347+01'00' PScript5.dll Version 5.2.2 D:20160511181442+01'00' Acrobat Distiller 11.0 (Windows) 1_1995MM_RelatorioFinal Intervenção Arqueológica Monte do Meio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21593MC2_RelatorioFinal_RU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3230015+01'00' PScript5.dll Version 5.2.2 D:20160513230315+01'00' Acrobat Distiller 11.0 (Windows) 1_21593MC2_RelatorioFinal Intervenção Arqueológica Monte da Cegonha 2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Rui Pinheiro Sandrine Fernandes Assistentes de arqueólogo Cláudia Nobre José Grilo Raul Costa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4538MVP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2233911+01'00' PScript5.dll Version 5.2.2 D:20160512234318+01'00' Acrobat Distiller 11.0 (Windows) 1_34538MVP_RelatorioFinal Intervenção Arqueológica Monte da Vinha das Poças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487MC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2161200+01'00' PScript5.dll Version 5.2.2 D:20160512161931+01'00' Acrobat Distiller 11.0 (Windows) 1_3487MC_RelatorioFinal Intervenção Arqueológica Monte da Cegonha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5331HA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82641+01'00' PScript5.dll Version 5.2.2 D:20160511182806+01'00' Acrobat Distiller 11.0 (Windows) 1_35331HA3_RelatorioFinal Copyright © arqueologia e património Beja 2016 Intervenção Arqueológica Herdade dos Almeidas 3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35357HC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2165321+01'00' PScript5.dll Version 5.2.2 D:20160512220646+01'00' Acrobat Distiller 11.0 (Windows) 1_35357HC_RelatorioFinal Copyright © arqueologia e património Beja 2016 Intervenção Arqueológica Horta de Cima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5410CD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2215818+01'00' PScript5.dll Version 5.2.2 D:20160512220845+01'00' Acrobat Distiller 11.0 (Windows) 1_35410CD_RelatorioFinal Copyright © arqueologia e património Beja 2016 Intervenção Arqueológica Caldeireiro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35690MTA_RelatorioFinal_RU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9.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3191031+01'00' PScript5.dll Version 5.2.2 D:20160513194754+01'00' Acrobat Distiller 11.0 (Windows) 1_35690MTA_RelatorioFinal Intervenção Arqueológica Monte do Álamo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Rui Pinheiro Sandrine Fernandes Assistentes de arqueólogo Cláudia Nobre José Grilo Raul Costa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5715MA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1.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3164111+01'00' PScript5.dll Version 5.2.2 D:20160513183211+01'00' Acrobat Distiller 11.0 (Windows) 1_35715MA_RelatorioFinal Intervenção Arqueológica Monte dos Arcos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6099RM6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203457+01'00' PScript5.dll Version 5.2.2 D:20160512161530+01'00' Acrobat Distiller 11.0 (Windows) 1_36099RM6_RelatorioFinal Intervenção Arqueológica Romeirã 6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36100MS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2151837+01'00' PScript5.dll Version 5.2.2 D:20160512161450+01'00' Acrobat Distiller 11.0 (Windows) 1_36100MS3_RelatorioFinal Intervenção Arqueológica Monte do Sertão 3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12 de maio de 2016 relatório final página 3</text:p>
          </table:table-cell>
          <table:table-cell table:number-columns-repeated="1015"/>
        </table:table-row>
        <table:table-row table:style-name="ro1">
          <table:table-cell office:value-type="string">
            <text:p>279_36101LG4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510153537+01'00' Sérgio Alexandre Gomes Writer LibreOffice 5.1 D:20160525161617+01'00' RELATÓRIO FINAL Minimização de impactes sobre o património cultural decorrentes da execução do Circuito Hidráulico de São Matias – Fase Prévia à Obra Intervenção Arqueológica Lagarinhos 4 Copyright © arqueologia e património Beja 2016 CHSM14 LG4 Intervenção Arqueológica Lagarinhos 4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36102MCR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55743+01'00' PScript5.dll Version 5.2.2 D:20160511160255+01'00' Acrobat Distiller 11.0 (Windows) 1_36102MCR_RelatorioFinal_3 Copyright © arqueologia e património Beja 2016 Intervenção Arqueológica Monte do Caçareiro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6038QF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81839+01'00' PScript5.dll Version 5.2.2 D:20160511181935+01'00' Acrobat Distiller 11.0 (Windows) 1_6038QF_RelatorioFinal Intervenção Arqueológica Quinta das Faias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ídia Baptista Telmo Gomes Assistentes de arqueólogo Líliana Luís Nelson Vale Trabalho de Gabinete Relatório Lídia Baptista Desenho gráfico Rodry Mendonça Data 3 de maio de 2016 relatório final página 3</text:p>
          </table:table-cell>
          <table:table-cell table:number-columns-repeated="1015"/>
        </table:table-row>
        <table:table-row table:style-name="ro1">
          <table:table-cell office:value-type="string">
            <text:p>279_CHSM14_PROSPECO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9. Pistas usadas: relatório, relatorio, projeto, projecto, prospeção.</text:p>
          </table:table-cell>
          <table:table-cell office:value-type="string">
            <text:p>relatório, relatorio, projeto, projecto, prospeção</text:p>
          </table:table-cell>
          <table:table-cell office:value-type="string">
            <text:p>Assinatura PDF</text:p>
          </table:table-cell>
          <table:table-cell office:value-type="string">
            <text:p>lidia D:20140801131739+01'00' PScript5.dll Version 5.2.2 D:20140801131949+01'00' Acrobat Distiller 11.0 (Windows) 279 CHSM14 REL PREL PROSPEÇÕES 23 07 2014 Minimização de impactes sobre o património cultural decorrentes da execução do Circuito Hidráulico de S. Matias – Fase Prévia à Obra FICHA TÉCNICA Ricardo Teixeira &amp; Vítor Fonseca, Arqueologia Lda. PROJECTO 279 Coordenação geral Ricardo Teixeira, Arqueólogo, mestre em arqueologia Vítor Fonseca, arqueólogo Coordenação de projeto Lídia Baptista, arqueóloga, mestre em arqueologia Trabalho de Campo Direção Lurdes Oliveira, arqueóloga, mestre em arqueologia Arqueólogos Rui Pinheiro, arqueólogo Sérgio Gomes, arqueólogo, doutorado em arqueologia Assistentes de arqueólogo José Grilo Rodry Mendonça Liliana Luís André Saraiva Trabalho de Gabinete Relatório Lurdes Oliveira Lídia Baptista Desenho gráfico Rodry Mendonça Apoio técnico e revisão de texto Lurdes Oliveira Lídia Baptista Data 25 de julho de 2014 relatório preliminar dos trabalhos de...</text:p>
          </table:table-cell>
          <table:table-cell table:number-columns-repeated="1015"/>
        </table:table-row>
        <table:table-row table:style-name="ro1">
          <table:table-cell office:value-type="string">
            <text:p>281_CeR_CONTUMI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6.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Writer OpenOffice 4.1.2 D:20160215185141Z' RELATÓRIO FINAL Conservação e Restauro dos Painéis Azulejares de Eduardo Nery Linha do Minho – Estação de Contumill Porto 2014 Copyright © arqueologia e património Matosinhos 2016 Conservação e Restauro dos Painéis Azulejares de Eduardo Nery - Linha do Minho – Estação de Contumil, Porto FICHA TÉCNICA Ricardo Teixeira &amp; Vítor Fonseca, Arqueologia Lda. PROJECTO 281 Coordenação geral Ricardo Teixeira, arqueólogo, mestre em arqueologia Vítor Fonseca, arqueólogo Coordenação de projeto Anabela Hipólito, mestre em conservação e restauro Trabalho de Campo Direção Anabela Hipólito Execução dos trabalhos Anabela Hipólito Paula Rosa Fernandes, mestre em conservação e restauro Jorge Fonseca, arqueólogo Pedro Pinto, operário Fotografia Anabela Hipólito Paula Rosa Fernandes Pedro Maia, técnico superior de gestão do património Trabalho de Gabinete Relatório Anabela Hipólito Paula Rosa Fernandes Revisão de texto Teresa Silva, arqueóloga, pós-graduada em museo...</text:p>
          </table:table-cell>
          <table:table-cell table:number-columns-repeated="1015"/>
        </table:table-row>
        <table:table-row table:style-name="ro1">
          <table:table-cell office:value-type="string">
            <text:p>282_IA_SBV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cto, intervenção arqueológica, intervencao arqueologica, acompanhamento arqueológico, acompanhamento arqueologico.</text:p>
          </table:table-cell>
          <table:table-cell office:value-type="string">
            <text:p>relatório, relatorio, relatório final, relatorio final, projecto, intervenção arqueológica, intervencao arqueologica, acompanhamento arqueológico, acompanhamento arqueologico</text:p>
          </table:table-cell>
          <table:table-cell office:value-type="string">
            <text:p>Assinatura PDF</text:p>
          </table:table-cell>
          <table:table-cell office:value-type="string">
            <text:p>D:20150130121847Z ritateixeira PScript5.dll Version 5.2.2 Acrobat Distiller 8.0.0 (Windows) D:20150202114053Z 282 Rel fin_30_01_2014 Copyright © arqueologia e património Matosinhos 2015 Intervenção Arqueológica Rua S. Bento da Vitória nº 6-8 – SBV 6. 13 FICHA TÉCNICA Ricardo Teixeira &amp; Vítor Fonseca, Arqueologia Lda. PROJECTO 282 Coordenação geral Ricardo Teixeira, arqueólogo, mestre em arqueologia Vítor Fonseca, arqueólogo Trabalho de Campo Acompanhamento arqueológico LiLiana Barbosa Graça Pereira Jorge Fonseca Teresa Silva Registo de Edificado Teresa Silva, arqueóloga, pós-graduada em museologia Trabalho de Gabinete Pesquisa Documental Teresa Silva Relatório LiLiana Barbosa Graça Pereira Jorge Fonseca Teresa Silva (edificado) Desenho gráfico Rui Oliveira Tratamento e fotografia de espólio Teresa Gonçalves, assistente de arqueólogo Revisão de texto Pedro Maia, técnico superior de gestão do património Data Fevereiro de 2015 relatório final página 3 de 25</text:p>
          </table:table-cell>
          <table:table-cell table:number-columns-repeated="1015"/>
        </table:table-row>
        <table:table-row table:style-name="ro1">
          <table:table-cell office:value-type="string">
            <text:p>283_22102MD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1.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61356+01'00' PScript5.dll Version 5.2.2 D:20160511161532+01'00' Acrobat Distiller 11.0 (Windows) 1_22102MD_RelatorioFinal Copyright © arqueologia e património Beja 2016 Intervenção Arqueológica Maria Dona FICHA TÉCNICA Ricardo Teixeira &amp; Vítor Fonseca, Arqueologia Lda. PROJECTO 283 Coordenação geral Ricardo Teixeira, Arqueólogo, mestre em arqueologia Vítor Fonseca, arqueólogo Coordenação de projeto Lídia Baptista, arqueóloga, mestre em arqueologia Trabalho de Campo Direção Lídia Baptista Telmo Gomes Assistentes de arqueólogo Nelson Vale José Grilo Trabalho de Gabinete Relatório Lídia Baptista Desenho gráfico Rodry Mendonça Desenho gráfico Rodry Mendonça Apoio técnico e revisão de texto Lídia Baptista Data 26 de abril de 2016 relatório final página 3</text:p>
          </table:table-cell>
          <table:table-cell table:number-columns-repeated="1015"/>
        </table:table-row>
        <table:table-row table:style-name="ro1">
          <table:table-cell office:value-type="string">
            <text:p>283_22121TT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1.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630133918+01'00' PScript5.dll Version 5.2.2 D:20160630144320+01'00' Acrobat Distiller 11.0 (Windows) 1_22121TT3_RelatorioFinal Copyright © arqueologia e património Beja 2016 Intervenção Arqueológica Tapada de Trancoso 3 FICHA TÉCNICA Ricardo Teixeira &amp; Vítor Fonseca, Arqueologia Lda. PROJECTO 283 Coordenação geral Ricardo Teixeira, Arqueólogo, mestre em arqueologia Vítor Fonseca, arqueólogo Coordenação de projeto Lídia Baptista, arqueóloga, mestre em arqueologia Trabalho de Campo Direção Lídia Baptista Telmo Gomes Assistentes de arqueólogo Nelson Vale José Grilo Trabalho de Gabinete Relatório Lídia Baptista Desenho gráfico Rodry Mendonça Desenho gráfico Rodry Mendonça Apoio técnico e revisão de texto Lídia Baptista Data 20 de junho de 2016 relatório final página 3</text:p>
          </table:table-cell>
          <table:table-cell table:number-columns-repeated="1015"/>
        </table:table-row>
        <table:table-row table:style-name="ro1">
          <table:table-cell office:value-type="string">
            <text:p>283_33092MP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User D:20160511162243+01'00' PScript5.dll Version 5.2.2 D:20160511162356+01'00' Acrobat Distiller 11.0 (Windows) 1_33092MP_RelatorioFinal Copyright © arqueologia e património Beja 2016 Intervenção Arqueológica Monte das Pereiras FICHA TÉCNICA Ricardo Teixeira &amp; Vítor Fonseca, Arqueologia Lda. PROJECTO 283 Coordenação geral Ricardo Teixeira, Arqueólogo, mestre em arqueologia Vítor Fonseca, arqueólogo Coordenação de projeto Lídia Baptista, arqueóloga, mestre em arqueologia Trabalho de Campo Direção Lídia Baptista Telmo Gomes Assistentes de arqueólogo Nelson Vale José Grilo Trabalho de Gabinete Relatório Lídia Baptista Desenho gráfico Rodry Mendonça Desenho gráfico Rodry Mendonça Apoio técnico e revisão de texto Lídia Baptista Data 27 de abril de 2016 relatório final página 3</text:p>
          </table:table-cell>
          <table:table-cell table:number-columns-repeated="1015"/>
        </table:table-row>
        <table:table-row table:style-name="ro1">
          <table:table-cell office:value-type="string">
            <text:p>283_33092PMP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projecto, memória descritiva, memoria descritiva.</text:p>
          </table:table-cell>
          <table:table-cell office:value-type="string">
            <text:p>relatório, relatorio, relatório final, relatorio final, projeto, projecto, memória descritiva, memoria descritiva</text:p>
          </table:table-cell>
          <table:table-cell office:value-type="string">
            <text:p>Assinatura PDF</text:p>
          </table:table-cell>
          <table:table-cell office:value-type="string">
            <text:p>User D:20160630164611+01'00' PScript5.dll Version 5.2.2 D:20160630164749+01'00' Acrobat Distiller 11.0 (Windows) 1_33092MP_RelatorioFinal Copyright © arqueologia e património Beja 2016 Memória descritiva, levantamento topográfico e fotográfico Poço do Monte das Pereiras FICHA TÉCNICA Ricardo Teixeira &amp; Vítor Fonseca, Arqueologia Lda. PROJECTO 283 Coordenação geral Ricardo Teixeira, Arqueólogo, mestre em arqueologia Vítor Fonseca, arqueólogo Coordenação de projeto Lídia Baptista, arqueóloga, mestre em arqueologia Trabalho de Campo Direção Lídia Baptista Telmo Gomes Assistentes de arqueólogo Nelson Vale Trabalho de Gabinete Relatório Lídia Baptista Desenho gráfico Rodry Mendonça Apoio técnico e revisão de texto Lídia Baptista Data 30 de junho de 2016 relatório final página 3</text:p>
          </table:table-cell>
          <table:table-cell table:number-columns-repeated="1015"/>
        </table:table-row>
        <table:table-row table:style-name="ro1">
          <table:table-cell office:value-type="string">
            <text:p>284_IA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60314114524Z Writer OpenOffice 4.1.2 D:20160314114915Z RELATÓRIO FINAL Intervenção Arqueológica Rua São Bento da Vitória, nº 80 Porto 2016 Copyright © arqueologia e património Matosinhos 2016 SBV80.16 Intervenção Arqueológica Rua São Bento da Vitória nº 80 FICHA TÉCNICA Ricardo Teixeira &amp; Vítor Fonseca, Arqueologia Lda. PROJECTO 284 Coordenação geral Ricardo Teixeira, arqueólogo, mestre em arqueologia Vítor Fonseca, arqueólogo Trabalho de Campo Direção Graça Pereira, arqueóloga Trabalho de Gabinete Relatório Graça Pereira Desenho gráfico Rui Oliveira Apoio técnico e revisão de texto Pedro Maia, Técnico Superior de Gestão do Património Data 15 de março de 2016 relatório final página 3 de 21</text:p>
          </table:table-cell>
          <table:table-cell table:number-columns-repeated="1015"/>
        </table:table-row>
        <table:table-row table:style-name="ro1">
          <table:table-cell office:value-type="string">
            <text:p>286 AHBS QM201_ REL ANTRO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69.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41001160405+01'00' teresasilva PScript5.dll Version 5.2.2 Acrobat Distiller 8.1.0 (Windows) D:20141002120903+01'00' AHBS QM201_ REL ANTROP Copyright © arqueologia e património Matosinhos 2014 Trabalhos de antropologia no âmbito da intervenção arqueológica na Quinta do Medal FICHA TÉCNICA Ricardo Teixeira &amp; Vítor Fonseca, Arqueologia Lda. PROJECTO 286 Trabalho de Campo Direção Sérgio Pereira, arqueólogo (ACE) Susana Carvalho,arqueóloga (ACE) Direção e execução dos trabalhos antropológicos Zélia Rodrigues, antropóloga Trabalho de Gabinete Relatório Zélia Rodrigues Revisão de texto Pedro Maia, técnico superior de gestão do património Data 12 de maio de 2014 relatório final página 3 de 122</text:p>
          </table:table-cell>
          <table:table-cell table:number-columns-repeated="1015"/>
        </table:table-row>
        <table:table-row table:style-name="ro1">
          <table:table-cell office:value-type="string">
            <text:p>288_IA_Canicad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office:value-type="string">
            <text:p>D:20141210121142Z Filipe Gouveia Writer LibreOffice 4.3 D:20141210122046Z RELATÓRIO FINAL Acompanhamento arqueológico da construção do descarregador de cheias complementar da barragem da Caniçada Vieira do Minho 2014 Copyright © arqueologia e património Matosinhos 2014 AP.288 Acompanhamento Arqueológico da construção do descarregador de cheias complementar da barragem da Caniçada FICHA TÉCNICA Ricardo Teixeira &amp; Vítor Fonseca, Arqueologia Lda. PROJECTO AP288 Coordenação geral Ricardo Teixeira, arqueólogo, mestre em arqueologia Vítor Fonseca, arqueólogo Coordenação de projeto Jorge Fonseca, arqueólogo Trabalho de Campo Direção Filipe Gouveia, arqueólogo Trabalho de Gabinete Relatório Filipe Gouveia Apoio técnico e revisão de texto Pedro Maia, técnico superior de gestão do património Data 03 de dezembro de 2014 relatório final página 3 de 45</text:p>
          </table:table-cell>
          <table:table-cell table:number-columns-repeated="1015"/>
        </table:table-row>
        <table:table-row table:style-name="ro1">
          <table:table-cell office:value-type="string">
            <text:p>290_IA_PRT_PGT14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7.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51211154608Z ritateixeira PScript5.dll Version 5.2.2 Acrobat Distiller 8.0.0 (Windows) D:20151211164817Z 290_Rel_Fin_2015_12_11 Copyright © arqueologia e património Matosinhos 2015 Intervenção Arqueológica Museus da UP – Átrio e Núcleo Acessos FICHA TÉCNICA Ricardo Teixeira &amp; Vítor Fonseca, Arqueologia Lda. PROJECTO 290 Coordenação geral Ricardo Teixeira, Arqueólogo, mestre em arqueologia Vítor Fonseca, arqueólogo Coordenação de projeto Jorge Fonseca, arqueólogo Trabalho de Campo Direção Graça Pereira, arqueóloga Arqueólogos Helena Marçal Assistentes de arqueólogo Anabela Rodrigues Ricardo Mota Operários de arqueologia Pedro Pinto Trabalho de Gabinete Relatório Graça Pereira Pesquisa bibliográfica e enquadramento históricos Pedro Maia, técnico superior de gestão do património Desenho gráfico Rui Oliveira Tratamento de espólio Anabela Rodrigues, assistente de arqueólogo Teresa Gonçalves, assistente de arqueólogo Conservação e restauro Anabela Hipólito, técnica superior de conservaç...</text:p>
          </table:table-cell>
          <table:table-cell table:number-columns-repeated="1015"/>
        </table:table-row>
        <table:table-row table:style-name="ro1">
          <table:table-cell office:value-type="string">
            <text:p>292_RO156_Rodo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7.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GPL Ghostscript 9.14 D:20160816121202+01'00' D:20160816121202+01'00' Igespar PDF24 Creator Bibliografia RELATÓRIO FINAL Aproveitamento Hidroelétrico Ribeiradio-Ermida Intervenção Arqueológica Rôdo (Ocorrência Patrimonial N.º 156) Couto de Esteves, Sever do Vouga 2014 Copyright © arqueologia e património Matosinhos 2016 RO.156 Aproveitamento Hidroelétrico Ribeiradio-Ermida Intervenção Arqueológica Rôdo (Ocorrência Patrimonial N.º 156) FICHA TÉCNICA Ricardo Teixeira &amp; Vítor Fonseca, Arqueologia Lda. PROJECTO 292 Coordenação geral Vítor Fonseca Consultores científicos Alberto Gomes (Faculdade de Letras da Universidade do Porto) Sérgio Monteiro-Rodrigues (Faculdade de Letras da Universidade do Porto) Trabalho de Campo Direção Alicia Ameijenda Jorge Fonseca João Muralha Sérgio Gomes Arqueólogos Ana Branco Bárbara Costa Carmen Manzano Esther Escudero Daniel Leite Hélder Teixeira João Fernandes João Silva Lurdes Oliveira Marta Correia Pedro Pais Rita Teixeira Rui Santo Sara Fonseca Tiago Gil...</text:p>
          </table:table-cell>
          <table:table-cell table:number-columns-repeated="1015"/>
        </table:table-row>
        <table:table-row table:style-name="ro1">
          <table:table-cell office:value-type="string">
            <text:p>293_IA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5. Pistas usadas: relatório, relatorio, projecto, intervenção arqueológica, intervencao arqueologica.</text:p>
          </table:table-cell>
          <table:table-cell office:value-type="string">
            <text:p>relatório, relatorio, projecto, intervenção arqueológica, intervencao arqueologica</text:p>
          </table:table-cell>
          <table:table-cell office:value-type="string">
            <text:p>Assinatura PDF</text:p>
          </table:table-cell>
          <table:table-cell office:value-type="string">
            <text:p>D:20140811112602+01'00' joanaborges PScript5.dll Version 5.2.2 Acrobat Distiller 8.1.0 (Windows) D:20140811113240+01'00' 293 REL 2014 08 04 Copyright © arqueologia e património Matosinhos 2014 Intervenção Arqueológica na Rua da Vitória nº 225 FICHA TÉCNICA Ricardo Teixeira &amp; Vítor Fonseca, Arqueologia Lda. PROJECTO 293 Coordenação geral Ricardo Teixeira, arqueólogo, mestre em arqueologia Vítor Fonseca, arqueólogo Trabalho de Campo Direção Liliana Barbosa, arqueóloga Arqueólogos João Silva Operários de arqueologia Pedro Pinto Trabalho de Gabinete Relatório Liliana Barbosa Desenho gráfico Rui Oliveira, desenhador José Domingues, desenhador Tratamento de espólio Teresa Gonçalves, assistente de arqueólogo Revisão de texto Pedro Maia, técnico superior de gestão do património Data 05 de Agosto de 2014 relatório preliminar página 3 de 23</text:p>
          </table:table-cell>
          <table:table-cell table:number-columns-repeated="1015"/>
        </table:table-row>
        <table:table-row table:style-name="ro1">
          <table:table-cell office:value-type="string">
            <text:p>293_IA_VIT225_14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6. Pistas usadas: relatório, relatorio, relatório final, relatorio final, projeto, intervenção arqueológica, intervencao arqueologica, acompanhamento arqueológico, acompanhamento arqueologico, sondagens.</text:p>
          </table:table-cell>
          <table:table-cell office:value-type="string">
            <text:p>relatório, relatorio, relatório final, relatorio final, projeto, intervenção arqueológica, intervencao arqueologica, acompanhamento arqueológico, acompanhamento arqueologico, sondagens</text:p>
          </table:table-cell>
          <table:table-cell office:value-type="string">
            <text:p>Assinatura PDF</text:p>
          </table:table-cell>
          <table:table-cell office:value-type="string">
            <text:p>GPL Ghostscript 9.14 D:20171215160926Z00'00' D:20171215160926Z00'00' Igespar PDF24 Creator FichaSitio RELATÓRIO FINAL Intervenção Arqueológica Rua da Vitória nº 225 Porto 2014 Copyright © arqueologia e património Matosinhos 2017 VIT 225.14/15 Intervenção Arqueológica Rua da Vitória nº 225 FICHA TÉCNICA Ricardo Teixeira &amp; Vítor Fonseca, Arqueologia Lda. PROJETO 293 Coordenação geral Ricardo Teixeira, arqueólogo, mestre em arqueologia Vítor Fonseca, arqueólogo Coordenação projeto Liliana Barbosa, arqueóloga Trabalho de Campo Sondagens arqueológicas Arqueólogos Liliana Barbosa João Silva Acompanhamento arqueológico Rita Teixeira Operário de arqueologia Pedro Pinto Trabalho de Gabinete Relatório Liliana Barbosa (sondagens) Rita Teixeira (acompanhamento) Desenho gráfico Rui Oliveira, desenhador José Domingues, desenhador Tratamento de espólio Teresa Gonçalves, assistente de arqueólogo Revisão de texto Liliana Barbosa Data 12 de Dezembro de 2017 Relatório Final página 3 de 35</text:p>
          </table:table-cell>
          <table:table-cell table:number-columns-repeated="1015"/>
        </table:table-row>
        <table:table-row table:style-name="ro1">
          <table:table-cell office:value-type="string">
            <text:p>294_CR_REL_MAT_GOIMI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Writer LibreOffice 4.3 D:20141205170119Z' RELATÓRIO FINAL Reabilitação de Ponte Medieval Ponte de D. Goimiil Matosinhos 2014 Copyright © arqueologia e património Matosinhos 2014 Reabilitação da Ponte Medieval de D.Goimil, Matosinhos FICHA TÉCNICA Ricardo Teixeira &amp; Vítor Fonseca, Arqueologia Lda. PROJECTO 294 Coordenação geral Ricardo Teixeira, arqueólogo, mestre em arqueologia Vítor Fonseca, arqueólogo Coordenação de projeto Anabela Hipólito, conservadora, mestre em conservação e restauro Trabalho de Campo Direção Anabela Hipólito Assistente de conservação e restauro Paula Fernandes, técnica superior de conservação e restauro Fotografia de campo Anabela Hipólito Paula Fernandes Rui Oliveira, designer João Silva, arqueólogo Topografia Luís Pinto Trabalho de Gabinete Relatório Anabela Hipólito Desenho gráfico Rui Oliveira Apoio técnico Pedro Maia, técnico superior de gestão do património Apoio técnico e revisão de texto Teresa Silva, arqueóloga, pós-graduada em museologia Data 05 de dez...</text:p>
          </table:table-cell>
          <table:table-cell table:number-columns-repeated="1015"/>
        </table:table-row>
        <table:table-row table:style-name="ro1">
          <table:table-cell office:value-type="string">
            <text:p>295_IA_REL_CVL_1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7.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50622100252+01'00' LilianaBarbosa PScript5.dll Version 5.2.2 Acrobat Distiller 8.0.0 (Windows) D:20150622121501+01'00' 295 REL_2015_06_22b Copyright © arqueologia e património Matosinhos 2015 Intervenção Arqueológica na Rua do Covêlo FICHA TÉCNICA Ricardo Teixeira &amp; Vítor Fonseca, Arqueologia Lda. PROJECTO 295 Coordenação geral Ricardo Teixeira, arqueólogo, mestre em Arqueologia Vítor Fonseca, arqueólogo Coordenação do projeto Liliana Barbosa, arqueóloga Trabalho de Campo Direção Liliana Barbosa, arqueóloga Arqueólogo assistente João Silva Técnico de arqueologia André Saraiva Trabalho de Gabinete Relatório Liliana Barbosa Desenho gráfico José Domingues, desenhador Data 22 de Junho de 2015 relatório final página 3 de 21</text:p>
          </table:table-cell>
          <table:table-cell table:number-columns-repeated="1015"/>
        </table:table-row>
        <table:table-row table:style-name="ro1">
          <table:table-cell office:value-type="string">
            <text:p>296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299_IA_VAU_21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03.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office:value-type="string">
            <text:p>Sérgio Gomes D:20150824175726+01'00' Adobe Acrobat Pro 11.0.1 D:20150825161427+01'00' Adobe Acrobat Pro 11.0.1 Aproveitamento Hidroelétrico de Ribeiradio-Ermida Intervenção Vau (Ocorrência Patrimonial N.º 214) FICHA TÉCNICA Ricardo Teixeira &amp; Vítor Fonseca, Arqueologia Lda. PROJETO AP 299 Coordenação geral Ricardo Teixeira, Arqueólogo, mestre em arqueologia Vítor Fonseca, arqueólogo Direção Alicia Ameijenda Carmen Manzano Jorge Fonseca Sérgio Gomes Consultores Científicos Alberto Gomes Sérgio Monteiro-Rodrigues Equipa de campo Arqueólogos Ana Branco Bárbara Costa Esther Escudero Daniel Leite Helder Teixeira João Fernandes Lurdes Oliveira Marta Correia Paulo Lima Rui Oliveira Rui Santo Sara Fonseca Tapício Nóbrega Tiago Pereira Técnicos de Arqueologia André Saraiva Bebiana Mota Ricardo Mota Solange Ferreira Operários de Arqueologia Antero Espenheirinha António Monteiro Cristina Fernandes José Carlos Martins Rui Duarte Pinto Topografia Cláudio Pimenta Rui Oliveira Tratamento e Estudo de...</text:p>
          </table:table-cell>
          <table:table-cell table:number-columns-repeated="1015"/>
        </table:table-row>
        <table:table-row table:style-name="ro1">
          <table:table-cell office:value-type="string">
            <text:p>300_CeR_Espigueir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7.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Writer D:20141114162914Z' D:20141117113535Z LibreOffice 4.2 RELATÓRIO FINAL Desmonte e Montagem de Espigueiro IBERDROLA - Generación Hidraúlica – Projeto Tâmega Ribeira de Pena 2014 Copyright © arqueologia e património Matosinhos 2014 Desmonte e Montagem de Espigueiro IBERDROLA Generación Hidráulica – Projeto Tâmega Ricardo Teixeira &amp; Vítor Fonseca, Arqueologia Lda. PROJECTO 300 Coordenação geral Ricardo Teixeira, Arqueólogo, mestre em arqueologia Vítor Fonseca, Arqueólogo Coordenação de projeto Anabela Hipólito, Conservadora- Restauradora, mestre em conservação e restauro Trabalho de Campo Direção AeP (Empreiteiro geral) Anabela Hipólito Colaboradores AeP Paula Fernandes, Conservadora-restauradora Pedro Maia, Técnico superior de gestão do património Rui Oliveira, desenhador Direção Empripar (Subempreiteiro) Francisco Cabral, Engenheiro Colaboradores Empripar Humberto Sousa, Encarregado Geral Artur Antunes Colaboradores Carpintaria José Parente, Carpinteiro Gaspar Cruz Miguel Amaro Tra...</text:p>
          </table:table-cell>
          <table:table-cell table:number-columns-repeated="1015"/>
        </table:table-row>
        <table:table-row table:style-name="ro1">
          <table:table-cell office:value-type="string">
            <text:p>301_PAS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 Pistas usadas: relatório, relatorio, relatório final, relatorio final, projeto, projecto, intervenção arqueológica, intervencao arqueologica, acompanhamento arqueológico, acompanhamento arqueologico, plano de trabalhos.</text:p>
          </table:table-cell>
          <table:table-cell office:value-type="string">
            <text:p>relatório, relatorio, relatório final, relatorio final, projeto, projecto, intervenção arqueológica, intervencao arqueologica, acompanhamento arqueológico, acompanhamento arqueologico, plano de trabalhos</text:p>
          </table:table-cell>
          <table:table-cell office:value-type="string">
            <text:p>Assinatura PDF</text:p>
          </table:table-cell>
          <table:table-cell office:value-type="string">
            <text:p>GPL Ghostscript 9.14 D:20250718124953+01'00' D:20250718124953+01'00' Igespar PDF24 Creator FichaSitio RELATÓRIO FINAL Intervenção Arqueológica Recuperação do Edifício do Largo Abel Salazar Instalações da Reitoria e ICBAS Porto 2022 Copyright © arqueologia e património Matosinhos 2025 PAS.22 Intervenção Arqueológica Recuperação do Edifício do Largo Abel Salazar Instalações da Reitoria e ICBAS FICHA TÉCNICA Ricardo Teixeira &amp; Vítor Fonseca, Arqueologia Lda. PROJECTO 301 Coordenação geral Ricardo Teixeira, Arqueólogo, mestre em arqueologia Vítor Fonseca, arqueólogo Coordenação de projeto Jorge Fonseca, arqueólogo Trabalho de Campo Direção Graça Pereira, arqueóloga Helena Marçal, arqueóloga Assistentes de arqueólogo Carlos Martins Ricardo Mota Trabalho de Gabinete Relatório Graça Pereira Helena Marçal Desenho gráfico Rui Oliveira Apoio técnico e revisão de texto Jorge Fonseca Pedro Maia, técnico superior de gestão do patimónio Data 18 de Julho de 2025 relatório final página 3 de 27 Interve...</text:p>
          </table:table-cell>
          <table:table-cell table:number-columns-repeated="1015"/>
        </table:table-row>
        <table:table-row table:style-name="ro1">
          <table:table-cell office:value-type="string">
            <text:p>302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303_MUS_REL_2015_11_0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cto, intervenção arqueológica, intervencao arqueologica, escavação, escavacao.</text:p>
          </table:table-cell>
          <table:table-cell office:value-type="string">
            <text:p>relatório, relatorio, relatório final, relatorio final, projecto, intervenção arqueológica, intervencao arqueologica, escavação, escavacao</text:p>
          </table:table-cell>
          <table:table-cell office:value-type="string">
            <text:p>Assinatura PDF</text:p>
          </table:table-cell>
          <table:table-cell office:value-type="string">
            <text:p>Writer OpenOffice 4.1.1 D:20151104114516Z' RELATÓRIO Musealização 2000 ANOS DE HISTÓRIA INTERVENÇÃO ARQUEOLÓGICA NO ARQUIVO MUNICIPAL DE CHAVES Copyright © arqueologia e património Matosinhos 2015 I FICHA TÉCNICA Ricardo Teixeira &amp; Vítor Fonseca, Arqueologia Lda. PROJECTO 303 COORDENAÇÃO GERAL Ricardo Teixeira Vítor Fonseca MUSEALIZAÇÃO conceção, coordenação e textos Teresa Silva conservação e restauro Anabela Hipólito (coordenação e execução) Paula Fernandes (execução) Filipa Teixeira (execução) design e ilustração Rui Oliveira música João Paulo Silva estudo de espólio César Guedes Liliana Barbosa Rita Teixeira pesquisa de colagens Anabela Rodrigues Francisco Raimundo fotografia de espólio Pedro Maia apoio à edição de imagem José Domingues desenho de mobiliário Rui Oliveira apoio à conservação e restauro de estruturas André Saraiva relatório final página 3 de 27 I ÍNDICE 1.Plano de exposição..................................................................................................</text:p>
          </table:table-cell>
          <table:table-cell table:number-columns-repeated="1015"/>
        </table:table-row>
        <table:table-row table:style-name="ro1">
          <table:table-cell office:value-type="string">
            <text:p>304_AA_PORTO_201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4 D:20180507140850+01'00' D:20180507140850+01'00' ritateixeira PDF24 Creator 304_REL_2018_05_07 RELATÓRIO FINAL Acompanhamento Arqueológica Rua de São Miguel nº 21 a 23 Porto 2014 Copyright © arqueologia e património Matosinhos 2018 MIG21.14 Intervenção Arqueológica Rua de São Miguel nº 21 a 23 FICHA TÉCNICA Ricardo Teixeira &amp; Vítor Fonseca, Arqueologia Lda. PROJETO 304 Coordenação geral Ricardo Teixeira, arqueólogo, mestre em arqueologia Vítor Fonseca, arqueólogo Trabalho de Campo Direção Teresa Silva, arqueóloga, pós-graduada em museologia Arqueólogos João Silva Assistentes de arqueólogo André Saraiva Trabalho de Gabinete Relatório Teresa Silva Apoio Rita Teixeira Desenho gráfico Rui Oliveira Tratamento de espólio Anabela Rodrigues, assistente de arqueólogo Teresa Gonçalves, assistente de arqueólogo Fotografia de espólio Pedro Maia, técnico superior de gestão do património Apoio técnico e revisão de texto Liliana Barbosa, arqueóloga Data 20 de Abril de 2018 relatór...</text:p>
          </table:table-cell>
          <table:table-cell table:number-columns-repeated="1015"/>
        </table:table-row>
        <table:table-row table:style-name="ro1">
          <table:table-cell office:value-type="string">
            <text:p>305_EC_MATOSINHOS_20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84.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GPL Ghostscript 9.14 D:20180216162656Z00'00' D:20180216162656Z00'00' Luís Mariz PDF24 Creator PARALOID PARALOID PARALOID RELATÓRIO FINAL Estabilização e Conservação de Âncora Matosinhos 2018 Copyright © arqueologia e património Matosinhos 2018 Relatório Final Estabilização e Conservação de Âncora FICHA TÉCNICA Ricardo Teixeira &amp; Vítor Fonseca, Arqueologia Lda. PROJECTO 305 | Relatório Final Coordenação geral Vítor Fonseca, arqueólogo Coordenação de projeto Anabela Hipólito, mestre em conservação e restauro Trabalho de Laboratório e Gabinete Intervenção Anabela Hipólito Paula Fernandes, mestre em conservação e restauro Filipa Teixeira, assistente de conservação e restauro Relatório Paula Fernandes Pedro Maia (revisão e apoio técnico) Desenho gráfico Rui Oliveira, desenhador Fotografia Anabela Hipólito Paula Rosa Fernandes Filipa Teixeira Nuno Pereira Pedro Maia Acondicionamento Paula Rosa Fernandes Filipa Teixeira Matosinhos, 16 de fevereiro de 2018 Relatório Final página 3 de 23</text:p>
          </table:table-cell>
          <table:table-cell table:number-columns-repeated="1015"/>
        </table:table-row>
        <table:table-row table:style-name="ro1">
          <table:table-cell office:value-type="string">
            <text:p>306_C&amp;R_REL_FSAV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office:value-type="string">
            <text:p>D:20150413102349+01'00' Writer LibreOffice 4.3 D:20150415120547+01'00' RELATÓRIO FINAL Acompanhamento arqueológico e especializado na área de conservação e restauro Antiga Fábrica de Cerâmica Sto. António do Vale da Piedade Vila Nova de Gaia 20158 Copyright © arqueologia e património Matosinhos 2015 FSAVP.14 Acompanhamento arqueológico e especializado na área de conservação e restauro na antiga Fábrica de Cerâmica Sto. António do Vale da Piedade FICHA TÉCNICA Ricardo Teixeira &amp; Vítor Fonseca, Arqueologia Lda. PROJECTO 306 Coordenação geral Ricardo Teixeira, Arqueólogo, mestre em arqueologia Vítor Fonseca, arqueólogo Coordenação de projeto Anabela Hipólito, Conservadora-restauradora, mestre Teresa Silva, Arqueóloga, pós-graduada em museologia Trabalho de Campo Registo prévio Rui Oliveira, desenhador Teresa Silva, arqueóloga, pós graduada em museologia Acompanhamento de conservação Anabela Hipólito, mestre em conservação e restauro(direção) Paula Fernandes, mestre em conservação e restau...</text:p>
          </table:table-cell>
          <table:table-cell table:number-columns-repeated="1015"/>
        </table:table-row>
        <table:table-row table:style-name="ro1">
          <table:table-cell office:value-type="string">
            <text:p>310_SJO110_15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9. Pistas usadas: relatório, relatorio, relatório final, relatorio final, projeto, projecto, intervenção arqueológica, intervencao arqueologica, acompanhamento arqueológico, acompanhamento arqueologico, sondagens.</text:p>
          </table:table-cell>
          <table:table-cell office:value-type="string">
            <text:p>relatório, relatorio, relatório final, relatorio final, projeto, projecto, intervenção arqueológica, intervencao arqueologica, acompanhamento arqueológico, acompanhamento arqueologico, sondagens</text:p>
          </table:table-cell>
          <table:table-cell office:value-type="string">
            <text:p>Assinatura PDF</text:p>
          </table:table-cell>
          <table:table-cell office:value-type="string">
            <text:p>D:20160601162407+01'00' Writer OpenOffice 4.1.2 D:20160601164657+01'00' RELATÓRIO FINAL Intervenção Arqueológica Rua de São João, nº 110-112 Porto 2015 Copyright © arqueologia e património Matosinhos 2016 SJO110.15 Intervenção Arqueológica Rua de São João nº110-112 FICHA TÉCNICA Ricardo Teixeira &amp; Vítor Fonseca, Arqueologia Lda. PROJECTO 310 Coordenação geral Ricardo Teixeira, Arqueólogo, mestre em arqueologia Vítor Fonseca, arqueólogo Coordenação de projeto Jorge Fonseca, arqueólogo Trabalho de Campo Registo de edificado Teresa Silva, arqueóloga, pós-graduada em museologia Sondagens arqueológicas Direção Jorge Fonseca Assistentes de arqueólogo Rodry Mendonça Acompanhamento Arqueológico Graça Pereira, arqueóloga Trabalho de Gabinete Pesquisa bibliográfica e documental Graça Pereira Relatório Graça Pereira Jorge Fonseca (sondagens arqueológicas) Desenho gráfico José Luís Domingues, desenhador Rui Oliveira, desenhador Tratamento de espólio Anabela Rodrigues, assistente de arqueólogo Tere...</text:p>
          </table:table-cell>
          <table:table-cell table:number-columns-repeated="1015"/>
        </table:table-row>
        <table:table-row table:style-name="ro1">
          <table:table-cell office:value-type="string">
            <text:p>311_ISC_15_IA_IgrejaSantaCla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23175637Z Writer OpenOffice 4.1.2 D:20160223180149Z RELATÓRIO FINAL Intervenção Arqueológica Conservação do Imóvel e da Envolvente da Igreja de Santa Clara Porto, 2015 Copyright © arqueologia e património Matosinhos 2016 ISC.15 Intervenção Arqueológica Igreja de Santa Clara, Porto FICHA TÉCNICA Ricardo Teixeira &amp; Vítor Fonseca, Arqueologia Lda. PROJECTO 311 Coordenação geral Ricardo Teixeira, arqueólogo, mestre em arqueologia Vítor Fonseca, arqueólogo Coordenação de projeto Jorge Fonseca, arqueólogo Trabalho de Campo Direção Graça Pereira, arqueóloga Arqueólogo João Silva Assistentes de arqueólogo André Saraiva Rodry Mendonça Trabalho de Gabinete Relatório Graça Pereira Desenho gráfico Rui Oliveira Tratamento de espólio Anabela Rodrigues, assistente de arqueólogo Teresa Gonçalves, assistente de arqueólogo Fotografia de espólio Teresa Gonçalves Apoio técnico Bebiana Mota, assistente arqueólogo Apoio técnico e revisão de texto Pedro Maia, técnico superior de gestão do património...</text:p>
          </table:table-cell>
          <table:table-cell table:number-columns-repeated="1015"/>
        </table:table-row>
        <table:table-row table:style-name="ro1">
          <table:table-cell office:value-type="string">
            <text:p>312_BLM81_1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9 D:20170906175026+01'00' D:20170906175026+01'00' Igespar PDF24 Creator FichaSitio RELATÓRIO FINAL Intervenção Arqueológica Rua de Belomonte nº81 Porto, 2015 Copyright © arqueologia e património Matosinhos 2017 Intervenção Arqueológica Rua de Belomonte nº81 FICHA TÉCNICA Ricardo Teixeira &amp; Vítor Fonseca, Arqueologia Lda. PROJETO 312 Coordenação geral Ricardo Teixeira, arqueólogo, mestre em arqueologia Vítor Fonseca, arqueólogo Coordenação de projeto Liliana Barbosa, arqueólogo Trabalho de Campo Direção Liliana Barbosa, arqueóloga João Silva, arqueólogo Assistente de arqueólogo Rodry Mendonça Trabalho de Gabinete Relatório Rita Teixeira, arqueóloga Desenho gráfico Rui Oliveira José Domingues Tratamento de espólio Anabela Rodrigues, assistente de arqueólogo Teresa Gonçalves, assistente de arqueólogo Apoio técnico e revisão de texto Liliana Barbosa, arqueóloga Data 07 de Setembro de 2017 relatório final página 3 de 25</text:p>
          </table:table-cell>
          <table:table-cell table:number-columns-repeated="1015"/>
        </table:table-row>
        <table:table-row table:style-name="ro1">
          <table:table-cell office:value-type="string">
            <text:p>312_BLM81_15_RF2017_09_0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9 D:20170906175026+01'00' D:20170906175026+01'00' Igespar PDF24 Creator FichaSitio RELATÓRIO FINAL Intervenção Arqueológica Rua de Belomonte nº81 Porto, 2015 Copyright © arqueologia e património Matosinhos 2017 Intervenção Arqueológica Rua de Belomonte nº81 FICHA TÉCNICA Ricardo Teixeira &amp; Vítor Fonseca, Arqueologia Lda. PROJETO 312 Coordenação geral Ricardo Teixeira, arqueólogo, mestre em arqueologia Vítor Fonseca, arqueólogo Coordenação de projeto Liliana Barbosa, arqueólogo Trabalho de Campo Direção Liliana Barbosa, arqueóloga João Silva, arqueólogo Assistente de arqueólogo Rodry Mendonça Trabalho de Gabinete Relatório Rita Teixeira, arqueóloga Desenho gráfico Rui Oliveira José Domingues Tratamento de espólio Anabela Rodrigues, assistente de arqueólogo Teresa Gonçalves, assistente de arqueólogo Apoio técnico e revisão de texto Liliana Barbosa, arqueóloga Data 07 de Setembro de 2017 relatório final página 3 de 25</text:p>
          </table:table-cell>
          <table:table-cell table:number-columns-repeated="1015"/>
        </table:table-row>
        <table:table-row table:style-name="ro1">
          <table:table-cell office:value-type="string">
            <text:p>312_IA_BLM81_15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9 D:20170906175026+01'00' D:20170906175026+01'00' Igespar PDF24 Creator FichaSitio RELATÓRIO FINAL Intervenção Arqueológica Rua de Belomonte nº81 Porto, 2015 Copyright © arqueologia e património Matosinhos 2017 Intervenção Arqueológica Rua de Belomonte nº81 FICHA TÉCNICA Ricardo Teixeira &amp; Vítor Fonseca, Arqueologia Lda. PROJETO 312 Coordenação geral Ricardo Teixeira, arqueólogo, mestre em arqueologia Vítor Fonseca, arqueólogo Coordenação de projeto Liliana Barbosa, arqueólogo Trabalho de Campo Direção Liliana Barbosa, arqueóloga João Silva, arqueólogo Assistente de arqueólogo Rodry Mendonça Trabalho de Gabinete Relatório Rita Teixeira, arqueóloga Desenho gráfico Rui Oliveira José Domingues Tratamento de espólio Anabela Rodrigues, assistente de arqueólogo Teresa Gonçalves, assistente de arqueólogo Apoio técnico e revisão de texto Liliana Barbosa, arqueóloga Data 07 de Setembro de 2017 relatório final página 3 de 25</text:p>
          </table:table-cell>
          <table:table-cell table:number-columns-repeated="1015"/>
        </table:table-row>
        <table:table-row table:style-name="ro1">
          <table:table-cell office:value-type="string">
            <text:p>313a_IA_REL_Bispeir_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D:20160111112655Z Writer D:20160111155647Z OpenOffice.org 3.2 RELATÓRIO FINAL Intervenção Arqueológica Aproveitamento Hidroelétrico Ribeiradio-Ermida Bispeira 8 (Ocorrência Patrimonial N.º 246) São João da Serra, Oliveira de Frades, Viseu, 2015 Copyright © arqueologia e património Matosinhos 2015 BISP.246 Aproveitamento Hidroelétrico Ribeiradio-Ermida Bispeira 8 (Ocorrência Patrimonial N.º 246) FICHA TÉCNICA Ricardo Teixeira &amp; Vítor Fonseca, Arqueologia Lda. PROJECTO 313 Coordenação geral Ricardo Teixeira, arqueólogo, mestre em arqueologia Vítor Fonseca, arqueólogo Coordenação de projecto Vítor Fonseca Trabalho de Campo Direção Alicia Ameijenda Carmen Manzano Maria de Lurdes Oliveira Sérgio Gomes Arqueólogos Bárbara Costa João Fernandes João Silva Rui Santo Assistentes de arqueólogo André Saraiva Rodry Mendonça Operários de Arqueologia Antero Espenheirinha Cristina Tavares Topografia Rodry Mendonça Trabalho de Gabinete Relatório Bárbara Costa Carmen Manzano Maria de Lurdes Oliveira Rui...</text:p>
          </table:table-cell>
          <table:table-cell table:number-columns-repeated="1015"/>
        </table:table-row>
        <table:table-row table:style-name="ro1">
          <table:table-cell office:value-type="string">
            <text:p>313b_IA_REL_Fontanhei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9.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51130160031Z Writer D:20151201140740Z OpenOffice 4.1.1 RELATÓRIO FINAL Aproveitamento Hidroeléctrico de Ribeiradio-Ermida Ocorrência Patrimonial N.º 294 –Fontanheira Vale da Cambra, 2015 Copyright © arqueologia e património Matosinhos 2015 FONT.294 Aproveitamento Hidroeléctrico de Ribeiradio-Ermida Ocorrência Patrimonial N.º 294 - Fontanheira FICHA TÉCNICA Ricardo Teixeira &amp; Vítor Fonseca, Arqueologia Lda. PROJECTO 313 Coordenação geral Ricardo Teixeira, Arqueólogo, mestre em arqueologia Vítor Fonseca, arqueólogo Trabalho de Campo Direção Alicia Ameijenda Carmen Manzano Maria de Lurdes Oliveira Sérgio Gomes Topografia e Desenho Rodry Mendonça Trabalho de Gabinete Relatório Alicia Ameijenda Desenho gráfico Rodry Mendonça Tratamento de espólio Anabela Rodrigues, assistente de arqueólogo Teresa Gonçalves, assistente de arqueólogo Conservação e restauro Anabela Hipólito, técnica superior de conservação e restauro Fotografia de espólio Pedro Maia, técnico superior de gestão do patrimón...</text:p>
          </table:table-cell>
          <table:table-cell table:number-columns-repeated="1015"/>
        </table:table-row>
        <table:table-row table:style-name="ro1">
          <table:table-cell office:value-type="string">
            <text:p>313c_REL_Seja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4.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Sérgio Gomes D:20151201130202Z PScript5.dll Version 5.2.2 D:20151204150045Z Acrobat Distiller 11.0 (Windows) 313_REL_FINAL_SEJ8 RELATÓRIO FINAL Aproveitamento Hidroeléctrico de Ribeiradio-Ermida Ocorrência Patrimonial N.º 293 – Sejães 8 Oliveira de Frades, 2015 Copyright © arqueologia e património Matosinhos 2015 SEJ.293 Aproveitamento Hidroeléctrico de Ribeiradio-Ermida Ocorrência Patrimonial N.º 293 – Sejães 8 FICHA TÉCNICA Ricardo Teixeira &amp; Vítor Fonseca, Arqueologia Lda. PROJECTO 313 Coordenação geral Ricardo Teixeira, Arqueólogo, mestre em arqueologia Vítor Fonseca, arqueólogo Trabalho de Campo Direção Alicia Ameijenda Carmen Manzano Maria de Lurdes Oliveira Sérgio Gomes Topografia e Desenho Rodry Mendonça Trabalho de Gabinete Relatório Alicia Ameijenda Desenho gráfico Rodry Mendonça Tratamento de espólio Anabela Rodrigues, assistente de arqueólogo Teresa Gonçalves, assistente de arqueólogo Conservação e restauro Anabela Hipólito, técnica superior de conservação e restauro Fotogr...</text:p>
          </table:table-cell>
          <table:table-cell table:number-columns-repeated="1015"/>
        </table:table-row>
        <table:table-row table:style-name="ro1">
          <table:table-cell office:value-type="string">
            <text:p>314_IA_SDN_15.pd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Sérgio Gomes D:20150430095211+01'00' PScript5.dll Version 5.2.2 D:20150430095744+01'00' Acrobat Distiller 11.0 (Windows) 314_REL_FINAL RELATÓRIO FINAL Intervenção Arqueológica Construção imóvel da Delegação de Vila Real da Ordem dos Engenheiros - Rua de São Dinis ) Vila Real 2015 Copyright © arqueologia e património Matosinhos 2015 SDN.15 Construção imóvel da Delegação de Vila Real da Ordem dos Engenheiros - Rua de São Dinis FICHA TÉCNICA Ricardo Teixeira &amp; Vítor Fonseca, Arqueologia Lda. PROJECTO 314 Coordenação geral Ricardo Teixeira, arqueólogo, mestre em arqueologia Vítor Fonseca, arqueólogo Coordenação de projecto Ricardo Teixeira Trabalho de Campo Direcção Lurdes Oliveira, arqueóloga, mestre em arqueologia Rui Pinheiro, arqueólogo Assistentes de arqueólogo Ricardo Mota Trabalho de Gabinete Relatório Lurdes Oliveira Desenho gráfico José Luis Domingues Tratamento de espólio Anabela Rodrigues, assistente de arqueólogo Teresa Gonçalves, assistente de arqueólogo Conservação e restauro...</text:p>
          </table:table-cell>
          <table:table-cell table:number-columns-repeated="1015"/>
        </table:table-row>
        <table:table-row table:style-name="ro1">
          <table:table-cell office:value-type="string">
            <text:p>315_CHG15_RelFinal_VOL_II_Antrop.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7.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Writer OpenOffice 4.1.2 D:20160229151606Z' RELATÓRIO FINAL Intervenção Arqueológica na Igreja das Chagas Volume II - Relatório Antropológico Lamego 2015 Copyright © arqueologia e património Matosinhos 2016 CHG.15 Intervenção Arqueológica Igreja das Chagas FICHA TÉCNICA Ricardo Teixeira &amp; Vítor Fonseca, Arqueologia Lda. PROJECTO 315 Coordenação geral Ricardo Teixeira, arqueólogo, mestre em arqueologia Vítor Fonseca, arqueólogo Coordenação de projeto Ricardo Teixeira, Trabalho de Campo Direção Lurdes Cunha, arqueóloga Direção e execução dos trabalhos antropológicos Zélia Maria Rodrigues, antropóloga Trabalho de Gabinete Relatório Zélia Maria Rodrigues Desenho gráfico Rui Oliveira José Luis Apoio técnico e revisão de texto Pedro Maia, técnico superior de gestão do património Data Novembro de 2015 relatório final página 3 de 40</text:p>
          </table:table-cell>
          <table:table-cell table:number-columns-repeated="1015"/>
        </table:table-row>
        <table:table-row table:style-name="ro1">
          <table:table-cell office:value-type="string">
            <text:p>315_CHG15_RelFin_VOL_I_Arqu.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9.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office:value-type="string">
            <text:p>D:20160229150927Z Teresa Silva Writer OpenOffice 4.1.2 D:20160229152153Z RELATÓRIO FINAL Intervenção Arqueológica Reabilitação e Restauro da Igreja das Chagas Volume I - Relatório de Arqueologia Lamego 2015 Copyright © arqueologia e património Matosinhos 2016 CHG.15 Intervenção Arqueológica Igreja das Chagas FICHA TÉCNICA Ricardo Teixeira &amp; Vítor Fonseca, Arqueologia Lda. PROJECTO 315 Coordenação geral Ricardo Teixeira, Arqueólogo, mestre em arqueologia Vítor Fonseca, arqueólogo Coordenação de projeto Ricardo Teixeira Trabalho de Campo Direção Lurdes Oliveira, arqueóloga, mestre em arqueologia José Sendas, arqueólogo Assistentes de arqueólogo André Saraiva Bebiana Mota Ricardo Mota Trabalho de Gabinete Relatório Lurdes Oliveira Desenho gráfico José Luís Domingues Tratamento de espólio Anabela Rodrigues, assistente de arqueólogo Teresa Gonçalves, assistente de arqueólogo Fotografia de espólio Pedro Maia, técnico superior de gestão do património Teresa Gonçalves Revisão Teresa Silva, arq...</text:p>
          </table:table-cell>
          <table:table-cell table:number-columns-repeated="1015"/>
        </table:table-row>
        <table:table-row table:style-name="ro1">
          <table:table-cell office:value-type="string">
            <text:p>317_AA_PLC888_15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office:value-type="string">
            <text:p>GPL Ghostscript 9.14 D:20180803161230+01'00' D:20180803161230+01'00' Igespar PDF24 Creator FichaSitio RELATÓRIO FINAL Acompanhamento Arqueológica Rua padre Luís Cabral nº 888-890 Porto 2016 Copyright © arqueologia e património Matosinhos 2018 PLC 888.16 Acompanhamento Arqueológico Rua padre Luís Cabral nº 888-890 FICHA TÉCNICA Ricardo Teixeira &amp; Vítor Fonseca, Arqueologia Lda. PROJETO 317 Coordenação geral Ricardo Teixeira, Arqueólogo, mestre em arqueologia Vítor Fonseca, arqueólogo Coordenação de projeto Jorge Fonseca, arqueólogo Trabalho de Campo Direção Rui Pinheiro, arqueólogo Graça Pereira, arqueóloga Trabalho de Gabinete Relatório Rui Pinheiro Desenho gráfico Rui Oliveira Apoio técnico e revisão de texto Liliana Barbosa, arqueóloga Data 02 de Agosto de 2018 relatório final página 3 de 21</text:p>
          </table:table-cell>
          <table:table-cell table:number-columns-repeated="1015"/>
        </table:table-row>
        <table:table-row table:style-name="ro1">
          <table:table-cell office:value-type="string">
            <text:p>319_RGD_17_Rel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office:value-type="string">
            <text:p>GPL Ghostscript 9.14 D:20180731145647+01'00' D:20180731145647+01'00' Igespar PDF24 Creator FichaSitio RELATÓRIO FINAL Acompanhamento Arqueológico Rua do Regedor, Lugar do Castelo – Lagares Penafiel 2018 Copyright © arqueologia e património Matosinhos 2018 RGD.17 Acompanhamento Arqueológico Rua do Regedor – Lagares, Penafiel FICHA TÉCNICA Ricardo Teixeira &amp; Vítor Fonseca, Arqueologia Lda. PROJETO 319 Coordenação geral Ricardo Teixeira, arqueólogo, mestre em arqueologia Vítor Fonseca, arqueólogo Coordenação de projeto Liliana Barbosa, arqueóloga Trabalho de Campo Direção Liliana Barbosa Arqueólogo Pedro Dâmaso, arqueólogo, mestre em arqueologia Trabalho de Gabinete Relatório Pedro Dâmaso Caracterização sumária do Património Histórico-Arqueológico Liliana Barbosa Desenho gráfico Rui Oliveira Tratamento de espólio Anabela Rodrigues, assistente de arqueólogo Teresa Gonçalves, assistente de arqueólogo Apoio técnico e revisão de texto Liliana Barbosa Data 27 de julho de 2018 relatório final p...</text:p>
          </table:table-cell>
          <table:table-cell table:number-columns-repeated="1015"/>
        </table:table-row>
        <table:table-row table:style-name="ro1">
          <table:table-cell office:value-type="string">
            <text:p>321_IA_ACP15_Rel_Fin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2.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4 D:20181102165149Z00'00' D:20181102165149Z00'00' Igespar PDF24 Creator FichaSitio RELATÓRIO FINAL Intervenção Arqueológica Gaveto Ruas do Almada, Clérigos e Praça da Liberdade Porto 2018 Copyright © arqueologia e património Matosinhos 2018 ACP.15 Intervenção Arqueológica Gaveto Ruas do Almada, Clérigos e Praça da Liberdade FICHA TÉCNICA Ricardo Teixeira &amp; Vítor Fonseca, Arqueologia Lda. PROJETO 321 Coordenação geral Ricardo Teixeira, arqueólogo, mestre em arqueologia Vítor Fonseca, arqueólogo Coordenação de projeto Liliana Barbosa, arqueólogo Trabalho de Campo Direção Liliana Barbosa, arqueóloga Graça Pereira, arqueóloga João Silva, arqueólogo Equipa João Silva, arqueólogo Filipe Gouveia, arqueólogo Rita Teixeira, arqueóloga Graça Pereira, arqueóloga Nélson Vale, assistente de arqueólogo Rodry Mendonça, assistente de arqueólogo André Saraiva, assistente de arqueólogo Trabalho de Gabinete Relatório João Silva, arqueólogo Rita Teixeira, arqueóloga Desenho gráfico José...</text:p>
          </table:table-cell>
          <table:table-cell table:number-columns-repeated="1015"/>
        </table:table-row>
        <table:table-row table:style-name="ro1">
          <table:table-cell office:value-type="string">
            <text:p>324_REL_FIN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4.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office:value-type="string">
            <text:p>GPL Ghostscript 9.27 D:20230421115020+01'00' D:20230421115020+01'00' Igespar PDF24 Creator FichaSitio Copyright © arqueologia e património Matosinhos 2023 Acompanhamento Arqueológico Rua de Sousa Viterbo, n.106-112 FICHA TÉCNICA Ricardo Teixeira &amp; Vítor Fonseca, Arqueologia Lda. PROJETO 324 Coordenação geral Ricardo Teixeira, arqueólogo, mestre em arqueologia Vítor Fonseca, arqueólogo Coordenação de projeto Liliana Barbosa, arqueóloga Trabalho de Campo Direção Liliana Barbosa, arqueóloga Barbara Costa, arqueóloga Helena Marçal, arqueóloga Arqueólogos Helena Marçal, arqueóloga Liliana Barbosa, arqueóloga Trabalho de Gabinete Relatório Helena Marçal Desenho gráfico Rui Oliveira Apoio técnico e revisão de texto Liliana Barbosa, arqueóloga Data Abril de 2023 relatório final página 3 de 32</text:p>
          </table:table-cell>
          <table:table-cell table:number-columns-repeated="1015"/>
        </table:table-row>
        <table:table-row table:style-name="ro1">
          <table:table-cell office:value-type="string">
            <text:p>325_CeR_Camin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projecto, memória descritiva, memoria descritiva, plano de trabalhos.</text:p>
          </table:table-cell>
          <table:table-cell office:value-type="string">
            <text:p>relatório, relatorio, relatório final, relatorio final, projeto, projecto, memória descritiva, memoria descritiva, plano de trabalhos</text:p>
          </table:table-cell>
          <table:table-cell office:value-type="string">
            <text:p>Assinatura PDF</text:p>
          </table:table-cell>
          <table:table-cell office:value-type="string">
            <text:p>Writer OpenOffice 4.1.2 D:20160205142555Z' RELATÓRIO FINAL Prestação de Serviços - Conservação e Restauro dos Painéis Azulejares Linha do Minho – Estação de Caminha Caminha 2016 Copyright © arqueologia e património Matosinhos 2016 Prestação de Serviços - Conservação e Restauro dos Painéis Azulejares Linha do Minho – Estação de Caminha FICHA TÉCNICA Ricardo Teixeira &amp; Vítor Fonseca, Arqueologia Lda. PROJECTO 325 Coordenação geral Ricardo Teixeira, arqueólogo, mestre em arqueologia Vítor Fonseca, arqueólogo Coordenação de projeto Anabela Hipólito Marques Ferreira, mestre em conservação e restauro Trabalho de Campo Direção Anabela Hipólito Marques Ferreira Execução dos trabalhos Anabela Hipólito Marques Ferreira, Paula Rosa Fernandes, mestre em conservação e restauro Carla Matos, mestre em conservação e restauro Filipa Teixeira, técnica assistente de conservação e restauro Lisdália Mota, técnica assistente Pedro Pinto, operário Fotografia Anabela Hipólito Marques Ferreira Paula Rosa Ferna...</text:p>
          </table:table-cell>
          <table:table-cell table:number-columns-repeated="1015"/>
        </table:table-row>
        <table:table-row table:style-name="ro1">
          <table:table-cell office:value-type="string">
            <text:p>327_BLM23_18_RELATORIO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4 D:20240703135420+01'00' D:20240703135420+01'00' Igespar PDF24 Creator FichaSitio RELATÓRIO FINAL INTERVENÇÃO ARQUEOLÓGICA RUA DE BELOMONTE Nº 23-25 PORTO 2019 Copyright © arqueologia e património Matosinhos 2024 BLM23.18 Intervenção Arqueológica Rua de Belomonte 23-25 – BLM23.18 FICHA TÉCNICA Ricardo Teixeira &amp; Vítor Fonseca, Arqueologia Lda. PROJETO 327 Coordenação geral Ricardo Teixeira, arqueólogo, mestre em arqueologia Vítor Fonseca, arqueólogo Coordenação de projeto Jorge Fonseca, arqueólogo Trabalho de Campo Direção Jorge Fonseca Arqueólogo Graça Pereira Assistentes de arqueólogo Bebiana Mota Ricardo Mota Operário de arqueologia Pedro Pinto Trabalho de Gabinete Relatório Jorge Fonseca Desenho gráfico Rui Oliveira, desenhador Revisão de texto Pedro Maia Data 25 de março de 2024 Relatório final página 3 de 25</text:p>
          </table:table-cell>
          <table:table-cell table:number-columns-repeated="1015"/>
        </table:table-row>
        <table:table-row table:style-name="ro1">
          <table:table-cell office:value-type="string">
            <text:p>328_IA_REL_FIN_RVitoria1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6.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19 D:20171031155513Z00'00' D:20171031155513Z00'00' Igespar PDF24 Creator FichaSitio Copyright © arqueologia e património Matosinhos 2017 Intervenção Arqueológica Rua da Vitória, nº117-119 FICHA TÉCNICA Ricardo Teixeira &amp; Vítor Fonseca, Arqueologia Lda. PROJETO 328 Coordenação geral Ricardo Teixeira, arqueólogo, mestre em arqueologia Vítor Fonseca, arqueólogo Coordenação de projeto Liliana Barbosa, arqueóloga Trabalho de Campo Arqueólogos Liliana Barbosa Rui Pinheiro, arqueólogo Graça Pereira, arqueóloga Assistentes de arqueólogo Anabela Rodrigues Bebiana Mota Lisdália Mota Ricardo Mota Trabalho de Gabinete Relatório Graça Pereira Desenho gráfico José Luís Domingues Tratamento de espólio Anabela Rodrigues, assistente de arqueólogo Teresa Gonçalves, assistente de arqueólogo Fotografia de espólio Teresa Gonçalves Apoio técnico e revisão de texto Liliana Barbosa Data 30 de Outubro de 2017 relatório final página 3 de 41</text:p>
          </table:table-cell>
          <table:table-cell table:number-columns-repeated="1015"/>
        </table:table-row>
        <table:table-row table:style-name="ro1">
          <table:table-cell office:value-type="string">
            <text:p>332_IA_MATOSINHOS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GPL Ghostscript 9.22 D:20180129161557Z00'00' D:20180129161557Z00'00' Igespar PDF24 Creator FichaSitio RELATÓRIO FINAL Intervenção Arqueológica Rua de Fuzelhas, Nº169, 173, 175 Matosinhos 2017 Copyright © arqueologia e património Matosinhos 2018 FUZ169.15 Intervenção Arqueológica Rua de Fuzelhas, Nº 169, 173, 175 FICHA TÉCNICA Ricardo Teixeira &amp; Vítor Fonseca, Arqueologia Lda. PROJETO 332 Coordenação geral Ricardo Teixeira, arqueólogo, mestre em arqueologia Vítor Fonseca, arqueólogo Coordenação de projeto Liliana Barbosa, arqueóloga Trabalho de Campo Direção Liliana Barbosa, arqueóloga Arqueólogos Bárbara Costa, arqueóloga Rita Teixeira, arqueóloga Trabalho de Gabinete Relatório Rita Teixeira Desenho gráfico José Domingues Tratamento de espólio Anabela Rodrigues, assistente de arqueólogo Teresa Gonçalves, assistente de arqueólogo Fotografia de espólio Teresa Gonçalves, assistente de arqueólogo Apoio técnico e revisão de texto Liliana Barbosa Data 29 de Janeiro de 2018 relatório final pá...</text:p>
          </table:table-cell>
          <table:table-cell table:number-columns-repeated="1015"/>
        </table:table-row>
        <table:table-row table:style-name="ro1">
          <table:table-cell office:value-type="string">
            <text:p>334_Rel_Fin_2018_01_3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1.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office:value-type="string">
            <text:p>Writer OpenOffice 4.1.4 D:20190909151834+01'00' Copyright © arqueologia e património Matosinhos 2018 Intervenção Arqueológica Rua do Morgado de Mateus, nº53 FICHA TÉCNICA Ricardo Teixeira &amp; Vítor Fonseca, Arqueologia Lda. PROJETO 334 Coordenação geral Ricardo Teixeira, arqueólogo, mestre em arqueologia Vítor Fonseca, arqueólogo Coordenação de projeto Liliana Barbosa, arqueóloga Trabalho de Campo Direção Graça Pereira, arqueóloga Trabalho de Gabinete Relatório Graça Pereira Desenho gráfico José Luís Domingues Tratamento de espólio Anabela Rodrigues, assistente de arqueólogo Teresa Gonçalves, assistente de arqueólogo Fotografia de espólio Teresa Gonçalves Apoio técnico e revisão de texto Liliana Barbosa, arqueóloga, pós-graduada em museologia Data 31 de Janeiro de 2018 relatório final página 3 de 31</text:p>
          </table:table-cell>
          <table:table-cell table:number-columns-repeated="1015"/>
        </table:table-row>
        <table:table-row table:style-name="ro1">
          <table:table-cell office:value-type="string">
            <text:p>335_IA_PORTO_20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office:value-type="string">
            <text:p>GPL Ghostscript 9.14 D:20170719122053+01'00' D:20170719122053+01'00' Igespar PDF24 Creator FichaSitio ç RELATÓRIO FINAL Intervenção Arqueológica Empreitada de Museus da UP – Ala Sul, Fase 2 (Intervenção Parcial I - I) Porto 2016 Copyright © arqueologia e património Matosinhos 2017 PGT.16 Intervenção Arqueológica Empreitada de Museus da UP – Ala Sul, Fase 2 FICHA TÉCNICA Ricardo Teixeira &amp; Vítor Fonseca, Arqueologia Lda. PROJECTO 335 Coordenação geral Ricardo Teixeira, arqueólogo, mestre em arqueologia Vítor Fonseca, arqueólogo Trabalho de Campo Direção Graça Pereira, arqueóloga Trabalho de Gabinete Relatório Graça Pereira Pesquisa bibliográfica e enquadramento históricos Pedro Maia, técnico superior de gestão do património Desenho gráfico José Luís Domingues Revisão Liliana Barbosa, arqueóloga Data Julho de 2017 relatório final página 3 de 41</text:p>
          </table:table-cell>
          <table:table-cell table:number-columns-repeated="1015"/>
        </table:table-row>
        <table:table-row table:style-name="ro1">
          <table:table-cell office:value-type="string">
            <text:p>336_VSL15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5. Pistas usadas: relatório, relatorio, projecto, intervenção arqueológica, intervencao arqueologica.</text:p>
          </table:table-cell>
          <table:table-cell office:value-type="string">
            <text:p>relatório, relatorio, projecto, intervenção arqueológica, intervencao arqueologica</text:p>
          </table:table-cell>
          <table:table-cell office:value-type="string">
            <text:p>Assinatura PDF</text:p>
          </table:table-cell>
          <table:table-cell office:value-type="string">
            <text:p>D:20151228154626Z pedromaia PScript5.dll Version 5.2.2 Acrobat Distiller 8.0.0 (Windows) D:20151228155238Z 336_Rel_Prel_2015_12_28 Copyright © arqueologia e património Matosinhos 2015 Intervenção Arqueológica Viela de S. Lourenço – VSL.15 FICHA TÉCNICA Ricardo Teixeira &amp; Vítor Fonseca, Arqueologia Lda. PROJECTO 336 Coordenação geral Ricardo Teixeira, arqueólogo, mestre em arqueologia Vítor Fonseca, arqueólogo Trabalho de Campo Direção Jorge Fonseca, arqueólogo Graça Pereira, arqueóloga Arqueólogo assistente Rui Santo Assistente de arqueólogo André Saraiva Operário de arqueologia Pedro Pinto Trabalho de Gabinete Relatório Jorge Fonseca Desenho gráfico Rui Oliveira Apoio técnico e revisão de texto Pedro Maia, técnico superior de gestão do património Data Dezembro de 2015 relatório preliminar página 3 de 22</text:p>
          </table:table-cell>
          <table:table-cell table:number-columns-repeated="1015"/>
        </table:table-row>
        <table:table-row table:style-name="ro1">
          <table:table-cell office:value-type="string">
            <text:p>337_CR_CAMPO_24_AGOSTO_MP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19.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office:value-type="string">
            <text:p>GPL Ghostscript 9.14 D:20170307163142Z00'00' D:20170307163142Z00'00' pedromaia PDF24 Creator 337_Publicacao_VF RELATÓRIO FINAL Trabalhos de Conservação e Restauro de Bens Arqueológicos Móveis MP-CVA07.14 Estação do Campo 24 de Agosto METRO DO PORTO Matosinhos 2017 Copyright © arqueologia e património Matosinhos 2017 Conservação e Restauro de Bens Arqueológicos Móveis MP-CVA07.14 Estação do Campo 24 de Agosto FICHA TÉCNICA Ricardo Teixeira &amp; Vítor Fonseca, Arqueologia Lda. PROJECTO 337 Coordenação geral Ricardo Teixeira, mestre em arqueologia Vítor Fonseca, arqueólogo Coordenação de projeto Anabela Hipólito, mestre em conservação e restauro Trabalho de Laboratório Direção da Intervenção Anabela Hipólito Conservadores-Restauradores Filipa Teixeira, técnica assistente de conservação e restauro Paula Fernandes, conservadora-restauradora Trabalho de Gabinete Direção e gestão projeto Anabela Hipólito Relatório Anabela Hipólito Draft de Catálogo Rui Oliveira, designer gráfico Conteúdos Cientí...</text:p>
          </table:table-cell>
          <table:table-cell table:number-columns-repeated="1015"/>
        </table:table-row>
        <table:table-row table:style-name="ro1">
          <table:table-cell office:value-type="string">
            <text:p>338_EIA_Eurocast.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9. Pistas usadas: relatório, relatorio, relatório final, relatorio final, projeto, projecto, prospeção.</text:p>
          </table:table-cell>
          <table:table-cell office:value-type="string">
            <text:p>relatório, relatorio, relatório final, relatorio final, projeto, projecto, prospeção</text:p>
          </table:table-cell>
          <table:table-cell office:value-type="string">
            <text:p>Assinatura PDF</text:p>
          </table:table-cell>
          <table:table-cell office:value-type="string">
            <text:p>D:20160505122449+01'00' Liliana Barbosa Writer OpenOffice 4.1.2 D:20160603113816+01'00' RELATÓRIO FINAL EIA DESCRITOR PATRIMÓNIO CULTURAL Arcos de Valdevez Unidade Industrial Eurocast Portugalt Copyright © arqueologia e património Matosinhos 2016 EIATBC.15 Estudo de Impacte Ambiental Eurocast FICHA TÉCNICA Ricardo Teixeira &amp; Vítor Fonseca, Arqueologia Lda. PROJECTO 342 Coordenação geral Ricardo Teixeira, arqueólogo, Vítor Fonseca, arqueólogo Trabalho de Campo Direção Liliana Barbosa, arqueóloga Assistente de arqueólogo Bebiana Mota Trabalho de Gabinete Pesquisa Pedro Maia, Técnico Superior de Gestão do Património Relatório Liliana Barbosa Desenho gráfico Rui Oliveira Apoio técnico e revisão de texto Pedro Maia Data 08 de Março de 2016 relatório final página 3 de 32 Estudo de Impacte Ambiental Eurocast ÍNDICE 1.Apresentação.................................................................................................................................................7 2.Metodologia.........</text:p>
          </table:table-cell>
          <table:table-cell table:number-columns-repeated="1015"/>
        </table:table-row>
        <table:table-row table:style-name="ro1">
          <table:table-cell office:value-type="string">
            <text:p>338_EIA_TBC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9.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office:value-type="string">
            <text:p>D:20160309153419Z Liliana Barbosa Writer OpenOffice 4.1.2 D:20160309154405Z RELATÓRIO FINAL EIA DESCRITOR PATRIMÓNIO CULTURAL Parque Empresarial de Mogueira Arcos de Valdevez Copyright © arqueologia e património Matosinhos 2016 EIATBC.15 Estudo de Impacte Ambiental Eurocast FICHA TÉCNICA Ricardo Teixeira &amp; Vítor Fonseca, Arqueologia Lda. PROJECTO 342 Coordenação geral Ricardo Teixeira, arqueólogo, Vítor Fonseca, arqueólogo Trabalho de Campo Direção Liliana Barbosa, arqueóloga Assistente de arqueólogo Bebiana Mota Trabalho de Gabinete Pesquisa Pedro Maia, Técnico Superior de Gestão do Património Relatório Liliana Barbosa Desenho gráfico Rui Oliveira Apoio técnico e revisão de texto Pedro Maia Data 08 de Março de 2016 relatório final página 3 de 32</text:p>
          </table:table-cell>
          <table:table-cell table:number-columns-repeated="1015"/>
        </table:table-row>
        <table:table-row table:style-name="ro1">
          <table:table-cell office:value-type="string">
            <text:p>339_IA_LISBOA_20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4. Pistas usadas: relatório, relatorio, relatório final, relatorio final, projecto, intervenção arqueológica, intervencao arqueologica, sondagem, sondagens, trabalhos arqueológicos, trabalhos arqueologicos.</text:p>
          </table:table-cell>
          <table:table-cell office:value-type="string">
            <text:p>relatório, relatorio, relatório final, relatorio final, projecto, intervenção arqueológica, intervencao arqueologica, sondagem, sondagen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340_BST26_16_IA_AlamedaBasilioTel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42_EIA_Mogueira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3.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table:number-columns-repeated="1016"/>
        </table:table-row>
        <table:table-row table:style-name="ro1">
          <table:table-cell office:value-type="string">
            <text:p>343_CR_MUSEU_PENAFIEL_20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14. Pistas usadas: relatório, relatorio, relatório final, relatorio final, projeto, projecto, base de dados, registo, registos, data, estado.</text:p>
          </table:table-cell>
          <table:table-cell office:value-type="string">
            <text:p>relatório, relatorio, relatório final, relatorio final, projeto, projecto, base de dados, registo, registos, data, estado</text:p>
          </table:table-cell>
          <table:table-cell office:value-type="string">
            <text:p>Assinatura PDF</text:p>
          </table:table-cell>
          <table:table-cell table:number-columns-repeated="1016"/>
        </table:table-row>
        <table:table-row table:style-name="ro1">
          <table:table-cell office:value-type="string">
            <text:p>345a_MALES16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5. Pistas usadas: relatório, relatorio, projecto, intervenção arqueológica, intervencao arqueologica, sondagens.</text:p>
          </table:table-cell>
          <table:table-cell office:value-type="string">
            <text:p>relatório, relatorio, projecto, intervenção arqueológica, intervencao arqueologica, sondagens</text:p>
          </table:table-cell>
          <table:table-cell office:value-type="string">
            <text:p>Assinatura PDF</text:p>
          </table:table-cell>
          <table:table-cell table:number-columns-repeated="1016"/>
        </table:table-row>
        <table:table-row table:style-name="ro1">
          <table:table-cell office:value-type="string">
            <text:p>345b_LPPL16_Relatorio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1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45c_RelFIN_2017_05_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345d_CSR_2016_07_21.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7.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345f_AA_CastBr_Falaguei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to, acompanhamento arqueológico, acompanhamento arqueologico, prospeção, trabalhos arqueológicos, trabalhos arqueologicos.</text:p>
          </table:table-cell>
          <table:table-cell office:value-type="string">
            <text:p>relatório, relatorio, relatório final, relatorio final, projeto, acompanhamento arqueológico, acompanhamento arqueologico, prospeçã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345h_AACE16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46_FER2_16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47_IC_MATOSINHOS_20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5.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349_PRT_MZS280_16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50_REL_IA_IKE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51_INF_16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4.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52_AA_Sra_Saud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5.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53_PLLP2_13_16_AA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7.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54_PRT_SMIGUEL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55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357_AA_RST12_16_Rel_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57_PRT_IA_RST12_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60_LX_TFG16_Relatorio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9.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60_LX_TFG16_Rel_Pre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4. Pistas usadas: relatório, relatorio, intervenção arqueológica, intervencao arqueologica.</text:p>
          </table:table-cell>
          <table:table-cell office:value-type="string">
            <text:p>relatório, relatori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61_LISBOA_PAS16_RELFINAL_ANTROPOLOG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1. Pistas usadas: relatório, relatorio, relatório final, relatorio final, projecto, intervenção arqueológica, intervencao arqueologica, escavação, escavacao, trabalhos arqueológicos, trabalhos arqueologicos.</text:p>
          </table:table-cell>
          <table:table-cell office:value-type="string">
            <text:p>relatório, relatorio, relatório final, relatorio final, projecto, intervenção arqueológica, intervencao arqueologica, escavação, escavaca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361_LISBOA_PAS16_RELFINAL_ARQUEOLOG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37. Pistas usadas: relatório, relatorio, relatório final, relatorio final, projecto, intervenção arqueológica, intervencao arqueologica, escavação, escavacao.</text:p>
          </table:table-cell>
          <table:table-cell office:value-type="string">
            <text:p>relatório, relatorio, relatório final, relatorio final, projecto, intervenção arqueológica, intervencao arqueologica, escavação, escavacao</text:p>
          </table:table-cell>
          <table:table-cell office:value-type="string">
            <text:p>Assinatura PDF</text:p>
          </table:table-cell>
          <table:table-cell table:number-columns-repeated="1016"/>
        </table:table-row>
        <table:table-row table:style-name="ro1">
          <table:table-cell office:value-type="string">
            <text:p>364_CR_REL_BOT_BATOCA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4.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371_REL_AA_Rest_BasilioTel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72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373_IA_PORTO_20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7.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73_PLM98_16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74_PRT_CMO16_REL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intervenção arqueológica, intervencao arqueologica, acompanhamento arqueológico, acompanhamento arqueologico.</text:p>
          </table:table-cell>
          <table:table-cell office:value-type="string">
            <text:p>relatório, relatorio, relatório final, relatorio final, proje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75_AVR_EEA16_REL_CS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1.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375_AVR_EEA16_REL_CSR_CP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1.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377_SC_LISBOA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6. Pistas usadas: relatório, relatorio, relatório final, relatorio final, projecto, sondagens.</text:p>
          </table:table-cell>
          <table:table-cell office:value-type="string">
            <text:p>relatório, relatorio, relatório final, relatorio final, projecto, sondagens</text:p>
          </table:table-cell>
          <table:table-cell office:value-type="string">
            <text:p>Assinatura PDF</text:p>
          </table:table-cell>
          <table:table-cell table:number-columns-repeated="1016"/>
        </table:table-row>
        <table:table-row table:style-name="ro1">
          <table:table-cell office:value-type="string">
            <text:p>380_PRT_AA_MIR152_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6.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82_GOP_Estatua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2. Pistas usadas: relatório, relatorio, relatório final, relatorio final, projeto, intervenção arqueológica, intervencao arqueologica, acompanhamento arqueológico, acompanhamento arqueologico.</text:p>
          </table:table-cell>
          <table:table-cell office:value-type="string">
            <text:p>relatório, relatorio, relatório final, relatorio final, proje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84_IA_POVOA_DO_VARZIM_2016.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86_IA_TravSSebastia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87_AA_DMM_17_REL_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393_REL_PREV_2017_02_20.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Média</text:p>
          </table:table-cell>
          <table:table-cell office:value-type="string">
            <text:p>Documento PDF; o conteúdo aparenta corresponder a relatório de projeto / intervenção arqueológica / tabela / base de dados. Foram analisadas as primeiras 4 página(s) de um total de 12. Pistas usadas: relatório, relatorio, projeto, data, estado.</text:p>
          </table:table-cell>
          <table:table-cell office:value-type="string">
            <text:p>relatório, relatorio, projeto, data, estado</text:p>
          </table:table-cell>
          <table:table-cell office:value-type="string">
            <text:p>Assinatura PDF</text:p>
          </table:table-cell>
          <table:table-cell table:number-columns-repeated="1016"/>
        </table:table-row>
        <table:table-row table:style-name="ro1">
          <table:table-cell office:value-type="string">
            <text:p>394_ESTUDO_2017_06_2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395_AA_R_Sagre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96_AA_SOB600_Rel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397_PBVA14_17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8. Pistas usadas: relatório, relatorio, relatório final, relatorio final, projecto, intervenção arqueológica, intervencao arqueologica, acompanhamento arqueológico, acompanhamento arqueologico, sondagens.</text:p>
          </table:table-cell>
          <table:table-cell office:value-type="string">
            <text:p>relatório, relatorio, relatório final, relatorio final, projecto, intervenção arqueológica, intervencao arqueologica, acompanhamento arqueológico, acompanhamento arqueologico, sondagens</text:p>
          </table:table-cell>
          <table:table-cell office:value-type="string">
            <text:p>Assinatura PDF</text:p>
          </table:table-cell>
          <table:table-cell table:number-columns-repeated="1016"/>
        </table:table-row>
        <table:table-row table:style-name="ro1">
          <table:table-cell office:value-type="string">
            <text:p>398_BRG_BRA16QP_REL_Ce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1. Pistas usadas: relatório, relatorio, relatório final, relatorio final, projecto.</text:p>
          </table:table-cell>
          <table:table-cell office:value-type="string">
            <text:p>relatório, relatorio, relatório final, relatorio final, projecto</text:p>
          </table:table-cell>
          <table:table-cell office:value-type="string">
            <text:p>Assinatura PDF</text:p>
          </table:table-cell>
          <table:table-cell table:number-columns-repeated="1016"/>
        </table:table-row>
        <table:table-row table:style-name="ro1">
          <table:table-cell office:value-type="string">
            <text:p>401_MPSP17_REL_ANTROPOLOGIA_VOL_I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01_MPSP17_REL_ARQUEOLOGIA_VOL_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8. Pistas usadas: relatório, relatorio, relatório final, relatorio final, projecto, intervenção arqueológica, intervencao arqueologica, trabalhos arqueológicos, trabalhos arqueologicos.</text:p>
          </table:table-cell>
          <table:table-cell office:value-type="string">
            <text:p>relatório, relatorio, relatório final, relatorio final, projecto, intervenção arqueológica, intervencao arqueologica,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403_AA_GUIMARAES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5.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404_IA_LISBOA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1 página(s) de um total de 1.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05_RDL17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406_CGR60_17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4.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09_CR_BRAGANÇA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12_CR_ÁGUEDA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9.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13_IA_PORTO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14_CR_PORTO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8.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16_CHV_17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2.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417_QT18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projecto, prospeção.</text:p>
          </table:table-cell>
          <table:table-cell office:value-type="string">
            <text:p>relatório, relatorio, relatório final, relatorio final, projeto, projecto, prospeção</text:p>
          </table:table-cell>
          <table:table-cell office:value-type="string">
            <text:p>Assinatura PDF</text:p>
          </table:table-cell>
          <table:table-cell table:number-columns-repeated="1016"/>
        </table:table-row>
        <table:table-row table:style-name="ro1">
          <table:table-cell office:value-type="string">
            <text:p>418_RelFin_CapelaSJoseTaipa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21_RPS17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2. Pistas usadas: relatório, relatorio, relatório final, relatorio final, projeto, projecto, intervenção arqueológica, intervencao arqueologica, acompanhamento arqueológico, acompanhamento arqueologico, escavação, escavacao.</text:p>
          </table:table-cell>
          <table:table-cell office:value-type="string">
            <text:p>relatório, relatorio, relatório final, relatorio final, projeto, projecto, intervenção arqueológica, intervencao arqueologica, acompanhamento arqueológico, acompanhamento arqueologico, escavação, escavacao</text:p>
          </table:table-cell>
          <table:table-cell office:value-type="string">
            <text:p>Assinatura PDF</text:p>
          </table:table-cell>
          <table:table-cell table:number-columns-repeated="1016"/>
        </table:table-row>
        <table:table-row table:style-name="ro1">
          <table:table-cell office:value-type="string">
            <text:p>423_Rel_Final_2023_04_REV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0. Pistas usadas: relatório, relatorio, relatório final, relatorio final, projeto, intervenção arqueológica, intervencao arqueologica, sondagens.</text:p>
          </table:table-cell>
          <table:table-cell office:value-type="string">
            <text:p>relatório, relatorio, relatório final, relatorio final, projeto, intervenção arqueológica, intervencao arqueologica, sondagens</text:p>
          </table:table-cell>
          <table:table-cell office:value-type="string">
            <text:p>Assinatura PDF</text:p>
          </table:table-cell>
          <table:table-cell table:number-columns-repeated="1016"/>
        </table:table-row>
        <table:table-row table:style-name="ro1">
          <table:table-cell office:value-type="string">
            <text:p>424_REL_PREV_2017_09_20.pdf</text:p>
          </table:table-cell>
          <table:table-cell office:value-type="string">
            <text:p>.pdf</text:p>
          </table:table-cell>
          <table:table-cell office:value-type="string">
            <text:p>Documento PDF</text:p>
          </table:table-cell>
          <table:table-cell office:value-type="string">
            <text:p>Estudo de Impacto Ambiental</text:p>
          </table:table-cell>
          <table:table-cell office:value-type="string">
            <text:p>Média</text:p>
          </table:table-cell>
          <table:table-cell office:value-type="string">
            <text:p>Documento PDF; o conteúdo aparenta corresponder a relatório de projeto / intervenção arqueológica / fotografia / registo fotográfico. Foram analisadas as primeiras 4 página(s) de um total de 32. Pistas usadas: relatório, relatorio, projeto, registo fotográfico, registo fotografico.</text:p>
          </table:table-cell>
          <table:table-cell office:value-type="string">
            <text:p>relatório, relatorio, projeto, registo fotográfico, registo fotografico</text:p>
          </table:table-cell>
          <table:table-cell office:value-type="string">
            <text:p>Assinatura PDF</text:p>
          </table:table-cell>
          <table:table-cell table:number-columns-repeated="1016"/>
        </table:table-row>
        <table:table-row table:style-name="ro1">
          <table:table-cell office:value-type="string">
            <text:p>425_MPS_LISBOA_ROSSIO_201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5.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31_LAM_RC5_17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cto, intervenção arqueológica, intervencao arqueologica, sondagens, trabalhos arqueológicos, trabalhos arqueologicos.</text:p>
          </table:table-cell>
          <table:table-cell office:value-type="string">
            <text:p>relatório, relatorio, relatório final, relatorio final, projecto, intervenção arqueológica, intervencao arqueologica, sondagen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432_CR_FUNCHAL_20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90.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33_AA_PLC726_17Rel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35_AG168_17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1.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41_RSA28_18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443_PSM_18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1.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44_SPT18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53_CR_VILA_VIÇOSA_20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2.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56_IA_PORTO_20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5.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56_SMA18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5.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59_PeSA_FronteiraPortalegre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9. Pistas usadas: relatório, relatorio, relatório final, relatorio final, projecto, intervenção arqueológica, intervencao arqueologica, sondagens, prospecção, prospeccao, trabalhos arqueológicos, trabalhos arqueologicos.</text:p>
          </table:table-cell>
          <table:table-cell office:value-type="string">
            <text:p>relatório, relatorio, relatório final, relatorio final, projecto, intervenção arqueológica, intervencao arqueologica, sondagens, prospecção, prospecca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460_IA_FUZ5_18_RelFin.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projeto, projecto, intervenção arqueológica, intervencao arqueologica, sondagem.</text:p>
          </table:table-cell>
          <table:table-cell office:value-type="string">
            <text:p>relatório, relatorio, projeto, projecto, intervenção arqueológica, intervencao arqueologica, sondagem</text:p>
          </table:table-cell>
          <table:table-cell office:value-type="string">
            <text:p>Assinatura PDF</text:p>
          </table:table-cell>
          <table:table-cell table:number-columns-repeated="1016"/>
        </table:table-row>
        <table:table-row table:style-name="ro1">
          <table:table-cell office:value-type="string">
            <text:p>466_APD28_18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67_FRM307_18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70_VCL18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1. Pistas usadas: relatório, relatorio, relatório final, relatorio final, projecto, intervenção arqueológica, intervencao arqueologica, acompanhamento arqueológico, acompanhamento arqueologico, sondagem, sondagens.</text:p>
          </table:table-cell>
          <table:table-cell office:value-type="string">
            <text:p>relatório, relatorio, relatório final, relatorio final, projecto, intervenção arqueológica, intervencao arqueologica, acompanhamento arqueológico, acompanhamento arqueologico, sondagem, sondagens</text:p>
          </table:table-cell>
          <table:table-cell office:value-type="string">
            <text:p>Assinatura PDF</text:p>
          </table:table-cell>
          <table:table-cell table:number-columns-repeated="1016"/>
        </table:table-row>
        <table:table-row table:style-name="ro1">
          <table:table-cell office:value-type="string">
            <text:p>476_ATV76_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77_CR_ÁGUEDA_20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3.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78_CIC18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3.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80_RelPrevio_BURMESTE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5. Pistas usadas: relatório, relatorio, projeto, prospeção.</text:p>
          </table:table-cell>
          <table:table-cell office:value-type="string">
            <text:p>relatório, relatorio, projeto, prospeção</text:p>
          </table:table-cell>
          <table:table-cell office:value-type="string">
            <text:p>Assinatura PDF</text:p>
          </table:table-cell>
          <table:table-cell table:number-columns-repeated="1016"/>
        </table:table-row>
        <table:table-row table:style-name="ro1">
          <table:table-cell office:value-type="string">
            <text:p>485_SAeEA_BRAGANÇA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98. Pistas usadas: relatório, relatorio, relatório final, relatorio final, projecto, intervenção arqueológica, intervencao arqueologica, escavação, escavacao, sondagens, trabalhos arqueológicos, trabalhos arqueologicos.</text:p>
          </table:table-cell>
          <table:table-cell office:value-type="string">
            <text:p>relatório, relatorio, relatório final, relatorio final, projecto, intervenção arqueológica, intervencao arqueologica, escavação, escavacao, sondagen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487_IA_LAMEGO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488_CR_AROUCA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5.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90_CR_CASTRO_DE_ROMARIZ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492_CR_CASTRO_DE_GUFOES_20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8.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494_EIA_BRB18.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4.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499_PORTO_JED18_REL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intervenção arqueológica, intervencao arqueologica, acompanhamento arqueológico, acompanhamento arqueologico, sondagens, trabalhos arqueológicos, trabalhos arqueologicos.</text:p>
          </table:table-cell>
          <table:table-cell office:value-type="string">
            <text:p>relatório, relatorio, relatório final, relatorio final, projeto, intervenção arqueológica, intervencao arqueologica, acompanhamento arqueológico, acompanhamento arqueologico, sondagen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500_CR_MATOSINHOS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6.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507_CCS_19_Relatorio_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07_CNC_19_Relatorio_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2.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07_CST_19_Relatorio_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07_FRJ_19_Relatorio_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72.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07_GINJ_19_Relatorio_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66.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09_RDL16_LSB19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5. Pistas usadas: relatório, relatorio, relatório final, relatorio final, trabalhos arqueológicos, trabalhos arqueologicos.</text:p>
          </table:table-cell>
          <table:table-cell office:value-type="string">
            <text:p>relatório, relatorio, relatório final, relatorio final,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514_BEN17_19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21_IP_SA_EN235_19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23_CCM19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36_CSR_2020_1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6.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36_IPSA_EN210_19_RF_ESC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to, projecto, intervenção arqueológica, intervencao arqueologica, acompanhamento arqueológico, acompanhamento arqueologico, escavação, escavacao.</text:p>
          </table:table-cell>
          <table:table-cell office:value-type="string">
            <text:p>relatório, relatorio, relatório final, relatorio final, projeto, projecto, intervenção arqueológica, intervencao arqueologica, acompanhamento arqueológico, acompanhamento arqueologico, escavação, escavacao</text:p>
          </table:table-cell>
          <table:table-cell office:value-type="string">
            <text:p>Assinatura PDF</text:p>
          </table:table-cell>
          <table:table-cell table:number-columns-repeated="1016"/>
        </table:table-row>
        <table:table-row table:style-name="ro1">
          <table:table-cell office:value-type="string">
            <text:p>536_NT_2019_10_09_PropostaSond.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 Pistas usadas: relatório, relatorio, projeto, acompanhamento arqueológico, acompanhamento arqueologico, memória descritiva, memoria descritiva, trabalhos arqueológicos, trabalhos arqueologicos.</text:p>
          </table:table-cell>
          <table:table-cell office:value-type="string">
            <text:p>relatório, relatorio, projeto, acompanhamento arqueológico, acompanhamento arqueologico, memória descritiva, memoria descritiva,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536_NT_2019_11_06_Sond.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7. Pistas usadas: projeto, acompanhamento arqueológico, acompanhamento arqueologico.</text:p>
          </table:table-cell>
          <table:table-cell office:value-type="string">
            <text:p>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37_APDL_REL_FINAL_2020_07_1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99.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539_TRC35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projecto, intervenção arqueológica, intervencao arqueologica, acompanhamento arqueológico, acompanhamento arqueologico.</text:p>
          </table:table-cell>
          <table:table-cell office:value-type="string">
            <text:p>relatório, relatorio, relatório final, relatorio final, projeto, projec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42_AA_AVEIRO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86.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45_EBP_19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4.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47A_SFD19_RelPrel2020_03.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2. Pistas usadas: relatório, relatorio, acompanhamento arqueológico, acompanhamento arqueologico.</text:p>
          </table:table-cell>
          <table:table-cell office:value-type="string">
            <text:p>relatório, relatori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47b_CBF19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76. Pistas usadas: relatório, relatorio, projeto, acompanhamento arqueológico, acompanhamento arqueologico.</text:p>
          </table:table-cell>
          <table:table-cell office:value-type="string">
            <text:p>relatório, relatorio,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47c_castelo_Branco_Funda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62. Pistas usadas: relatório, relatorio, projeto, acompanhamento arqueológico, acompanhamento arqueologico.</text:p>
          </table:table-cell>
          <table:table-cell office:value-type="string">
            <text:p>relatório, relatorio,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47D_AA_PONTE_DE_LIMA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1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47E_AA_PONTE_DE_LIMA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2.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51_BRAGA_LSB4421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cto, intervenção arqueológica, intervencao arqueologica, acompanhamento arqueológico, acompanhamento arqueologico, sondagens.</text:p>
          </table:table-cell>
          <table:table-cell office:value-type="string">
            <text:p>relatório, relatorio, relatório final, relatorio final, projecto, intervenção arqueológica, intervencao arqueologica, acompanhamento arqueológico, acompanhamento arqueologico, sondagens</text:p>
          </table:table-cell>
          <table:table-cell office:value-type="string">
            <text:p>Assinatura PDF</text:p>
          </table:table-cell>
          <table:table-cell table:number-columns-repeated="1016"/>
        </table:table-row>
        <table:table-row table:style-name="ro1">
          <table:table-cell office:value-type="string">
            <text:p>551_BRAGA_LSB4421_RFINAL_red.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cto, intervenção arqueológica, intervencao arqueologica, acompanhamento arqueológico, acompanhamento arqueologico, sondagens.</text:p>
          </table:table-cell>
          <table:table-cell office:value-type="string">
            <text:p>relatório, relatorio, relatório final, relatorio final, projecto, intervenção arqueológica, intervencao arqueologica, acompanhamento arqueológico, acompanhamento arqueologico, sondagens</text:p>
          </table:table-cell>
          <table:table-cell office:value-type="string">
            <text:p>Assinatura PDF</text:p>
          </table:table-cell>
          <table:table-cell table:number-columns-repeated="1016"/>
        </table:table-row>
        <table:table-row table:style-name="ro1">
          <table:table-cell office:value-type="string">
            <text:p>553_LP_PORTO_2019.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4.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554_IA_CasteloMogadouro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7.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55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558_MSAR19_Relatorio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21.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61_IPSA_EN326_RelatorioFinal_Volume_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61_IPSA_EN326_RelatorioFinal_Volume_I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05.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61_IPSA_EN326_RelatorioFinal_Volume_II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59.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62_Rel_Final_AA_31_JAN_144.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5. Pistas usadas: relatório, relatorio, relatório final, relatorio final, projeto, intervenção arqueológica, intervencao arqueologica, acompanhamento arqueológico, acompanhamento arqueologico, plano de trabalhos, trabalhos arqueológicos, trabalhos arqueologicos.</text:p>
          </table:table-cell>
          <table:table-cell office:value-type="string">
            <text:p>relatório, relatorio, relatório final, relatorio final, projeto, intervenção arqueológica, intervencao arqueologica, acompanhamento arqueológico, acompanhamento arqueologico, plano de trabalho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566_LAM_CHT21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3. Pistas usadas: relatório, relatorio, relatório final, relatorio final, projeto, intervenção arqueológica, intervencao arqueologica, sondagens.</text:p>
          </table:table-cell>
          <table:table-cell office:value-type="string">
            <text:p>relatório, relatorio, relatório final, relatorio final, projeto, intervenção arqueológica, intervencao arqueologica, sondagens</text:p>
          </table:table-cell>
          <table:table-cell office:value-type="string">
            <text:p>Assinatura PDF</text:p>
          </table:table-cell>
          <table:table-cell table:number-columns-repeated="1016"/>
        </table:table-row>
        <table:table-row table:style-name="ro1">
          <table:table-cell office:value-type="string">
            <text:p>568_HMA19_MosteiroArouca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58. Pistas usadas: relatório, relatorio, relatório final, relatorio final, projeto, projecto, intervenção arqueológica, intervencao arqueologica, sondagens.</text:p>
          </table:table-cell>
          <table:table-cell office:value-type="string">
            <text:p>relatório, relatorio, relatório final, relatorio final, projeto, projecto, intervenção arqueológica, intervencao arqueologica, sondagens</text:p>
          </table:table-cell>
          <table:table-cell office:value-type="string">
            <text:p>Assinatura PDF</text:p>
          </table:table-cell>
          <table:table-cell table:number-columns-repeated="1016"/>
        </table:table-row>
        <table:table-row table:style-name="ro1">
          <table:table-cell office:value-type="string">
            <text:p>569_R_CRUZEIRO_DA_ERMITA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7.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570_IA_PORTO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574_AA_PORTO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74_MDF17_20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não foi determinado automaticamente com segurança. Foram analisadas as primeiras 4 página(s) de um total de 40.</text:p>
          </table:table-cell>
          <table:table-cell/>
          <table:table-cell office:value-type="string">
            <text:p>Assinatura PDF</text:p>
          </table:table-cell>
          <table:table-cell table:number-columns-repeated="1016"/>
        </table:table-row>
        <table:table-row table:style-name="ro1">
          <table:table-cell office:value-type="string">
            <text:p>575_MDF19_20_Relatorio_A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Baixa</text:p>
          </table:table-cell>
          <table:table-cell office:value-type="string">
            <text:p>Documento PDF; o conteúdo não foi determinado automaticamente com segurança. Foram analisadas as primeiras 4 página(s) de um total de 43.</text:p>
          </table:table-cell>
          <table:table-cell/>
          <table:table-cell office:value-type="string">
            <text:p>Assinatura PDF</text:p>
          </table:table-cell>
          <table:table-cell table:number-columns-repeated="1016"/>
        </table:table-row>
        <table:table-row table:style-name="ro1">
          <table:table-cell office:value-type="string">
            <text:p>576_PBA20_AcessoCastelo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76_PBA20_Acompanhamento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5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76_PBA20_SondsFase01_RelatorioFinalpd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48. Pistas usadas: relatório, relatorio, relatório final, relatorio final, projeto, projecto, sondagens.</text:p>
          </table:table-cell>
          <table:table-cell office:value-type="string">
            <text:p>relatório, relatorio, relatório final, relatorio final, projeto, projecto, sondagens</text:p>
          </table:table-cell>
          <table:table-cell office:value-type="string">
            <text:p>Assinatura PDF</text:p>
          </table:table-cell>
          <table:table-cell table:number-columns-repeated="1016"/>
        </table:table-row>
        <table:table-row table:style-name="ro1">
          <table:table-cell office:value-type="string">
            <text:p>589_BRA_CAP1_22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to, intervenção arqueológica, intervencao arqueologica, acompanhamento arqueológico, acompanhamento arqueologico.</text:p>
          </table:table-cell>
          <table:table-cell office:value-type="string">
            <text:p>relatório, relatorio, relatório final, relatorio final, proje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92_C_PORTO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5.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593_RDJI_20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7.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93_RDJI_20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9.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93_REL_FIN_AC_RDJI_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7.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596_JUM775_20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01_AIANC21_RFINAL_V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3. Pistas usadas: relatório, relatorio, relatório final, relatorio final, projecto, trabalhos arqueológicos, trabalhos arqueologicos.</text:p>
          </table:table-cell>
          <table:table-cell office:value-type="string">
            <text:p>relatório, relatorio, relatório final, relatorio final, project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602_IA_ESPOSENDE_20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5.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08_AMD301_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12_695_MetroPorto_LiberdadeSaoBento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01.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13_PLG71_20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3.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14_ABM100_20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616_DABL20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19_PPVVML_21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6. Pistas usadas: relatório, relatorio, relatório final, relatorio final, projeto, sondagem, sondagens, prospeção.</text:p>
          </table:table-cell>
          <table:table-cell office:value-type="string">
            <text:p>relatório, relatorio, relatório final, relatorio final, projeto, sondagem, sondagens, prospeção</text:p>
          </table:table-cell>
          <table:table-cell office:value-type="string">
            <text:p>Assinatura PDF</text:p>
          </table:table-cell>
          <table:table-cell table:number-columns-repeated="1016"/>
        </table:table-row>
        <table:table-row table:style-name="ro1">
          <table:table-cell office:value-type="string">
            <text:p>623_CRBARROSO21_RELATORIO_FINAL_ARQUEOLOG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28_MPBCM01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5. Pistas usadas: relatório, relatorio, relatório final, relatorio final, projeto, projecto, sondagem, sondagens, trabalhos arqueológicos, trabalhos arqueologicos.</text:p>
          </table:table-cell>
          <table:table-cell office:value-type="string">
            <text:p>relatório, relatorio, relatório final, relatorio final, projeto, projecto, sondagem, sondagen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630_JVT133_21_Relatorio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4.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634_CMP126_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35_CER117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39_DMG99_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640_ROU27_23_RelatorioFinal.pd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41_IPSA_LFS_LS_24_Relatorio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51. Pistas usadas: relatório, relatorio, relatório final, relatorio final, acompanhamento arqueológico, acompanhamento arqueologico.</text:p>
          </table:table-cell>
          <table:table-cell office:value-type="string">
            <text:p>relatório, relatorio, relatório final, relatorio final,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647_CVD1262_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2. Pistas usadas: relatório, relatorio, relatório final, relatorio final, projeto, projecto, intervenção arqueológica, intervencao arqueologica, sondagens, trabalhos arqueológicos, trabalhos arqueologicos.</text:p>
          </table:table-cell>
          <table:table-cell office:value-type="string">
            <text:p>relatório, relatorio, relatório final, relatorio final, projeto, projecto, intervenção arqueológica, intervencao arqueologica, sondagens,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647_CVD1262_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649_01_IPSA_LBA_RelatorioFinal_Vol_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1. Pistas usadas: relatório, relatorio, relatório final, relatorio final, projeto, acompanhamento arqueológico, acompanhamento arqueologico, sondagens, prospeção, trabalhos arqueológicos, trabalhos arqueologicos.</text:p>
          </table:table-cell>
          <table:table-cell office:value-type="string">
            <text:p>relatório, relatorio, relatório final, relatorio final, projeto, acompanhamento arqueológico, acompanhamento arqueologico, sondagens, prospeçã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649_02_IPSA_LBA_RelatorioFinal_Vol_I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39. Pistas usadas: relatório, relatorio, relatório final, relatorio final, projeto, acompanhamento arqueológico, acompanhamento arqueologico, escavação, escavacao, sondagens.</text:p>
          </table:table-cell>
          <table:table-cell office:value-type="string">
            <text:p>relatório, relatorio, relatório final, relatorio final, projeto, acompanhamento arqueológico, acompanhamento arqueologico, escavação, escavacao, sondagens</text:p>
          </table:table-cell>
          <table:table-cell office:value-type="string">
            <text:p>Assinatura PDF</text:p>
          </table:table-cell>
          <table:table-cell table:number-columns-repeated="1016"/>
        </table:table-row>
        <table:table-row table:style-name="ro1">
          <table:table-cell office:value-type="string">
            <text:p>649_03_IPSA_LBA_RelatorioFinal_Vol_III.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2. Pistas usadas: relatório, relatorio, relatório final, relatorio final, acompanhamento arqueológico, acompanhamento arqueologico, sondagens, prospeção.</text:p>
          </table:table-cell>
          <table:table-cell office:value-type="string">
            <text:p>relatório, relatorio, relatório final, relatorio final, acompanhamento arqueológico, acompanhamento arqueologico, sondagens, prospeção</text:p>
          </table:table-cell>
          <table:table-cell office:value-type="string">
            <text:p>Assinatura PDF</text:p>
          </table:table-cell>
          <table:table-cell table:number-columns-repeated="1016"/>
        </table:table-row>
        <table:table-row table:style-name="ro1">
          <table:table-cell office:value-type="string">
            <text:p>651_PMBraga_RelatorioFinal_C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33.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655_CSFF_21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58. Pistas usadas: relatório, relatorio, relatório final, relatorio final, prospeção.</text:p>
          </table:table-cell>
          <table:table-cell office:value-type="string">
            <text:p>relatório, relatorio, relatório final, relatorio final, prospeção</text:p>
          </table:table-cell>
          <table:table-cell office:value-type="string">
            <text:p>Assinatura PDF</text:p>
          </table:table-cell>
          <table:table-cell table:number-columns-repeated="1016"/>
        </table:table-row>
        <table:table-row table:style-name="ro1">
          <table:table-cell office:value-type="string">
            <text:p>656_TGF21_RelatorioFinalAntropolog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7. Pistas usadas: relatório, relatorio, relatório final, relatorio final, projeto, intervenção arqueológica, intervencao arqueologica, trabalhos arqueológicos, trabalhos arqueologicos.</text:p>
          </table:table-cell>
          <table:table-cell office:value-type="string">
            <text:p>relatório, relatorio, relatório final, relatorio final, projeto, intervenção arqueológica, intervencao arqueologica,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656_TGF21_RelatorioFinalArqueolog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2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58_MTS_RecuperacaoMonumentosPublicos_C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11.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662_BGC_RCGG21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7. Pistas usadas: relatório, relatorio, relatório final, relatorio final, projecto, intervenção arqueológica, intervencao arqueologica, acompanhamento arqueológico, acompanhamento arqueologico, sondagens.</text:p>
          </table:table-cell>
          <table:table-cell office:value-type="string">
            <text:p>relatório, relatorio, relatório final, relatorio final, projecto, intervenção arqueológica, intervencao arqueologica, acompanhamento arqueológico, acompanhamento arqueologico, sondagens</text:p>
          </table:table-cell>
          <table:table-cell office:value-type="string">
            <text:p>Assinatura PDF</text:p>
          </table:table-cell>
          <table:table-cell table:number-columns-repeated="1016"/>
        </table:table-row>
        <table:table-row table:style-name="ro1">
          <table:table-cell office:value-type="string">
            <text:p>663_BaixoRelevo_RelatorioFinal_C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665_LX_EstelasRelatorioFinal_C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4.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666_EIncA_NovoParqu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8. Pistas usadas: relatório, relatorio, projeto, prospeção.</text:p>
          </table:table-cell>
          <table:table-cell office:value-type="string">
            <text:p>relatório, relatorio, projeto, prospeção</text:p>
          </table:table-cell>
          <table:table-cell office:value-type="string">
            <text:p>Assinatura PDF</text:p>
          </table:table-cell>
          <table:table-cell table:number-columns-repeated="1016"/>
        </table:table-row>
        <table:table-row table:style-name="ro1">
          <table:table-cell office:value-type="string">
            <text:p>668_OLI36_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0. Pistas usadas: relatório, relatorio, relatório final, relatorio final, projeto, acompanhamento arqueológico, acompanhamento arqueologico, escavação, escavacao, sondagem, trabalhos arqueológicos, trabalhos arqueologicos.</text:p>
          </table:table-cell>
          <table:table-cell office:value-type="string">
            <text:p>relatório, relatorio, relatório final, relatorio final, projeto, acompanhamento arqueológico, acompanhamento arqueologico, escavação, escavacao, sondagem,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671_CSP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4.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76_RP_CAIS_NOV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2.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681_RelatorioPrevio_PasseioAlegre89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7.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683_RM4144_23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64. Pistas usadas: relatório, relatorio, relatório final, relatorio final, projeto, projecto, intervenção arqueológica, intervencao arqueologica, acompanhamento arqueológico, acompanhamento arqueologico, sondagens.</text:p>
          </table:table-cell>
          <table:table-cell office:value-type="string">
            <text:p>relatório, relatorio, relatório final, relatorio final, projeto, projecto, intervenção arqueológica, intervencao arqueologica, acompanhamento arqueológico, acompanhamento arqueologico, sondagens</text:p>
          </table:table-cell>
          <table:table-cell office:value-type="string">
            <text:p>Assinatura PDF</text:p>
          </table:table-cell>
          <table:table-cell table:number-columns-repeated="1016"/>
        </table:table-row>
        <table:table-row table:style-name="ro1">
          <table:table-cell office:value-type="string">
            <text:p>689_RSS59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6.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690_CRG198_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7. Pistas usadas: relatório, relatorio, relatório final, relatorio final, projeto, projecto, intervenção arqueológica, intervencao arqueologica, acompanhamento arqueológico, acompanhamento arqueologico, escavação, escavacao.</text:p>
          </table:table-cell>
          <table:table-cell office:value-type="string">
            <text:p>relatório, relatorio, relatório final, relatorio final, projeto, projecto, intervenção arqueológica, intervencao arqueologica, acompanhamento arqueológico, acompanhamento arqueologico, escavação, escavacao</text:p>
          </table:table-cell>
          <table:table-cell office:value-type="string">
            <text:p>Assinatura PDF</text:p>
          </table:table-cell>
          <table:table-cell table:number-columns-repeated="1016"/>
        </table:table-row>
        <table:table-row table:style-name="ro1">
          <table:table-cell office:value-type="string">
            <text:p>692_CSF_VC_22_RelFinal_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118. Pistas usadas: relatório, relatorio, relatório final, relatorio final, projeto, prospeção.</text:p>
          </table:table-cell>
          <table:table-cell office:value-type="string">
            <text:p>relatório, relatorio, relatório final, relatorio final, projeto, prospeção</text:p>
          </table:table-cell>
          <table:table-cell office:value-type="string">
            <text:p>Assinatura PDF</text:p>
          </table:table-cell>
          <table:table-cell table:number-columns-repeated="1016"/>
        </table:table-row>
        <table:table-row table:style-name="ro1">
          <table:table-cell office:value-type="string">
            <text:p>693_RP_SBVITORIA80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4.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694_LPX64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8. Pistas usadas: relatório, relatorio, relatório final, relatorio final, projeto, projecto, intervenção arqueológica, intervencao arqueologica, acompanhamento arqueológico, acompanhamento arqueologico.</text:p>
          </table:table-cell>
          <table:table-cell office:value-type="string">
            <text:p>relatório, relatorio, relatório final, relatorio final, projeto, projec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699_JE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0.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00_REL_FIN_GUSTAVO_EIFFEL_220.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1.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01_SLU37_25_Relatorio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7.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03_REL_FIN_SOND_QTA775_22.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4. Pistas usadas: relatório, relatorio, relatório final, relatorio final, projeto, intervenção arqueológica, intervencao arqueologica, sondagem.</text:p>
          </table:table-cell>
          <table:table-cell office:value-type="string">
            <text:p>relatório, relatorio, relatório final, relatorio final, projeto, intervenção arqueológica, intervencao arqueologica, sondagem</text:p>
          </table:table-cell>
          <table:table-cell office:value-type="string">
            <text:p>Assinatura PDF</text:p>
          </table:table-cell>
          <table:table-cell table:number-columns-repeated="1016"/>
        </table:table-row>
        <table:table-row table:style-name="ro1">
          <table:table-cell office:value-type="string">
            <text:p>705_APDL_RelatorioFinal_C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707_REL_PREVIO_ConventoMonchiqu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85.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713_REL_PREVIO_SRoqueLamei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7.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714_RelFin_PRD_R_Sobreiro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8. Pistas usadas: relatório, relatorio, relatório final, relatorio final, projeto, intervenção arqueológica, intervencao arqueologica, acompanhamento arqueológico, acompanhamento arqueologico, trabalhos arqueológicos, trabalhos arqueologicos.</text:p>
          </table:table-cell>
          <table:table-cell office:value-type="string">
            <text:p>relatório, relatorio, relatório final, relatorio final, projeto, intervenção arqueológica, intervencao arqueologica, acompanhamento arqueológico, acompanhamento arqueologic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716_BRA_RJL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4. Pistas usadas: relatório, relatorio, relatório final, relatorio final, projeto, projecto, intervenção arqueológica, intervencao arqueologica, acompanhamento arqueológico, acompanhamento arqueologico.</text:p>
          </table:table-cell>
          <table:table-cell office:value-type="string">
            <text:p>relatório, relatorio, relatório final, relatorio final, projeto, projec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17_REL_FIN_AC_ARQ_ESPL_CASTEL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21_REL_PREVIO_ForteBar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8.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722_VNG22_RelatorioFinal_signed.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24_MLZ_22_RelatorioFinal.pdf.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7. Pistas usadas: relatório, relatorio, relatório final, relatorio final, projeto, intervenção arqueológica, intervencao arqueologica, acompanhamento arqueológico, acompanhamento arqueologico, trabalhos arqueológicos, trabalhos arqueologicos, património arqueológico.</text:p>
          </table:table-cell>
          <table:table-cell office:value-type="string">
            <text:p>relatório, relatorio, relatório final, relatorio final, projeto, intervenção arqueológica, intervencao arqueologica, acompanhamento arqueológico, acompanhamento arqueologico, trabalhos arqueológicos, trabalhos arqueologicos, património arqueológico</text:p>
          </table:table-cell>
          <table:table-cell office:value-type="string">
            <text:p>Assinatura PDF</text:p>
          </table:table-cell>
          <table:table-cell table:number-columns-repeated="1016"/>
        </table:table-row>
        <table:table-row table:style-name="ro1">
          <table:table-cell office:value-type="string">
            <text:p>727_IC35_Rel_Prospeca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99. Pistas usadas: relatório, relatorio, projeto, prospeção.</text:p>
          </table:table-cell>
          <table:table-cell office:value-type="string">
            <text:p>relatório, relatorio, projeto, prospeção</text:p>
          </table:table-cell>
          <table:table-cell office:value-type="string">
            <text:p>Assinatura PDF</text:p>
          </table:table-cell>
          <table:table-cell table:number-columns-repeated="1016"/>
        </table:table-row>
        <table:table-row table:style-name="ro1">
          <table:table-cell office:value-type="string">
            <text:p>727_IPSA_IC35_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98. Pistas usadas: relatório, relatorio, relatório final, relatorio final, projeto, intervenção arqueológica, intervencao arqueologica, acompanhamento arqueológico, acompanhamento arqueologico, escavação, escavacao.</text:p>
          </table:table-cell>
          <table:table-cell office:value-type="string">
            <text:p>relatório, relatorio, relatório final, relatorio final, projeto, intervenção arqueológica, intervencao arqueologica, acompanhamento arqueológico, acompanhamento arqueologico, escavação, escavacao</text:p>
          </table:table-cell>
          <table:table-cell office:value-type="string">
            <text:p>Assinatura PDF</text:p>
          </table:table-cell>
          <table:table-cell table:number-columns-repeated="1016"/>
        </table:table-row>
        <table:table-row table:style-name="ro1">
          <table:table-cell office:value-type="string">
            <text:p>728_LVG41_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30_EEPSBR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intervenção arqueológica, intervencao arqueologica, acompanhamento arqueológico, acompanhamento arqueologico.</text:p>
          </table:table-cell>
          <table:table-cell office:value-type="string">
            <text:p>relatório, relatorio, relatório final, relatorio final,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32_PIN4_22_Relatorio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33_VDM_C_22_Relatorio_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2.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37_ATD22_Relatorio_FunicularGuindai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9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42_MMFIRMINO_RelatorioFinal_CR.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82.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743_CSJ_24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45_ASC22_RelFinal_AcompAscensorLav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45_ASC22_RelFinal_AcompEdificioBLargoOliveirinh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intervenção arqueológica, intervencao arqueologica.</text:p>
          </table:table-cell>
          <table:table-cell office:value-type="string">
            <text:p>relatório, relatorio, relatório final, relatorio final,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49_ARM3422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51_HTP24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52_LVD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55_MatoMiranda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79. Pistas usadas: relatório, relatorio, relatório final, relatorio final, projecto, acompanhamento arqueológico, acompanhamento arqueologico.</text:p>
          </table:table-cell>
          <table:table-cell office:value-type="string">
            <text:p>relatório, relatorio, relatório final, relatorio final,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57_RP_CIMO_MURO_11.pdf</text:p>
          </table:table-cell>
          <table:table-cell office:value-type="string">
            <text:p>.pdf</text:p>
          </table:table-cell>
          <table:table-cell office:value-type="string">
            <text:p>Documento PDF</text:p>
          </table:table-cell>
          <table:table-cell office:value-type="string">
            <text:p>Estudo Patrimonial de Pormenor</text:p>
          </table:table-cell>
          <table:table-cell office:value-type="string">
            <text:p>Alta</text:p>
          </table:table-cell>
          <table:table-cell office:value-type="string">
            <text:p>Documento PDF; o conteúdo aparenta corresponder a relatório de projeto / intervenção arqueológica / tabela / base de dados. Foram analisadas as primeiras 4 página(s) de um total de 45. Pistas usadas: relatório, relatorio, projeto, memória descritiva, memoria descritiva, data, descrição, descricao, valor, estado.</text:p>
          </table:table-cell>
          <table:table-cell office:value-type="string">
            <text:p>relatório, relatorio, projeto, memória descritiva, memoria descritiva, data, descrição, descricao, valor, estado</text:p>
          </table:table-cell>
          <table:table-cell office:value-type="string">
            <text:p>Assinatura PDF</text:p>
          </table:table-cell>
          <table:table-cell table:number-columns-repeated="1016"/>
        </table:table-row>
        <table:table-row table:style-name="ro1">
          <table:table-cell office:value-type="string">
            <text:p>759_TIN338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8.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60_RCT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5. Pistas usadas: relatório, relatorio, relatório final, relatorio final, projeto, acompanhamento arqueológico, acompanhamento arqueologico, trabalhos arqueológicos, trabalhos arqueologicos.</text:p>
          </table:table-cell>
          <table:table-cell office:value-type="string">
            <text:p>relatório, relatorio, relatório final, relatorio final, projeto, acompanhamento arqueológico, acompanhamento arqueologico, trabalhos arqueológicos, trabalhos arqueologicos</text:p>
          </table:table-cell>
          <table:table-cell office:value-type="string">
            <text:p>Assinatura PDF</text:p>
          </table:table-cell>
          <table:table-cell table:number-columns-repeated="1016"/>
        </table:table-row>
        <table:table-row table:style-name="ro1">
          <table:table-cell office:value-type="string">
            <text:p>764_SCA174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71_Guifoes_NotaTecnicaFinal_CR.pdf</text:p>
          </table:table-cell>
          <table:table-cell office:value-type="string">
            <text:p>.pdf</text:p>
          </table:table-cell>
          <table:table-cell office:value-type="string">
            <text:p>Documento PDF</text:p>
          </table:table-cell>
          <table:table-cell office:value-type="string">
            <text:p>Fotografia / registo fotográfico</text:p>
          </table:table-cell>
          <table:table-cell office:value-type="string">
            <text:p>Média</text:p>
          </table:table-cell>
          <table:table-cell office:value-type="string">
            <text:p>Documento PDF; o conteúdo aparenta corresponder a fotografia / registo fotográfico. Foram analisadas as primeiras 4 página(s) de um total de 25. Pistas usadas: registo fotográfico, registo fotografico, câmara, camara.</text:p>
          </table:table-cell>
          <table:table-cell office:value-type="string">
            <text:p>registo fotográfico, registo fotografico, câmara, camara</text:p>
          </table:table-cell>
          <table:table-cell office:value-type="string">
            <text:p>Assinatura PDF</text:p>
          </table:table-cell>
          <table:table-cell table:number-columns-repeated="1016"/>
        </table:table-row>
        <table:table-row table:style-name="ro1">
          <table:table-cell office:value-type="string">
            <text:p>774_OPOCITY23_Relatorio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9. Pistas usadas: relatório, relatorio, relatório final, relatorio final, projeto, projecto, prospeção.</text:p>
          </table:table-cell>
          <table:table-cell office:value-type="string">
            <text:p>relatório, relatorio, relatório final, relatorio final, projeto, projecto, prospeção</text:p>
          </table:table-cell>
          <table:table-cell office:value-type="string">
            <text:p>Assinatura PDF</text:p>
          </table:table-cell>
          <table:table-cell table:number-columns-repeated="1016"/>
        </table:table-row>
        <table:table-row table:style-name="ro1">
          <table:table-cell office:value-type="string">
            <text:p>779_FMUP_JRESEND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8. Pistas usadas: relatório, relatorio, relatório final, relatorio final, projeto, projecto.</text:p>
          </table:table-cell>
          <table:table-cell office:value-type="string">
            <text:p>relatório, relatorio, relatório final, relatorio final, projeto, projecto</text:p>
          </table:table-cell>
          <table:table-cell office:value-type="string">
            <text:p>Assinatura PDF</text:p>
          </table:table-cell>
          <table:table-cell table:number-columns-repeated="1016"/>
        </table:table-row>
        <table:table-row table:style-name="ro1">
          <table:table-cell office:value-type="string">
            <text:p>785_FARVV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04.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86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787_EA_ECM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 acompanhamento arqueológico, acompanhamento arqueologico.</text:p>
          </table:table-cell>
          <table:table-cell office:value-type="string">
            <text:p>relatório, relatorio, relatório final, relatorio final, proje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794_AAG55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95_1_STCMB23_Relatorio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2. Pistas usadas: relatório, relatorio, relatório final, relatorio final, projecto, sondagem.</text:p>
          </table:table-cell>
          <table:table-cell office:value-type="string">
            <text:p>relatório, relatorio, relatório final, relatorio final, projecto, sondagem</text:p>
          </table:table-cell>
          <table:table-cell office:value-type="string">
            <text:p>Assinatura PDF</text:p>
          </table:table-cell>
          <table:table-cell table:number-columns-repeated="1016"/>
        </table:table-row>
        <table:table-row table:style-name="ro1">
          <table:table-cell office:value-type="string">
            <text:p>796_RP_Mimosa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24.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797_ERV_23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55. Pistas usadas: relatório, relatorio, relatório final, relatorio final, projecto, intervenção arqueológica, intervencao arqueologica.</text:p>
          </table:table-cell>
          <table:table-cell office:value-type="string">
            <text:p>relatório, relatorio, relatório final, relatorio final,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798_RP_FabricaCervejaFar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8.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800_QuintaBrancaE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6. Pistas usadas: relatório, relatorio, relatório final, relatorio final, projeto.</text:p>
          </table:table-cell>
          <table:table-cell office:value-type="string">
            <text:p>relatório, relatorio, relatório final, relatorio final, projeto</text:p>
          </table:table-cell>
          <table:table-cell office:value-type="string">
            <text:p>Assinatura PDF</text:p>
          </table:table-cell>
          <table:table-cell table:number-columns-repeated="1016"/>
        </table:table-row>
        <table:table-row table:style-name="ro1">
          <table:table-cell office:value-type="string">
            <text:p>817_ALX24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8. Pistas usadas: relatório, relatorio, projeto, prospeção.</text:p>
          </table:table-cell>
          <table:table-cell office:value-type="string">
            <text:p>relatório, relatorio, projeto, prospeção</text:p>
          </table:table-cell>
          <table:table-cell office:value-type="string">
            <text:p>Assinatura PDF</text:p>
          </table:table-cell>
          <table:table-cell table:number-columns-repeated="1016"/>
        </table:table-row>
        <table:table-row table:style-name="ro1">
          <table:table-cell office:value-type="string">
            <text:p>818_FALTA.txt</text:p>
          </table:table-cell>
          <table:table-cell office:value-type="string">
            <text:p>.txt</text:p>
          </table:table-cell>
          <table:table-cell office:value-type="string">
            <text:p>Texto simples</text:p>
          </table:table-cell>
          <table:table-cell office:value-type="string">
            <text:p>Dados SIG / GIS</text:p>
          </table:table-cell>
          <table:table-cell office:value-type="string">
            <text:p>Baixa</text:p>
          </table:table-cell>
          <table:table-cell office:value-type="string">
            <text:p>Texto simples; o conteúdo aparenta corresponder a dados sig / gis. O ficheiro foi lido como texto com codificação utf-8-sig. Pistas usadas: sig.</text:p>
          </table:table-cell>
          <table:table-cell office:value-type="string">
            <text:p>sig</text:p>
          </table:table-cell>
          <table:table-cell office:value-type="string">
            <text:p>Assinatura não identificada</text:p>
          </table:table-cell>
          <table:table-cell table:number-columns-repeated="1016"/>
        </table:table-row>
        <table:table-row table:style-name="ro1">
          <table:table-cell office:value-type="string">
            <text:p>820_RPC306_24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8. Pistas usadas: relatório, relatorio, relatório final, relatorio final, projeto, projecto, acompanhamento arqueológico, acompanhamento arqueologico.</text:p>
          </table:table-cell>
          <table:table-cell office:value-type="string">
            <text:p>relatório, relatorio, relatório final, relatorio final, projeto, projecto,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822_LSL6_24_R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0. Pistas usadas: relatório, relatorio, relatório final, relatorio final, projeto, intervenção arqueológica, intervencao arqueologica, acompanhamento arqueológico, acompanhamento arqueologico.</text:p>
          </table:table-cell>
          <table:table-cell office:value-type="string">
            <text:p>relatório, relatorio, relatório final, relatorio final, projeto, intervenção arqueológica, intervencao arqueologica, acompanhamento arqueológico, acompanhamento arqueologico</text:p>
          </table:table-cell>
          <table:table-cell office:value-type="string">
            <text:p>Assinatura PDF</text:p>
          </table:table-cell>
          <table:table-cell table:number-columns-repeated="1016"/>
        </table:table-row>
        <table:table-row table:style-name="ro1">
          <table:table-cell office:value-type="string">
            <text:p>840_CBF24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88. Pistas usadas: relatório, relatorio, relatório final, relatorio final, projeto, prospeção.</text:p>
          </table:table-cell>
          <table:table-cell office:value-type="string">
            <text:p>relatório, relatorio, relatório final, relatorio final, projeto, prospeção</text:p>
          </table:table-cell>
          <table:table-cell office:value-type="string">
            <text:p>Assinatura PDF</text:p>
          </table:table-cell>
          <table:table-cell table:number-columns-repeated="1016"/>
        </table:table-row>
        <table:table-row table:style-name="ro1">
          <table:table-cell office:value-type="string">
            <text:p>843_RP_EdificioPedrasRubra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6.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857_RP_AlexandreHerculan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50.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878_EIA_BRV_25.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4. Pistas usadas: relatório, relatorio, relatório final, relatorio final, projeto, prospeção.</text:p>
          </table:table-cell>
          <table:table-cell office:value-type="string">
            <text:p>relatório, relatorio, relatório final, relatorio final, projeto, prospeção</text:p>
          </table:table-cell>
          <table:table-cell office:value-type="string">
            <text:p>Assinatura PDF</text:p>
          </table:table-cell>
          <table:table-cell table:number-columns-repeated="1016"/>
        </table:table-row>
        <table:table-row table:style-name="ro1">
          <table:table-cell office:value-type="string">
            <text:p>888_NSC_25_RelatorioFinal.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20. Pistas usadas: relatório, relatorio, relatório final, relatorio final, projeto, projecto, intervenção arqueológica, intervencao arqueologica, acompanhamento arqueológico, acompanhamento arqueologico, património arqueológico, patrimonio arqueologico.</text:p>
          </table:table-cell>
          <table:table-cell office:value-type="string">
            <text:p>relatório, relatorio, relatório final, relatorio final, projeto, projecto, intervenção arqueológica, intervencao arqueologica, acompanhamento arqueológico, acompanhamento arqueologico, património arqueológico, patrimonio arqueologico</text:p>
          </table:table-cell>
          <table:table-cell office:value-type="string">
            <text:p>Assinatura PDF</text:p>
          </table:table-cell>
          <table:table-cell table:number-columns-repeated="1016"/>
        </table:table-row>
        <table:table-row table:style-name="ro1">
          <table:table-cell office:value-type="string">
            <text:p>894_RP_IgrejaAzinhos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9.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897_RP_RuaLidador22_VilaConde.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2.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909_RP_Rua31JaneiroSaBandeir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8.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912_RP_RuaNossaSenhoraFatima37.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40. Pistas usadas: relatório, relatorio, projeto.</text:p>
          </table:table-cell>
          <table:table-cell office:value-type="string">
            <text:p>relatório, relatorio, projeto</text:p>
          </table:table-cell>
          <table:table-cell office:value-type="string">
            <text:p>Assinatura PDF</text:p>
          </table:table-cell>
          <table:table-cell table:number-columns-repeated="1016"/>
        </table:table-row>
        <table:table-row table:style-name="ro1">
          <table:table-cell office:value-type="string">
            <text:p>HT011_MANC15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172.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HT013_MOSTEIRO_ANCEDE_CERC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415. Pistas usadas: relatório, relatorio, relatório final, relatorio final, projeto, intervenção arqueológica, intervencao arqueologica.</text:p>
          </table:table-cell>
          <table:table-cell office:value-type="string">
            <text:p>relatório, relatorio, relatório final, relatorio final, proje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HT015_DAH18_Rel_IA.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Alta</text:p>
          </table:table-cell>
          <table:table-cell office:value-type="string">
            <text:p>Documento PDF; o conteúdo aparenta corresponder a relatório de projeto / intervenção arqueológica. Foram analisadas as primeiras 4 página(s) de um total de 36. Pistas usadas: relatório, relatorio, relatório final, relatorio final, projeto, projecto, intervenção arqueológica, intervencao arqueologica.</text:p>
          </table:table-cell>
          <table:table-cell office:value-type="string">
            <text:p>relatório, relatorio, relatório final, relatorio final, projeto, projecto, intervenção arqueológica, intervencao arqueologica</text:p>
          </table:table-cell>
          <table:table-cell office:value-type="string">
            <text:p>Assinatura PDF</text:p>
          </table:table-cell>
          <table:table-cell table:number-columns-repeated="1016"/>
        </table:table-row>
        <table:table-row table:style-name="ro1">
          <table:table-cell office:value-type="string">
            <text:p>Miranda_Ricardo.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4 página(s) de um total de 35. Pistas usadas: relatório, relatorio, projecto, acompanhamento arqueológico, acompanhamento arqueologico, sondagens.</text:p>
          </table:table-cell>
          <table:table-cell office:value-type="string">
            <text:p>relatório, relatorio, projecto, acompanhamento arqueológico, acompanhamento arqueologico, sondagens</text:p>
          </table:table-cell>
          <table:table-cell office:value-type="string">
            <text:p>Assinatura PDF</text:p>
          </table:table-cell>
          <table:table-cell table:number-columns-repeated="1016"/>
        </table:table-row>
        <table:table-row table:style-name="ro1" table:visibility="collapse">
          <table:table-cell office:value-type="string">
            <text:p>Thumbs.db</text:p>
          </table:table-cell>
          <table:table-cell office:value-type="string">
            <text:p>.db</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000 1 listagem IA.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000 2 listagem EP.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000 3 listagem CeR.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CeR.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CSR.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EIA.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EP carta arq.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matriz / raster / cartografia georreferenciada. A análise interna deste formato é limitada; a inferência baseou-se sobretudo no nome, caminho e extensão. Pistas usadas: carta.</text:p>
          </table:table-cell>
          <table:table-cell office:value-type="string">
            <text:p>carta</text:p>
          </table:table-cell>
          <table:table-cell office:value-type="string">
            <text:p>Assinatura não identificada</text:p>
          </table:table-cell>
          <table:table-cell table:number-columns-repeated="1016"/>
        </table:table-row>
        <table:table-row table:style-name="ro1" table:visibility="collapse">
          <table:table-cell office:value-type="string">
            <text:p>listagem EP CSR.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EP EIA.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EP Est His e Edif.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EP PDM.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IA Acomp.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IA Esc area.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IA sond.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Int Arq.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MUS.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visibility="collapse">
          <table:table-cell office:value-type="string">
            <text:p>listagem Prosp.htm</text:p>
          </table:table-cell>
          <table:table-cell office:value-type="string">
            <text:p>.htm</text:p>
          </table:table-cell>
          <table:table-cell office:value-type="string">
            <text:p>Tipo não identificado</text:p>
          </table:table-cell>
          <table:table-cell office:value-type="string">
            <text:p>Tabela / base de dados</text:p>
          </table:table-cell>
          <table:table-cell office:value-type="string">
            <text:p>Baixa</text:p>
          </table:table-cell>
          <table:table-cell office:value-type="string">
            <text:p>Tipo não identificado;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Carta_Cond.pdf</text:p>
          </table:table-cell>
          <table:table-cell office:value-type="string">
            <text:p>.pdf</text:p>
          </table:table-cell>
          <table:table-cell office:value-type="string">
            <text:p>Documento PDF</text:p>
          </table:table-cell>
          <table:table-cell office:value-type="string">
            <text:p>Carta de Condicionantes Patrimoniais</text:p>
          </table:table-cell>
          <table:table-cell office:value-type="string">
            <text:p>Baixa</text:p>
          </table:table-cell>
          <table:table-cell office:value-type="string">
            <text:p>Documento PDF; o conteúdo aparenta corresponder a matriz / raster / cartografia georreferenciada. Foram analisadas as primeiras 3 página(s) de um total de 3. Pistas usadas: carta.</text:p>
          </table:table-cell>
          <table:table-cell office:value-type="string">
            <text:p>carta</text:p>
          </table:table-cell>
          <table:table-cell office:value-type="string">
            <text:p>Assinatura PDF</text:p>
          </table:table-cell>
          <table:table-cell table:number-columns-repeated="1016"/>
        </table:table-row>
        <table:table-row table:style-name="ro1">
          <table:table-cell office:value-type="string">
            <text:p>Doc_1_MONITORIZACAO_Barr.pdf</text:p>
          </table:table-cell>
          <table:table-cell office:value-type="string">
            <text:p>.pdf</text:p>
          </table:table-cell>
          <table:table-cell office:value-type="string">
            <text:p>Documento PDF</text:p>
          </table:table-cell>
          <table:table-cell office:value-type="string">
            <text:p>Plano de Monitorização</text:p>
          </table:table-cell>
          <table:table-cell office:value-type="string">
            <text:p>Alta</text:p>
          </table:table-cell>
          <table:table-cell office:value-type="string">
            <text:p>Documento PDF; o conteúdo aparenta corresponder a tabela / base de dados / desenho / planta / cad. Foram analisadas as primeiras 4 página(s) de um total de 6. Pistas usadas: tabela, registos, valor, estado, levantamento, implantação, implantacao.</text:p>
          </table:table-cell>
          <table:table-cell office:value-type="string">
            <text:p>tabela, registos, valor, estado, levantamento, implantação, implantacao</text:p>
          </table:table-cell>
          <table:table-cell office:value-type="string">
            <text:p>Assinatura PDF</text:p>
          </table:table-cell>
          <table:table-cell table:number-columns-repeated="1016"/>
        </table:table-row>
        <table:table-row table:style-name="ro1">
          <table:table-cell office:value-type="string">
            <text:p>Doc_4_CE_EMPREITEIROS.pdf</text:p>
          </table:table-cell>
          <table:table-cell office:value-type="string">
            <text:p>.pdf</text:p>
          </table:table-cell>
          <table:table-cell office:value-type="string">
            <text:p>Documento PDF</text:p>
          </table:table-cell>
          <table:table-cell office:value-type="string">
            <text:p>Relatório de projeto / intervenção arqueológica</text:p>
          </table:table-cell>
          <table:table-cell office:value-type="string">
            <text:p>Média</text:p>
          </table:table-cell>
          <table:table-cell office:value-type="string">
            <text:p>Documento PDF; o conteúdo aparenta corresponder a relatório de projeto / intervenção arqueológica. Foram analisadas as primeiras 3 página(s) de um total de 3. Pistas usadas: projecto, acompanhamento arqueológico, acompanhamento arqueologico, sondagens, prospecção, prospeccao.</text:p>
          </table:table-cell>
          <table:table-cell office:value-type="string">
            <text:p>projecto, acompanhamento arqueológico, acompanhamento arqueologico, sondagens, prospecção, prospeccao</text:p>
          </table:table-cell>
          <table:table-cell office:value-type="string">
            <text:p>Assinatura PDF</text:p>
          </table:table-cell>
          <table:table-cell table:number-columns-repeated="1016"/>
        </table:table-row>
        <table:table-row table:style-name="ro2">
          <table:table-cell office:value-type="string">
            <text:p>Desdbrvel Monfrt frente.jpg</text:p>
          </table:table-cell>
          <table:table-cell office:value-type="string">
            <text:p>.jpg</text:p>
          </table:table-cell>
          <table:table-cell office:value-type="string">
            <text:p>Imagem JPEG</text:p>
          </table:table-cell>
          <table:table-cell office:value-type="string">
            <text:p>Desdobráveis/Trípticos</text:p>
          </table:table-cell>
          <table:table-cell office:value-type="string">
            <text:p>Média</text:p>
          </table:table-cell>
          <table:table-cell office:value-type="string">
            <text:p>Imagem JPEG; o conteúdo aparenta corresponder a fotografia / registo fotográfico. A imagem tem 3508x2481px, formato JPEG e modo RGB. Pistas usadas: imagem, jpeg, jpg.</text:p>
          </table:table-cell>
          <table:table-cell office:value-type="string">
            <text:p>imagem, jpeg, jpg</text:p>
          </table:table-cell>
          <table:table-cell office:value-type="string">
            <text:p>Assinatura JPEG</text:p>
          </table:table-cell>
          <table:table-cell table:number-columns-repeated="1016"/>
        </table:table-row>
        <table:table-row table:style-name="ro2">
          <table:table-cell office:value-type="string">
            <text:p>Desdbrvel Monfrt verso.jpg</text:p>
          </table:table-cell>
          <table:table-cell office:value-type="string">
            <text:p>.jpg</text:p>
          </table:table-cell>
          <table:table-cell office:value-type="string">
            <text:p>Imagem JPEG</text:p>
          </table:table-cell>
          <table:table-cell office:value-type="string">
            <text:p>Desdobráveis/Trípticos</text:p>
          </table:table-cell>
          <table:table-cell office:value-type="string">
            <text:p>Média</text:p>
          </table:table-cell>
          <table:table-cell office:value-type="string">
            <text:p>Imagem JPEG; o conteúdo aparenta corresponder a fotografia / registo fotográfico. A imagem tem 3508x2481px, formato JPEG e modo RGB. Pistas usadas: imagem, jpeg, jpg.</text:p>
          </table:table-cell>
          <table:table-cell office:value-type="string">
            <text:p>imagem, jpeg, jpg</text:p>
          </table:table-cell>
          <table:table-cell office:value-type="string">
            <text:p>Assinatura JPEG</text:p>
          </table:table-cell>
          <table:table-cell table:number-columns-repeated="1016"/>
        </table:table-row>
        <table:table-row table:style-name="ro2">
          <table:table-cell office:value-type="string">
            <text:p>Desdbrvl algogo frente.jpg</text:p>
          </table:table-cell>
          <table:table-cell office:value-type="string">
            <text:p>.jpg</text:p>
          </table:table-cell>
          <table:table-cell office:value-type="string">
            <text:p>Imagem JPEG</text:p>
          </table:table-cell>
          <table:table-cell office:value-type="string">
            <text:p>Desdobráveis/Trípticos</text:p>
          </table:table-cell>
          <table:table-cell office:value-type="string">
            <text:p>Média</text:p>
          </table:table-cell>
          <table:table-cell office:value-type="string">
            <text:p>Imagem JPEG; o conteúdo aparenta corresponder a fotografia / registo fotográfico. A imagem tem 3508x2481px, formato JPEG e modo RGB. Pistas usadas: imagem, jpeg, jpg.</text:p>
          </table:table-cell>
          <table:table-cell office:value-type="string">
            <text:p>imagem, jpeg, jpg</text:p>
          </table:table-cell>
          <table:table-cell office:value-type="string">
            <text:p>Assinatura JPEG</text:p>
          </table:table-cell>
          <table:table-cell table:number-columns-repeated="1016"/>
        </table:table-row>
        <table:table-row table:style-name="ro2">
          <table:table-cell office:value-type="string">
            <text:p>Desdbrvl algoso verso.jpg</text:p>
          </table:table-cell>
          <table:table-cell office:value-type="string">
            <text:p>.jpg</text:p>
          </table:table-cell>
          <table:table-cell office:value-type="string">
            <text:p>Imagem JPEG</text:p>
          </table:table-cell>
          <table:table-cell office:value-type="string">
            <text:p>Desdobráveis/Trípticos</text:p>
          </table:table-cell>
          <table:table-cell office:value-type="string">
            <text:p>Média</text:p>
          </table:table-cell>
          <table:table-cell office:value-type="string">
            <text:p>Imagem JPEG; o conteúdo aparenta corresponder a fotografia / registo fotográfico. A imagem tem 3508x2481px, formato JPEG e modo RGB. Pistas usadas: imagem, jpeg, jpg.</text:p>
          </table:table-cell>
          <table:table-cell office:value-type="string">
            <text:p>imagem, jpeg, jpg</text:p>
          </table:table-cell>
          <table:table-cell office:value-type="string">
            <text:p>Assinatura JPEG</text:p>
          </table:table-cell>
          <table:table-cell table:number-columns-repeated="1016"/>
        </table:table-row>
        <table:table-row table:style-name="ro1">
          <table:table-cell office:value-type="string">
            <text:p>relações_AP_-_WinLIB.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FormasAP237.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LocaisProd62.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OleirosAP310.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Bibliografia765.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LocaisProducao209.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table-cell office:value-type="string">
            <text:p>OleirosTodos597.xls</text:p>
          </table:table-cell>
          <table:table-cell office:value-type="string">
            <text:p>.xls</text:p>
          </table:table-cell>
          <table:table-cell office:value-type="string">
            <text:p>Folha de cálculo Excel antiga</text:p>
          </table:table-cell>
          <table:table-cell office:value-type="string">
            <text:p>Tabela</text:p>
          </table:table-cell>
          <table:table-cell office:value-type="string">
            <text:p>Baixa</text:p>
          </table:table-cell>
          <table:table-cell office:value-type="string">
            <text:p>Folha de cálculo Excel antiga; o conteúdo aparenta corresponder a tabela / base de dados. A análise interna deste formato é limitada; a inferência baseou-se sobretudo no nome, caminho e extensão. Pistas usadas: nome.</text:p>
          </table:table-cell>
          <table:table-cell office:value-type="string">
            <text:p>nome</text:p>
          </table:table-cell>
          <table:table-cell office:value-type="string">
            <text:p>Assinatura não identificada</text:p>
          </table:table-cell>
          <table:table-cell table:number-columns-repeated="1016"/>
        </table:table-row>
        <table:table-row table:style-name="ro1" table:number-rows-repeated="104780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P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t" number:country="PT">€</number:currency-symbol>
    </number:currency-style>
    <number:currency-style style:name="N107">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07P0"/>
    </number:currency-style>
    <number:number-style style:name="N8000" number:language="pt" number:country="PT">
      <number:number number:min-integer-digits="1"/>
    </number:number-style>
    <number:number-style style:name="N8107P0" style:volatile="true" number:language="pt" number:country="PT">
      <number:number number:decimal-places="0" number:min-integer-digits="1" number:grouping="true"/>
      <number:text> €</number:text>
    </number:number-style>
    <number:number-style style:name="N8107" number:language="pt" number:country="PT">
      <number:text>-</number:text>
      <number:number number:decimal-places="0" number:min-integer-digits="1" number:grouping="true"/>
      <number:text> €</number:text>
      <style:map style:condition="value()&gt;=0" style:apply-style-name="N8107P0"/>
    </number:number-style>
    <number:number-style style:name="N8108P0" style:volatile="true" number:language="pt" number:country="PT">
      <number:number number:decimal-places="0" number:min-integer-digits="1" number:grouping="true"/>
      <number:text> €</number:text>
    </number:number-style>
    <number:number-style style:name="N8108" number:language="pt" number:country="PT">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pt" number:country="PT">
      <number:number number:decimal-places="2" number:min-integer-digits="1" number:grouping="true"/>
      <number:text> €</number:text>
    </number:number-style>
    <number:number-style style:name="N8110" number:language="pt" number:country="PT">
      <number:text>-</number:text>
      <number:number number:decimal-places="2" number:min-integer-digits="1" number:grouping="true"/>
      <number:text> €</number:text>
      <style:map style:condition="value()&gt;=0" style:apply-style-name="N8110P0"/>
    </number:number-style>
    <number:number-style style:name="N8111P0" style:volatile="true" number:language="pt" number:country="PT">
      <number:number number:decimal-places="2" number:min-integer-digits="1" number:grouping="true"/>
      <number:text> €</number:text>
    </number:number-style>
    <number:number-style style:name="N8111" number:language="pt" number:country="PT">
      <style:text-properties fo:color="#ff0000"/>
      <number:text>-</number:text>
      <number:number number:decimal-places="2" number:min-integer-digits="1" number:grouping="true"/>
      <number:text> €</number:text>
      <style:map style:condition="value()&gt;=0" style:apply-style-name="N8111P0"/>
    </number:number-style>
    <number:date-style style:name="N8112" number:language="pt" number:country="PT">
      <number:day number:style="long"/>
      <number:text>-</number:text>
      <number:month number:textual="true"/>
      <number:text>-</number:text>
      <number:year/>
    </number:date-style>
    <number:date-style style:name="N8113" number:language="pt" number:country="PT">
      <number:month number:textual="true"/>
      <number:text>-</number:text>
      <number:year/>
    </number:date-style>
    <number:time-style style:name="N8114" number:language="pt" number:country="PT">
      <number:hours/>
      <number:text>:</number:text>
      <number:minutes number:style="long"/>
      <number:text> </number:text>
      <number:am-pm/>
    </number:time-style>
    <number:time-style style:name="N8115" number:language="pt" number:country="PT">
      <number:hours/>
      <number:text>:</number:text>
      <number:minutes number:style="long"/>
      <number:text>:</number:text>
      <number:seconds number:style="long"/>
      <number:text> </number:text>
      <number:am-pm/>
    </number:time-style>
    <number:time-style style:name="N8116" number:language="pt" number:country="PT">
      <number:hours/>
      <number:text>:</number:text>
      <number:minutes number:style="long"/>
    </number:time-style>
    <number:time-style style:name="N8117" number:language="pt" number:country="PT">
      <number:hours/>
      <number:text>:</number:text>
      <number:minutes number:style="long"/>
      <number:text>:</number:text>
      <number:seconds number:style="long"/>
    </number:time-style>
    <number:date-style style:name="N8118" number:language="pt" number:country="PT">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pt" number:country="PT">
      <number:number number:decimal-places="0" number:min-integer-digits="1" number:grouping="true"/>
      <number:text>   </number:text>
    </number:number-style>
    <number:number-style style:name="N8120" number:language="pt" number:country="PT">
      <number:text>-</number:text>
      <number:number number:decimal-places="0" number:min-integer-digits="1" number:grouping="true"/>
      <number:text>   </number:text>
      <style:map style:condition="value()&gt;=0" style:apply-style-name="N8120P0"/>
    </number:number-style>
    <number:number-style style:name="N8121P0" style:volatile="true" number:language="pt" number:country="PT">
      <number:number number:decimal-places="0" number:min-integer-digits="1" number:grouping="true"/>
      <number:text>   </number:text>
    </number:number-style>
    <number:number-style style:name="N8121" number:language="pt" number:country="PT">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pt" number:country="PT">
      <number:number number:decimal-places="2" number:min-integer-digits="1" number:grouping="true"/>
      <number:text>   </number:text>
    </number:number-style>
    <number:number-style style:name="N8123" number:language="pt" number:country="PT">
      <number:text>-</number:text>
      <number:number number:decimal-places="2" number:min-integer-digits="1" number:grouping="true"/>
      <number:text>   </number:text>
      <style:map style:condition="value()&gt;=0" style:apply-style-name="N8123P0"/>
    </number:number-style>
    <number:number-style style:name="N8124P0" style:volatile="true" number:language="pt" number:country="PT">
      <number:number number:decimal-places="2" number:min-integer-digits="1" number:grouping="true"/>
      <number:text>   </number:text>
    </number:number-style>
    <number:number-style style:name="N8124" number:language="pt" number:country="PT">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pt" number:country="PT">
      <number:number number:decimal-places="0" number:min-integer-digits="1" number:grouping="true"/>
      <number:text>    </number:text>
    </number:number-style>
    <number:number-style style:name="N8128P1" style:volatile="true" number:language="pt" number:country="PT">
      <number:text>-</number:text>
      <number:number number:decimal-places="0" number:min-integer-digits="1" number:grouping="true"/>
      <number:text>    </number:text>
    </number:number-style>
    <number:number-style style:name="N8128P2" style:volatile="true" number:language="pt" number:country="PT">
      <number:text> -    </number:text>
    </number:number-style>
    <number:text-style style:name="N8128" number:language="pt" number:country="P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pt" number:country="PT">
      <number:number number:decimal-places="0" number:min-integer-digits="1" number:grouping="true"/>
      <number:text> € </number:text>
    </number:number-style>
    <number:number-style style:name="N8132P1" style:volatile="true" number:language="pt" number:country="PT">
      <number:text>-</number:text>
      <number:number number:decimal-places="0" number:min-integer-digits="1" number:grouping="true"/>
      <number:text> € </number:text>
    </number:number-style>
    <number:number-style style:name="N8132P2" style:volatile="true" number:language="pt" number:country="PT">
      <number:text> - € </number:text>
    </number:number-style>
    <number:text-style style:name="N8132" number:language="pt" number:country="P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pt" number:country="PT">
      <number:number number:decimal-places="2" number:min-integer-digits="1" number:grouping="true"/>
      <number:text>    </number:text>
    </number:number-style>
    <number:number-style style:name="N8136P1" style:volatile="true" number:language="pt" number:country="PT">
      <number:text>-</number:text>
      <number:number number:decimal-places="2" number:min-integer-digits="1" number:grouping="true"/>
      <number:text>    </number:text>
    </number:number-style>
    <number:number-style style:name="N8136P2" style:volatile="true" number:language="pt" number:country="PT">
      <number:text> -</number:text>
      <number:number number:decimal-places="0" number:min-integer-digits="0"/>
      <number:text>    </number:text>
    </number:number-style>
    <number:text-style style:name="N8136" number:language="pt" number:country="PT">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pt" number:country="PT">
      <number:number number:decimal-places="2" number:min-integer-digits="1" number:grouping="true"/>
      <number:text> € </number:text>
    </number:number-style>
    <number:number-style style:name="N8140P1" style:volatile="true" number:language="pt" number:country="PT">
      <number:text>-</number:text>
      <number:number number:decimal-places="2" number:min-integer-digits="1" number:grouping="true"/>
      <number:text> € </number:text>
    </number:number-style>
    <number:number-style style:name="N8140P2" style:volatile="true" number:language="pt" number:country="PT">
      <number:text> -</number:text>
      <number:number number:decimal-places="0" number:min-integer-digits="0"/>
      <number:text> € </number:text>
    </number:number-style>
    <number:text-style style:name="N8140" number:language="pt" number:country="PT">
      <number:text-content/>
      <number:text> </number:text>
      <style:map style:condition="value()&gt;0" style:apply-style-name="N8140P0"/>
      <style:map style:condition="value()&lt;0" style:apply-style-name="N8140P1"/>
      <style:map style:condition="value()=0" style:apply-style-name="N8140P2"/>
    </number:text-style>
    <number:time-style style:name="N8141" number:language="pt" number:country="PT">
      <number:minutes number:style="long"/>
      <number:text>:</number:text>
      <number:seconds number:style="long"/>
    </number:time-style>
    <number:time-style style:name="N8142" number:language="pt" number:country="PT" number:truncate-on-overflow="false">
      <number:hours/>
      <number:text>:</number:text>
      <number:minutes number:style="long"/>
      <number:text>:</number:text>
      <number:seconds number:style="long"/>
    </number:time-style>
    <number:time-style style:name="N8143" number:language="pt" number:country="PT">
      <number:minutes number:style="long"/>
      <number:text>:</number:text>
      <number:seconds number:style="long" number:decimal-places="1"/>
    </number:time-style>
    <number:number-style style:name="N8144" number:language="pt" number:country="PT">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6-17">17-06-2026</text:date>, <text:time>15:37:31</text:time></text:p>
        </style:region-right>
      </style:header>
      <style:header-left style:display="false"/>
      <style:footer>
        <text:p>Página <text:page-number>1</text:page-number> / <text:page-count>99</text:page-count></text:p>
      </style:footer>
      <style:footer-left style:display="false"/>
    </style:master-page>
    <style:master-page style:name="PageStyle_5f_Ficheiros" style:display-name="PageStyle_Fichei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6-17T15:37:31.46</dc:date>
    <dc:creator>Pedro Maia</dc:creator>
    <meta:generator>OpenOffice/4.1.15$Win32 OpenOffice.org_project/4115m2$Build-9813</meta:generator>
    <meta:editing-duration>PT4M2S</meta:editing-duration>
    <meta:editing-cycles>1</meta:editing-cycles>
    <meta:document-statistic meta:table-count="1" meta:cell-count="6656" meta:object-count="0"/>
  </office:meta>
</office:document-meta>
</file>